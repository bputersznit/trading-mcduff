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172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4189in"/>
    </style:style>
    <style:style style:name="co18" style:family="table-column">
      <style:table-column-properties fo:break-before="auto" style:column-width="1.5366in"/>
    </style:style>
    <style:style style:name="co19" style:family="table-column">
      <style:table-column-properties fo:break-before="auto" style:column-width="1.6866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G_mnq_hybrid_v5_clanmarshal_trad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2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trade_date</text:p>
          </table:table-cell>
          <table:table-cell table:style-name="Default" office:value-type="string" calcext:value-type="string">
            <text:p>entry_time</text:p>
          </table:table-cell>
          <table:table-cell table:style-name="Default" office:value-type="string" calcext:value-type="string">
            <text:p>entry_e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ntry_price</text:p>
          </table:table-cell>
          <table:table-cell office:value-type="string" calcext:value-type="string">
            <text:p>target_price</text:p>
          </table:table-cell>
          <table:table-cell office:value-type="string" calcext:value-type="string">
            <text:p>stop_price</text:p>
          </table:table-cell>
          <table:table-cell office:value-type="string" calcext:value-type="string">
            <text:p>execution_type</text:p>
          </table:table-cell>
          <table:table-cell table:style-name="Default" office:value-type="string" calcext:value-type="string">
            <text:p>effective_fill_time</text:p>
          </table:table-cell>
          <table:table-cell office:value-type="string" calcext:value-type="string">
            <text:p>total_event_size</text:p>
          </table:table-cell>
          <table:table-cell office:value-type="string" calcext:value-type="string">
            <text:p>event_count_delta</text:p>
          </table:table-cell>
          <table:table-cell office:value-type="string" calcext:value-type="string">
            <text:p>slippage_ticks_rt</text:p>
          </table:table-cell>
          <table:table-cell office:value-type="string" calcext:value-type="string">
            <text:p>outcome</text:p>
          </table:table-cell>
          <table:table-cell table:style-name="Default" office:value-type="string" calcext:value-type="string">
            <text:p>exit_time</text:p>
          </table:table-cell>
          <table:table-cell office:value-type="string" calcext:value-type="string">
            <text:p>net_pnl_usd</text:p>
          </table:table-cell>
          <table:table-cell office:value-type="string" calcext:value-type="string">
            <text:p>or_high</text:p>
          </table:table-cell>
          <table:table-cell office:value-type="string" calcext:value-type="string">
            <text:p>or_low</text:p>
          </table:table-cell>
          <table:table-cell office:value-type="string" calcext:value-type="string">
            <text:p>or_location</text:p>
          </table:table-cell>
          <table:table-cell office:value-type="string" calcext:value-type="string">
            <text:p>time_zone</text:p>
          </table:table-cell>
          <table:table-cell office:value-type="string" calcext:value-type="string">
            <text:p>running_daily_pnl</text:p>
          </table:table-cell>
          <table:table-cell office:value-type="string" calcext:value-type="string">
            <text:p>consecutive_losses</text:p>
          </table:table-cell>
          <table:table-cell office:value-type="string" calcext:value-type="string">
            <text:p>v5_running_daily_pnl</text:p>
          </table:table-cell>
          <table:table-cell office:value-type="string" calcext:value-type="string">
            <text:p>v5_running_daily_peak</text:p>
          </table:table-cell>
          <table:table-cell office:value-type="string" calcext:value-type="string">
            <text:p>v5_drawdown_from_peak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3:52:38.800</text:p>
          </table:table-cell>
          <table:table-cell office:value-type="string" calcext:value-type="string">
            <text:p>2025-09-24 09:52:38.800</text:p>
          </table:table-cell>
          <table:table-cell office:value-type="string" calcext:value-type="string">
            <text:p>SHORT</text:p>
          </table:table-cell>
          <table:table-cell office:value-type="float" office:value="24796.75" calcext:value-type="float">
            <text:p>24796.75</text:p>
          </table:table-cell>
          <table:table-cell office:value-type="float" office:value="24786.75" calcext:value-type="float">
            <text:p>24786.75</text:p>
          </table:table-cell>
          <table:table-cell office:value-type="float" office:value="24801.75" calcext:value-type="float">
            <text:p>2480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3:52:39.800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184.3" calcext:value-type="float">
            <text:p>184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4.3" calcext:value-type="float">
            <text:p>18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3:54:53.700</text:p>
          </table:table-cell>
          <table:table-cell office:value-type="string" calcext:value-type="string">
            <text:p>2025-09-24 09:54:53.700</text:p>
          </table:table-cell>
          <table:table-cell office:value-type="string" calcext:value-type="string">
            <text:p>SHORT</text:p>
          </table:table-cell>
          <table:table-cell office:value-type="float" office:value="24801.75" calcext:value-type="float">
            <text:p>24801.75</text:p>
          </table:table-cell>
          <table:table-cell office:value-type="float" office:value="24791.75" calcext:value-type="float">
            <text:p>24791.75</text:p>
          </table:table-cell>
          <table:table-cell office:value-type="float" office:value="24806.75" calcext:value-type="float">
            <text:p>2480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3:54:54.60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73.6" calcext:value-type="float">
            <text:p>37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3.6" calcext:value-type="float">
            <text:p>3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07:56.400</text:p>
          </table:table-cell>
          <table:table-cell office:value-type="string" calcext:value-type="string">
            <text:p>2025-09-24 10:07:56.400</text:p>
          </table:table-cell>
          <table:table-cell office:value-type="string" calcext:value-type="string">
            <text:p>LONG</text:p>
          </table:table-cell>
          <table:table-cell office:value-type="float" office:value="24820" calcext:value-type="float">
            <text:p>24820</text:p>
          </table:table-cell>
          <table:table-cell office:value-type="float" office:value="24830" calcext:value-type="float">
            <text:p>24830</text:p>
          </table:table-cell>
          <table:table-cell office:value-type="float" office:value="24815" calcext:value-type="float">
            <text:p>2481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4:07:57.400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4:09:28.5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252.9" calcext:value-type="float">
            <text:p>252.9</text:p>
          </table:table-cell>
          <table:table-cell office:value-type="float" office:value="1" calcext:value-type="float">
            <text:p>1</text:p>
          </table:table-cell>
          <table:table-cell office:value-type="float" office:value="252.9" calcext:value-type="float">
            <text:p>252.9</text:p>
          </table:table-cell>
          <table:table-cell office:value-type="float" office:value="373.6" calcext:value-type="float">
            <text:p>373.6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13:54.200</text:p>
          </table:table-cell>
          <table:table-cell office:value-type="string" calcext:value-type="string">
            <text:p>2025-09-24 10:13:54.200</text:p>
          </table:table-cell>
          <table:table-cell office:value-type="string" calcext:value-type="string">
            <text:p>LONG</text:p>
          </table:table-cell>
          <table:table-cell office:value-type="float" office:value="24821.5" calcext:value-type="float">
            <text:p>24821.5</text:p>
          </table:table-cell>
          <table:table-cell office:value-type="float" office:value="24831.5" calcext:value-type="float">
            <text:p>24831.5</text:p>
          </table:table-cell>
          <table:table-cell office:value-type="float" office:value="24816.5" calcext:value-type="float">
            <text:p>2481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4:13:55.20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4:16:17.5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24:52.500</text:p>
          </table:table-cell>
          <table:table-cell office:value-type="string" calcext:value-type="string">
            <text:p>2025-09-24 10:24:52.500</text:p>
          </table:table-cell>
          <table:table-cell office:value-type="string" calcext:value-type="string">
            <text:p>LONG</text:p>
          </table:table-cell>
          <table:table-cell office:value-type="float" office:value="24814.5" calcext:value-type="float">
            <text:p>24814.5</text:p>
          </table:table-cell>
          <table:table-cell office:value-type="float" office:value="24824.5" calcext:value-type="float">
            <text:p>24824.5</text:p>
          </table:table-cell>
          <table:table-cell office:value-type="float" office:value="24809.5" calcext:value-type="float">
            <text:p>2480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4:24:53.700</text:p>
          </table:table-cell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4:25:45.1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626.5" calcext:value-type="float">
            <text:p>62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6.5" calcext:value-type="float">
            <text:p>62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26:43.200</text:p>
          </table:table-cell>
          <table:table-cell office:value-type="string" calcext:value-type="string">
            <text:p>2025-09-24 10:26:43.200</text:p>
          </table:table-cell>
          <table:table-cell office:value-type="string" calcext:value-type="string">
            <text:p>LONG</text:p>
          </table:table-cell>
          <table:table-cell office:value-type="float" office:value="24821.75" calcext:value-type="float">
            <text:p>24821.75</text:p>
          </table:table-cell>
          <table:table-cell office:value-type="float" office:value="24831.75" calcext:value-type="float">
            <text:p>24831.75</text:p>
          </table:table-cell>
          <table:table-cell office:value-type="float" office:value="24816.75" calcext:value-type="float">
            <text:p>2481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4:26:44.200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810.8" calcext:value-type="float">
            <text:p>81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0.8" calcext:value-type="float">
            <text:p>8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37:07.500</text:p>
          </table:table-cell>
          <table:table-cell office:value-type="string" calcext:value-type="string">
            <text:p>2025-09-24 10:37:07.500</text:p>
          </table:table-cell>
          <table:table-cell office:value-type="string" calcext:value-type="string">
            <text:p>LONG</text:p>
          </table:table-cell>
          <table:table-cell office:value-type="float" office:value="24820.5" calcext:value-type="float">
            <text:p>24820.5</text:p>
          </table:table-cell>
          <table:table-cell office:value-type="float" office:value="24830.5" calcext:value-type="float">
            <text:p>24830.5</text:p>
          </table:table-cell>
          <table:table-cell office:value-type="float" office:value="24815.5" calcext:value-type="float">
            <text:p>2481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4:37:07.600</text:p>
          </table:table-cell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00.1" calcext:value-type="float">
            <text:p>100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.1" calcext:value-type="float">
            <text:p>100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41:16.000</text:p>
          </table:table-cell>
          <table:table-cell office:value-type="string" calcext:value-type="string">
            <text:p>2025-09-24 10:41:16.000</text:p>
          </table:table-cell>
          <table:table-cell office:value-type="string" calcext:value-type="string">
            <text:p>SHORT</text:p>
          </table:table-cell>
          <table:table-cell office:value-type="float" office:value="24804.5" calcext:value-type="float">
            <text:p>24804.5</text:p>
          </table:table-cell>
          <table:table-cell office:value-type="float" office:value="24794.5" calcext:value-type="float">
            <text:p>24794.5</text:p>
          </table:table-cell>
          <table:table-cell office:value-type="float" office:value="24809.5" calcext:value-type="float">
            <text:p>2480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4:41:16.100</text:p>
          </table:table-cell>
          <table:table-cell office:value-type="float" office:value="76" calcext:value-type="float">
            <text:p>76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89.4" calcext:value-type="float">
            <text:p>1189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9.4" calcext:value-type="float">
            <text:p>118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45:22.000</text:p>
          </table:table-cell>
          <table:table-cell office:value-type="string" calcext:value-type="string">
            <text:p>2025-09-24 10:45:22.000</text:p>
          </table:table-cell>
          <table:table-cell office:value-type="string" calcext:value-type="string">
            <text:p>SHORT</text:p>
          </table:table-cell>
          <table:table-cell office:value-type="float" office:value="24811" calcext:value-type="float">
            <text:p>24811</text:p>
          </table:table-cell>
          <table:table-cell office:value-type="float" office:value="24801" calcext:value-type="float">
            <text:p>24801</text:p>
          </table:table-cell>
          <table:table-cell office:value-type="float" office:value="24816" calcext:value-type="float">
            <text:p>2481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4:45:23.000</text:p>
          </table:table-cell>
          <table:table-cell office:value-type="float" office:value="116" calcext:value-type="float">
            <text:p>116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4:46:04.8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68.7" calcext:value-type="float">
            <text:p>1068.7</text:p>
          </table:table-cell>
          <table:table-cell office:value-type="float" office:value="1" calcext:value-type="float">
            <text:p>1</text:p>
          </table:table-cell>
          <table:table-cell office:value-type="float" office:value="1068.7" calcext:value-type="float">
            <text:p>1068.7</text:p>
          </table:table-cell>
          <table:table-cell office:value-type="float" office:value="1189.4" calcext:value-type="float">
            <text:p>1189.4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58:49.800</text:p>
          </table:table-cell>
          <table:table-cell office:value-type="string" calcext:value-type="string">
            <text:p>2025-09-24 10:58:49.800</text:p>
          </table:table-cell>
          <table:table-cell office:value-type="string" calcext:value-type="string">
            <text:p>SHORT</text:p>
          </table:table-cell>
          <table:table-cell office:value-type="float" office:value="24804.75" calcext:value-type="float">
            <text:p>24804.75</text:p>
          </table:table-cell>
          <table:table-cell office:value-type="float" office:value="24794.75" calcext:value-type="float">
            <text:p>24794.75</text:p>
          </table:table-cell>
          <table:table-cell office:value-type="float" office:value="24809.75" calcext:value-type="float">
            <text:p>2480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4:58:51.200</text:p>
          </table:table-cell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189.4" calcext:value-type="float">
            <text:p>1189.4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4:59:37.000</text:p>
          </table:table-cell>
          <table:table-cell office:value-type="string" calcext:value-type="string">
            <text:p>2025-09-24 10:59:37.000</text:p>
          </table:table-cell>
          <table:table-cell office:value-type="string" calcext:value-type="string">
            <text:p>SHORT</text:p>
          </table:table-cell>
          <table:table-cell office:value-type="float" office:value="24796.25" calcext:value-type="float">
            <text:p>24796.25</text:p>
          </table:table-cell>
          <table:table-cell office:value-type="float" office:value="24786.25" calcext:value-type="float">
            <text:p>24786.25</text:p>
          </table:table-cell>
          <table:table-cell office:value-type="float" office:value="24801.25" calcext:value-type="float">
            <text:p>2480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4:59:38.000</text:p>
          </table:table-cell>
          <table:table-cell office:value-type="float" office:value="79" calcext:value-type="float">
            <text:p>79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42.3" calcext:value-type="float">
            <text:p>1142.3</text:p>
          </table:table-cell>
          <table:table-cell office:value-type="float" office:value="0" calcext:value-type="float">
            <text:p>0</text:p>
          </table:table-cell>
          <table:table-cell office:value-type="float" office:value="1142.3" calcext:value-type="float">
            <text:p>1142.3</text:p>
          </table:table-cell>
          <table:table-cell office:value-type="float" office:value="1189.4" calcext:value-type="float">
            <text:p>1189.4</text:p>
          </table:table-cell>
          <table:table-cell office:value-type="float" office:value="-47.1000000000001" calcext:value-type="float">
            <text:p>-47.1000000000001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13:37.400</text:p>
          </table:table-cell>
          <table:table-cell office:value-type="string" calcext:value-type="string">
            <text:p>2025-09-24 11:13:37.400</text:p>
          </table:table-cell>
          <table:table-cell office:value-type="string" calcext:value-type="string">
            <text:p>SHORT</text:p>
          </table:table-cell>
          <table:table-cell office:value-type="float" office:value="24794" calcext:value-type="float">
            <text:p>24794</text:p>
          </table:table-cell>
          <table:table-cell office:value-type="float" office:value="24784" calcext:value-type="float">
            <text:p>24784</text:p>
          </table:table-cell>
          <table:table-cell office:value-type="float" office:value="24799" calcext:value-type="float">
            <text:p>2479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13:38.400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5:14:27.9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31.6" calcext:value-type="float">
            <text:p>133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1.6" calcext:value-type="float">
            <text:p>133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17:16.500</text:p>
          </table:table-cell>
          <table:table-cell office:value-type="string" calcext:value-type="string">
            <text:p>2025-09-24 11:17:16.500</text:p>
          </table:table-cell>
          <table:table-cell office:value-type="string" calcext:value-type="string">
            <text:p>SHORT</text:p>
          </table:table-cell>
          <table:table-cell office:value-type="float" office:value="24779.5" calcext:value-type="float">
            <text:p>24779.5</text:p>
          </table:table-cell>
          <table:table-cell office:value-type="float" office:value="24769.5" calcext:value-type="float">
            <text:p>24769.5</text:p>
          </table:table-cell>
          <table:table-cell office:value-type="float" office:value="24784.5" calcext:value-type="float">
            <text:p>2478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5:17:17.5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15.9" calcext:value-type="float">
            <text:p>151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5.9" calcext:value-type="float">
            <text:p>151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19:00.600</text:p>
          </table:table-cell>
          <table:table-cell office:value-type="string" calcext:value-type="string">
            <text:p>2025-09-24 11:19:00.600</text:p>
          </table:table-cell>
          <table:table-cell office:value-type="string" calcext:value-type="string">
            <text:p>LONG</text:p>
          </table:table-cell>
          <table:table-cell office:value-type="float" office:value="24784.5" calcext:value-type="float">
            <text:p>24784.5</text:p>
          </table:table-cell>
          <table:table-cell office:value-type="float" office:value="24794.5" calcext:value-type="float">
            <text:p>24794.5</text:p>
          </table:table-cell>
          <table:table-cell office:value-type="float" office:value="24779.5" calcext:value-type="float">
            <text:p>2477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5:19:01.60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00.2" calcext:value-type="float">
            <text:p>1400.2</text:p>
          </table:table-cell>
          <table:table-cell office:value-type="float" office:value="1" calcext:value-type="float">
            <text:p>1</text:p>
          </table:table-cell>
          <table:table-cell office:value-type="float" office:value="1400.2" calcext:value-type="float">
            <text:p>1400.2</text:p>
          </table:table-cell>
          <table:table-cell office:value-type="float" office:value="1515.9" calcext:value-type="float">
            <text:p>1515.9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22:40.600</text:p>
          </table:table-cell>
          <table:table-cell office:value-type="string" calcext:value-type="string">
            <text:p>2025-09-24 11:22:40.600</text:p>
          </table:table-cell>
          <table:table-cell office:value-type="string" calcext:value-type="string">
            <text:p>SHORT</text:p>
          </table:table-cell>
          <table:table-cell office:value-type="float" office:value="24802" calcext:value-type="float">
            <text:p>24802</text:p>
          </table:table-cell>
          <table:table-cell office:value-type="float" office:value="24792" calcext:value-type="float">
            <text:p>24792</text:p>
          </table:table-cell>
          <table:table-cell office:value-type="float" office:value="24807" calcext:value-type="float">
            <text:p>2480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22:41.100</text:p>
          </table:table-cell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5:23:08.2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89.5" calcext:value-type="float">
            <text:p>1289.5</text:p>
          </table:table-cell>
          <table:table-cell office:value-type="float" office:value="2" calcext:value-type="float">
            <text:p>2</text:p>
          </table:table-cell>
          <table:table-cell office:value-type="float" office:value="1289.5" calcext:value-type="float">
            <text:p>1289.5</text:p>
          </table:table-cell>
          <table:table-cell office:value-type="float" office:value="1515.9" calcext:value-type="float">
            <text:p>1515.9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27:36.400</text:p>
          </table:table-cell>
          <table:table-cell office:value-type="string" calcext:value-type="string">
            <text:p>2025-09-24 11:27:36.400</text:p>
          </table:table-cell>
          <table:table-cell office:value-type="string" calcext:value-type="string">
            <text:p>SHORT</text:p>
          </table:table-cell>
          <table:table-cell office:value-type="float" office:value="24797.25" calcext:value-type="float">
            <text:p>24797.25</text:p>
          </table:table-cell>
          <table:table-cell office:value-type="float" office:value="24787.25" calcext:value-type="float">
            <text:p>24787.25</text:p>
          </table:table-cell>
          <table:table-cell office:value-type="float" office:value="24802.25" calcext:value-type="float">
            <text:p>2480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27:38.200</text:p>
          </table:table-cell>
          <table:table-cell office:value-type="float" office:value="114" calcext:value-type="float">
            <text:p>11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78.8" calcext:value-type="float">
            <text:p>1178.8</text:p>
          </table:table-cell>
          <table:table-cell office:value-type="float" office:value="3" calcext:value-type="float">
            <text:p>3</text:p>
          </table:table-cell>
          <table:table-cell office:value-type="float" office:value="1178.8" calcext:value-type="float">
            <text:p>1178.8</text:p>
          </table:table-cell>
          <table:table-cell office:value-type="float" office:value="1515.9" calcext:value-type="float">
            <text:p>1515.9</text:p>
          </table:table-cell>
          <table:table-cell office:value-type="float" office:value="-337.1" calcext:value-type="float">
            <text:p>-337.1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37:57.700</text:p>
          </table:table-cell>
          <table:table-cell office:value-type="string" calcext:value-type="string">
            <text:p>2025-09-24 11:37:57.700</text:p>
          </table:table-cell>
          <table:table-cell office:value-type="string" calcext:value-type="string">
            <text:p>LONG</text:p>
          </table:table-cell>
          <table:table-cell office:value-type="float" office:value="24783" calcext:value-type="float">
            <text:p>24783</text:p>
          </table:table-cell>
          <table:table-cell office:value-type="float" office:value="24793" calcext:value-type="float">
            <text:p>24793</text:p>
          </table:table-cell>
          <table:table-cell office:value-type="float" office:value="24778" calcext:value-type="float">
            <text:p>2477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37:57.8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68.1" calcext:value-type="float">
            <text:p>1368.1</text:p>
          </table:table-cell>
          <table:table-cell office:value-type="float" office:value="0" calcext:value-type="float">
            <text:p>0</text:p>
          </table:table-cell>
          <table:table-cell office:value-type="float" office:value="1368.1" calcext:value-type="float">
            <text:p>1368.1</text:p>
          </table:table-cell>
          <table:table-cell office:value-type="float" office:value="1515.9" calcext:value-type="float">
            <text:p>1515.9</text:p>
          </table:table-cell>
          <table:table-cell office:value-type="float" office:value="-147.8" calcext:value-type="float">
            <text:p>-147.8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38:11.200</text:p>
          </table:table-cell>
          <table:table-cell office:value-type="string" calcext:value-type="string">
            <text:p>2025-09-24 11:38:11.200</text:p>
          </table:table-cell>
          <table:table-cell office:value-type="string" calcext:value-type="string">
            <text:p>SHORT</text:p>
          </table:table-cell>
          <table:table-cell office:value-type="float" office:value="24776.75" calcext:value-type="float">
            <text:p>24776.75</text:p>
          </table:table-cell>
          <table:table-cell office:value-type="float" office:value="24766.75" calcext:value-type="float">
            <text:p>24766.75</text:p>
          </table:table-cell>
          <table:table-cell office:value-type="float" office:value="24781.75" calcext:value-type="float">
            <text:p>2478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38:12.100</text:p>
          </table:table-cell>
          <table:table-cell office:value-type="float" office:value="403" calcext:value-type="float">
            <text:p>403</text:p>
          </table:table-cell>
          <table:table-cell office:value-type="float" office:value="-88" calcext:value-type="float">
            <text:p>-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57.4" calcext:value-type="float">
            <text:p>1257.4</text:p>
          </table:table-cell>
          <table:table-cell office:value-type="float" office:value="1" calcext:value-type="float">
            <text:p>1</text:p>
          </table:table-cell>
          <table:table-cell office:value-type="float" office:value="1257.4" calcext:value-type="float">
            <text:p>1257.4</text:p>
          </table:table-cell>
          <table:table-cell office:value-type="float" office:value="1515.9" calcext:value-type="float">
            <text:p>1515.9</text:p>
          </table:table-cell>
          <table:table-cell office:value-type="float" office:value="-258.5" calcext:value-type="float">
            <text:p>-258.5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39:24.100</text:p>
          </table:table-cell>
          <table:table-cell office:value-type="string" calcext:value-type="string">
            <text:p>2025-09-24 11:39:24.100</text:p>
          </table:table-cell>
          <table:table-cell office:value-type="string" calcext:value-type="string">
            <text:p>LONG</text:p>
          </table:table-cell>
          <table:table-cell office:value-type="float" office:value="24769.5" calcext:value-type="float">
            <text:p>24769.5</text:p>
          </table:table-cell>
          <table:table-cell office:value-type="float" office:value="24779.5" calcext:value-type="float">
            <text:p>24779.5</text:p>
          </table:table-cell>
          <table:table-cell office:value-type="float" office:value="24764.5" calcext:value-type="float">
            <text:p>2476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39:24.30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46.7" calcext:value-type="float">
            <text:p>1446.7</text:p>
          </table:table-cell>
          <table:table-cell office:value-type="float" office:value="0" calcext:value-type="float">
            <text:p>0</text:p>
          </table:table-cell>
          <table:table-cell office:value-type="float" office:value="1446.7" calcext:value-type="float">
            <text:p>1446.7</text:p>
          </table:table-cell>
          <table:table-cell office:value-type="float" office:value="1515.9" calcext:value-type="float">
            <text:p>1515.9</text:p>
          </table:table-cell>
          <table:table-cell office:value-type="float" office:value="-69.2000000000003" calcext:value-type="float">
            <text:p>-69.2000000000003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43:03.700</text:p>
          </table:table-cell>
          <table:table-cell office:value-type="string" calcext:value-type="string">
            <text:p>2025-09-24 11:43:03.700</text:p>
          </table:table-cell>
          <table:table-cell office:value-type="string" calcext:value-type="string">
            <text:p>LONG</text:p>
          </table:table-cell>
          <table:table-cell office:value-type="float" office:value="24770.25" calcext:value-type="float">
            <text:p>24770.25</text:p>
          </table:table-cell>
          <table:table-cell office:value-type="float" office:value="24780.25" calcext:value-type="float">
            <text:p>24780.25</text:p>
          </table:table-cell>
          <table:table-cell office:value-type="float" office:value="24765.25" calcext:value-type="float">
            <text:p>24765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5:43:04.700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43:15.600</text:p>
          </table:table-cell>
          <table:table-cell office:value-type="string" calcext:value-type="string">
            <text:p>2025-09-24 11:43:15.600</text:p>
          </table:table-cell>
          <table:table-cell office:value-type="string" calcext:value-type="string">
            <text:p>SHORT</text:p>
          </table:table-cell>
          <table:table-cell office:value-type="float" office:value="24763.75" calcext:value-type="float">
            <text:p>24763.75</text:p>
          </table:table-cell>
          <table:table-cell office:value-type="float" office:value="24753.75" calcext:value-type="float">
            <text:p>24753.75</text:p>
          </table:table-cell>
          <table:table-cell office:value-type="float" office:value="24768.75" calcext:value-type="float">
            <text:p>2476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43:16.500</text:p>
          </table:table-cell>
          <table:table-cell office:value-type="float" office:value="402" calcext:value-type="float">
            <text:p>40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5:44:40.1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15.3" calcext:value-type="float">
            <text:p>1515.3</text:p>
          </table:table-cell>
          <table:table-cell office:value-type="float" office:value="1" calcext:value-type="float">
            <text:p>1</text:p>
          </table:table-cell>
          <table:table-cell office:value-type="float" office:value="1515.3" calcext:value-type="float">
            <text:p>1515.3</text:p>
          </table:table-cell>
          <table:table-cell office:value-type="float" office:value="1626" calcext:value-type="float">
            <text:p>162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5:55:13.100</text:p>
          </table:table-cell>
          <table:table-cell office:value-type="string" calcext:value-type="string">
            <text:p>2025-09-24 11:55:13.100</text:p>
          </table:table-cell>
          <table:table-cell office:value-type="string" calcext:value-type="string">
            <text:p>LONG</text:p>
          </table:table-cell>
          <table:table-cell office:value-type="float" office:value="24721.5" calcext:value-type="float">
            <text:p>24721.5</text:p>
          </table:table-cell>
          <table:table-cell office:value-type="float" office:value="24731.5" calcext:value-type="float">
            <text:p>24731.5</text:p>
          </table:table-cell>
          <table:table-cell office:value-type="float" office:value="24716.5" calcext:value-type="float">
            <text:p>2471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5:55:16.600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04.6" calcext:value-type="float">
            <text:p>1704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4.6" calcext:value-type="float">
            <text:p>170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00:21.000</text:p>
          </table:table-cell>
          <table:table-cell office:value-type="string" calcext:value-type="string">
            <text:p>2025-09-24 12:00:21.000</text:p>
          </table:table-cell>
          <table:table-cell office:value-type="string" calcext:value-type="string">
            <text:p>SHORT</text:p>
          </table:table-cell>
          <table:table-cell office:value-type="float" office:value="24684.25" calcext:value-type="float">
            <text:p>24684.25</text:p>
          </table:table-cell>
          <table:table-cell office:value-type="float" office:value="24674.25" calcext:value-type="float">
            <text:p>24674.25</text:p>
          </table:table-cell>
          <table:table-cell office:value-type="float" office:value="24689.25" calcext:value-type="float">
            <text:p>2468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00:22.000</text:p>
          </table:table-cell>
          <table:table-cell office:value-type="float" office:value="111" calcext:value-type="float">
            <text:p>111</text:p>
          </table:table-cell>
          <table:table-cell office:value-type="float" office:value="-47" calcext:value-type="float">
            <text:p>-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6:01:18.7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93.9" calcext:value-type="float">
            <text:p>1593.9</text:p>
          </table:table-cell>
          <table:table-cell office:value-type="float" office:value="1" calcext:value-type="float">
            <text:p>1</text:p>
          </table:table-cell>
          <table:table-cell office:value-type="float" office:value="1593.9" calcext:value-type="float">
            <text:p>1593.9</text:p>
          </table:table-cell>
          <table:table-cell office:value-type="float" office:value="1704.6" calcext:value-type="float">
            <text:p>1704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09:33.200</text:p>
          </table:table-cell>
          <table:table-cell office:value-type="string" calcext:value-type="string">
            <text:p>2025-09-24 12:09:33.200</text:p>
          </table:table-cell>
          <table:table-cell office:value-type="string" calcext:value-type="string">
            <text:p>LONG</text:p>
          </table:table-cell>
          <table:table-cell office:value-type="float" office:value="24657.25" calcext:value-type="float">
            <text:p>24657.25</text:p>
          </table:table-cell>
          <table:table-cell office:value-type="float" office:value="24667.25" calcext:value-type="float">
            <text:p>24667.25</text:p>
          </table:table-cell>
          <table:table-cell office:value-type="float" office:value="24652.25" calcext:value-type="float">
            <text:p>2465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09:36.200</text:p>
          </table:table-cell>
          <table:table-cell office:value-type="float" office:value="170" calcext:value-type="float">
            <text:p>17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83.2" calcext:value-type="float">
            <text:p>178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83.2" calcext:value-type="float">
            <text:p>178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11:38.000</text:p>
          </table:table-cell>
          <table:table-cell office:value-type="string" calcext:value-type="string">
            <text:p>2025-09-24 12:11:38.000</text:p>
          </table:table-cell>
          <table:table-cell office:value-type="string" calcext:value-type="string">
            <text:p>LONG</text:p>
          </table:table-cell>
          <table:table-cell office:value-type="float" office:value="24645.25" calcext:value-type="float">
            <text:p>24645.25</text:p>
          </table:table-cell>
          <table:table-cell office:value-type="float" office:value="24655.25" calcext:value-type="float">
            <text:p>24655.25</text:p>
          </table:table-cell>
          <table:table-cell office:value-type="float" office:value="24640.25" calcext:value-type="float">
            <text:p>2464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11:42.500</text:p>
          </table:table-cell>
          <table:table-cell office:value-type="float" office:value="261" calcext:value-type="float">
            <text:p>26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6:12:02.8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72.5" calcext:value-type="float">
            <text:p>1672.5</text:p>
          </table:table-cell>
          <table:table-cell office:value-type="float" office:value="1" calcext:value-type="float">
            <text:p>1</text:p>
          </table:table-cell>
          <table:table-cell office:value-type="float" office:value="1672.5" calcext:value-type="float">
            <text:p>1672.5</text:p>
          </table:table-cell>
          <table:table-cell office:value-type="float" office:value="1783.2" calcext:value-type="float">
            <text:p>1783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13:52.700</text:p>
          </table:table-cell>
          <table:table-cell office:value-type="string" calcext:value-type="string">
            <text:p>2025-09-24 12:13:52.700</text:p>
          </table:table-cell>
          <table:table-cell office:value-type="string" calcext:value-type="string">
            <text:p>SHORT</text:p>
          </table:table-cell>
          <table:table-cell office:value-type="float" office:value="24650" calcext:value-type="float">
            <text:p>24650</text:p>
          </table:table-cell>
          <table:table-cell office:value-type="float" office:value="24640" calcext:value-type="float">
            <text:p>24640</text:p>
          </table:table-cell>
          <table:table-cell office:value-type="float" office:value="24655" calcext:value-type="float">
            <text:p>2465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13:52.90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6:14:12.6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61.8" calcext:value-type="float">
            <text:p>186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1.8" calcext:value-type="float">
            <text:p>18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14:39.200</text:p>
          </table:table-cell>
          <table:table-cell office:value-type="string" calcext:value-type="string">
            <text:p>2025-09-24 12:14:39.200</text:p>
          </table:table-cell>
          <table:table-cell office:value-type="string" calcext:value-type="string">
            <text:p>SHORT</text:p>
          </table:table-cell>
          <table:table-cell office:value-type="float" office:value="24651" calcext:value-type="float">
            <text:p>24651</text:p>
          </table:table-cell>
          <table:table-cell office:value-type="float" office:value="24641" calcext:value-type="float">
            <text:p>24641</text:p>
          </table:table-cell>
          <table:table-cell office:value-type="float" office:value="24656" calcext:value-type="float">
            <text:p>2465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14:39.400</text:p>
          </table:table-cell>
          <table:table-cell office:value-type="float" office:value="96" calcext:value-type="float">
            <text:p>96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6:15:47.1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51.1" calcext:value-type="float">
            <text:p>205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51.1" calcext:value-type="float">
            <text:p>205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18:39.600</text:p>
          </table:table-cell>
          <table:table-cell office:value-type="string" calcext:value-type="string">
            <text:p>2025-09-24 12:18:39.600</text:p>
          </table:table-cell>
          <table:table-cell office:value-type="string" calcext:value-type="string">
            <text:p>SHORT</text:p>
          </table:table-cell>
          <table:table-cell office:value-type="float" office:value="24660.75" calcext:value-type="float">
            <text:p>24660.75</text:p>
          </table:table-cell>
          <table:table-cell office:value-type="float" office:value="24650.75" calcext:value-type="float">
            <text:p>24650.75</text:p>
          </table:table-cell>
          <table:table-cell office:value-type="float" office:value="24665.75" calcext:value-type="float">
            <text:p>2466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18:41.500</text:p>
          </table:table-cell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40.4" calcext:value-type="float">
            <text:p>224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40.4" calcext:value-type="float">
            <text:p>224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20:36.900</text:p>
          </table:table-cell>
          <table:table-cell office:value-type="string" calcext:value-type="string">
            <text:p>2025-09-24 12:20:36.900</text:p>
          </table:table-cell>
          <table:table-cell office:value-type="string" calcext:value-type="string">
            <text:p>SHORT</text:p>
          </table:table-cell>
          <table:table-cell office:value-type="float" office:value="24668.5" calcext:value-type="float">
            <text:p>24668.5</text:p>
          </table:table-cell>
          <table:table-cell office:value-type="float" office:value="24658.5" calcext:value-type="float">
            <text:p>24658.5</text:p>
          </table:table-cell>
          <table:table-cell office:value-type="float" office:value="24673.5" calcext:value-type="float">
            <text:p>2467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20:37.300</text:p>
          </table:table-cell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29.7" calcext:value-type="float">
            <text:p>2429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29.7" calcext:value-type="float">
            <text:p>242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20:43.800</text:p>
          </table:table-cell>
          <table:table-cell office:value-type="string" calcext:value-type="string">
            <text:p>2025-09-24 12:20:43.800</text:p>
          </table:table-cell>
          <table:table-cell office:value-type="string" calcext:value-type="string">
            <text:p>SHORT</text:p>
          </table:table-cell>
          <table:table-cell office:value-type="float" office:value="24664.25" calcext:value-type="float">
            <text:p>24664.25</text:p>
          </table:table-cell>
          <table:table-cell office:value-type="float" office:value="24654.25" calcext:value-type="float">
            <text:p>24654.25</text:p>
          </table:table-cell>
          <table:table-cell office:value-type="float" office:value="24669.25" calcext:value-type="float">
            <text:p>2466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20:44.000</text:p>
          </table:table-cell>
          <table:table-cell office:value-type="float" office:value="167" calcext:value-type="float">
            <text:p>167</text:p>
          </table:table-cell>
          <table:table-cell office:value-type="float" office:value="-36" calcext:value-type="float">
            <text:p>-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29:09.600</text:p>
          </table:table-cell>
          <table:table-cell office:value-type="string" calcext:value-type="string">
            <text:p>2025-09-24 12:29:09.600</text:p>
          </table:table-cell>
          <table:table-cell office:value-type="string" calcext:value-type="string">
            <text:p>SHORT</text:p>
          </table:table-cell>
          <table:table-cell office:value-type="float" office:value="24698.5" calcext:value-type="float">
            <text:p>24698.5</text:p>
          </table:table-cell>
          <table:table-cell office:value-type="float" office:value="24688.5" calcext:value-type="float">
            <text:p>24688.5</text:p>
          </table:table-cell>
          <table:table-cell office:value-type="float" office:value="24703.5" calcext:value-type="float">
            <text:p>2470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6:29:10.600</text:p>
          </table:table-cell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30.7" calcext:value-type="float">
            <text:p>-13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88.3" calcext:value-type="float">
            <text:p>2488.3</text:p>
          </table:table-cell>
          <table:table-cell office:value-type="float" office:value="1" calcext:value-type="float">
            <text:p>1</text:p>
          </table:table-cell>
          <table:table-cell office:value-type="float" office:value="2488.3" calcext:value-type="float">
            <text:p>2488.3</text:p>
          </table:table-cell>
          <table:table-cell office:value-type="float" office:value="2619" calcext:value-type="float">
            <text:p>2619</text:p>
          </table:table-cell>
          <table:table-cell office:value-type="float" office:value="-130.7" calcext:value-type="float">
            <text:p>-13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30:54.400</text:p>
          </table:table-cell>
          <table:table-cell office:value-type="string" calcext:value-type="string">
            <text:p>2025-09-24 12:30:54.400</text:p>
          </table:table-cell>
          <table:table-cell office:value-type="string" calcext:value-type="string">
            <text:p>SHORT</text:p>
          </table:table-cell>
          <table:table-cell office:value-type="float" office:value="24693.25" calcext:value-type="float">
            <text:p>24693.25</text:p>
          </table:table-cell>
          <table:table-cell office:value-type="float" office:value="24683.25" calcext:value-type="float">
            <text:p>24683.25</text:p>
          </table:table-cell>
          <table:table-cell office:value-type="float" office:value="24698.25" calcext:value-type="float">
            <text:p>2469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6:30:55.400</text:p>
          </table:table-cell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6:34:30.9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67.6" calcext:value-type="float">
            <text:p>2667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7.6" calcext:value-type="float">
            <text:p>266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56:35.400</text:p>
          </table:table-cell>
          <table:table-cell office:value-type="string" calcext:value-type="string">
            <text:p>2025-09-24 12:56:35.400</text:p>
          </table:table-cell>
          <table:table-cell office:value-type="string" calcext:value-type="string">
            <text:p>SHORT</text:p>
          </table:table-cell>
          <table:table-cell office:value-type="float" office:value="24684.75" calcext:value-type="float">
            <text:p>24684.75</text:p>
          </table:table-cell>
          <table:table-cell office:value-type="float" office:value="24674.75" calcext:value-type="float">
            <text:p>24674.75</text:p>
          </table:table-cell>
          <table:table-cell office:value-type="float" office:value="24689.75" calcext:value-type="float">
            <text:p>2468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6:56:35.500</text:p>
          </table:table-cell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56.9" calcext:value-type="float">
            <text:p>2856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6.9" calcext:value-type="float">
            <text:p>285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6:59:33.500</text:p>
          </table:table-cell>
          <table:table-cell office:value-type="string" calcext:value-type="string">
            <text:p>2025-09-24 12:59:33.500</text:p>
          </table:table-cell>
          <table:table-cell office:value-type="string" calcext:value-type="string">
            <text:p>SHORT</text:p>
          </table:table-cell>
          <table:table-cell office:value-type="float" office:value="24682" calcext:value-type="float">
            <text:p>24682</text:p>
          </table:table-cell>
          <table:table-cell office:value-type="float" office:value="24672" calcext:value-type="float">
            <text:p>24672</text:p>
          </table:table-cell>
          <table:table-cell office:value-type="float" office:value="24687" calcext:value-type="float">
            <text:p>2468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6:59:34.5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41.2" calcext:value-type="float">
            <text:p>304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41.2" calcext:value-type="float">
            <text:p>304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05:12.900</text:p>
          </table:table-cell>
          <table:table-cell office:value-type="string" calcext:value-type="string">
            <text:p>2025-09-24 13:05:12.900</text:p>
          </table:table-cell>
          <table:table-cell office:value-type="string" calcext:value-type="string">
            <text:p>SHORT</text:p>
          </table:table-cell>
          <table:table-cell office:value-type="float" office:value="24690.75" calcext:value-type="float">
            <text:p>24690.75</text:p>
          </table:table-cell>
          <table:table-cell office:value-type="float" office:value="24680.75" calcext:value-type="float">
            <text:p>24680.75</text:p>
          </table:table-cell>
          <table:table-cell office:value-type="float" office:value="24695.75" calcext:value-type="float">
            <text:p>2469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05:17.600</text:p>
          </table:table-cell>
          <table:table-cell office:value-type="float" office:value="230" calcext:value-type="float">
            <text:p>23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30.5" calcext:value-type="float">
            <text:p>323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30.5" calcext:value-type="float">
            <text:p>32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14:54.200</text:p>
          </table:table-cell>
          <table:table-cell office:value-type="string" calcext:value-type="string">
            <text:p>2025-09-24 13:14:54.200</text:p>
          </table:table-cell>
          <table:table-cell office:value-type="string" calcext:value-type="string">
            <text:p>LONG</text:p>
          </table:table-cell>
          <table:table-cell office:value-type="float" office:value="24720.5" calcext:value-type="float">
            <text:p>24720.5</text:p>
          </table:table-cell>
          <table:table-cell office:value-type="float" office:value="24730.5" calcext:value-type="float">
            <text:p>24730.5</text:p>
          </table:table-cell>
          <table:table-cell office:value-type="float" office:value="24715.5" calcext:value-type="float">
            <text:p>2471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14:56.5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19.8" calcext:value-type="float">
            <text:p>3419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19.8" calcext:value-type="float">
            <text:p>34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22:46.400</text:p>
          </table:table-cell>
          <table:table-cell office:value-type="string" calcext:value-type="string">
            <text:p>2025-09-24 13:22:46.400</text:p>
          </table:table-cell>
          <table:table-cell office:value-type="string" calcext:value-type="string">
            <text:p>SHORT</text:p>
          </table:table-cell>
          <table:table-cell office:value-type="float" office:value="24712.25" calcext:value-type="float">
            <text:p>24712.25</text:p>
          </table:table-cell>
          <table:table-cell office:value-type="float" office:value="24702.25" calcext:value-type="float">
            <text:p>24702.25</text:p>
          </table:table-cell>
          <table:table-cell office:value-type="float" office:value="24717.25" calcext:value-type="float">
            <text:p>2471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7:22:47.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04.1" calcext:value-type="float">
            <text:p>360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04.1" calcext:value-type="float">
            <text:p>360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24:51.700</text:p>
          </table:table-cell>
          <table:table-cell office:value-type="string" calcext:value-type="string">
            <text:p>2025-09-24 13:24:51.700</text:p>
          </table:table-cell>
          <table:table-cell office:value-type="string" calcext:value-type="string">
            <text:p>SHORT</text:p>
          </table:table-cell>
          <table:table-cell office:value-type="float" office:value="24722.75" calcext:value-type="float">
            <text:p>24722.75</text:p>
          </table:table-cell>
          <table:table-cell office:value-type="float" office:value="24712.75" calcext:value-type="float">
            <text:p>24712.75</text:p>
          </table:table-cell>
          <table:table-cell office:value-type="float" office:value="24727.75" calcext:value-type="float">
            <text:p>2472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24:52.800</text:p>
          </table:table-cell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793.4" calcext:value-type="float">
            <text:p>379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93.4" calcext:value-type="float">
            <text:p>379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30:30.200</text:p>
          </table:table-cell>
          <table:table-cell office:value-type="string" calcext:value-type="string">
            <text:p>2025-09-24 13:30:30.200</text:p>
          </table:table-cell>
          <table:table-cell office:value-type="string" calcext:value-type="string">
            <text:p>SHORT</text:p>
          </table:table-cell>
          <table:table-cell office:value-type="float" office:value="24738.5" calcext:value-type="float">
            <text:p>24738.5</text:p>
          </table:table-cell>
          <table:table-cell office:value-type="float" office:value="24728.5" calcext:value-type="float">
            <text:p>24728.5</text:p>
          </table:table-cell>
          <table:table-cell office:value-type="float" office:value="24743.5" calcext:value-type="float">
            <text:p>2474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30:30.400</text:p>
          </table:table-cell>
          <table:table-cell office:value-type="float" office:value="158" calcext:value-type="float">
            <text:p>15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7:31:54.9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82.7" calcext:value-type="float">
            <text:p>3682.7</text:p>
          </table:table-cell>
          <table:table-cell office:value-type="float" office:value="1" calcext:value-type="float">
            <text:p>1</text:p>
          </table:table-cell>
          <table:table-cell office:value-type="float" office:value="3682.7" calcext:value-type="float">
            <text:p>3682.7</text:p>
          </table:table-cell>
          <table:table-cell office:value-type="float" office:value="3793.4" calcext:value-type="float">
            <text:p>3793.4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32:30.600</text:p>
          </table:table-cell>
          <table:table-cell office:value-type="string" calcext:value-type="string">
            <text:p>2025-09-24 13:32:30.600</text:p>
          </table:table-cell>
          <table:table-cell office:value-type="string" calcext:value-type="string">
            <text:p>LONG</text:p>
          </table:table-cell>
          <table:table-cell office:value-type="float" office:value="24743.25" calcext:value-type="float">
            <text:p>24743.25</text:p>
          </table:table-cell>
          <table:table-cell office:value-type="float" office:value="24753.25" calcext:value-type="float">
            <text:p>24753.25</text:p>
          </table:table-cell>
          <table:table-cell office:value-type="float" office:value="24738.25" calcext:value-type="float">
            <text:p>2473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7:32:31.6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33:12.200</text:p>
          </table:table-cell>
          <table:table-cell office:value-type="string" calcext:value-type="string">
            <text:p>2025-09-24 13:33:12.200</text:p>
          </table:table-cell>
          <table:table-cell office:value-type="string" calcext:value-type="string">
            <text:p>SHORT</text:p>
          </table:table-cell>
          <table:table-cell office:value-type="float" office:value="24744.75" calcext:value-type="float">
            <text:p>24744.75</text:p>
          </table:table-cell>
          <table:table-cell office:value-type="float" office:value="24734.75" calcext:value-type="float">
            <text:p>24734.75</text:p>
          </table:table-cell>
          <table:table-cell office:value-type="float" office:value="24749.75" calcext:value-type="float">
            <text:p>2474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33:13.000</text:p>
          </table:table-cell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7:35:04.1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756.3" calcext:value-type="float">
            <text:p>3756.3</text:p>
          </table:table-cell>
          <table:table-cell office:value-type="float" office:value="1" calcext:value-type="float">
            <text:p>1</text:p>
          </table:table-cell>
          <table:table-cell office:value-type="float" office:value="3756.3" calcext:value-type="float">
            <text:p>3756.3</text:p>
          </table:table-cell>
          <table:table-cell office:value-type="float" office:value="3867" calcext:value-type="float">
            <text:p>3867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35:57.700</text:p>
          </table:table-cell>
          <table:table-cell office:value-type="string" calcext:value-type="string">
            <text:p>2025-09-24 13:35:57.700</text:p>
          </table:table-cell>
          <table:table-cell office:value-type="string" calcext:value-type="string">
            <text:p>LONG</text:p>
          </table:table-cell>
          <table:table-cell office:value-type="float" office:value="24740.25" calcext:value-type="float">
            <text:p>24740.25</text:p>
          </table:table-cell>
          <table:table-cell office:value-type="float" office:value="24750.25" calcext:value-type="float">
            <text:p>24750.25</text:p>
          </table:table-cell>
          <table:table-cell office:value-type="float" office:value="24735.25" calcext:value-type="float">
            <text:p>2473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35:59.50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945.6" calcext:value-type="float">
            <text:p>3945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45.6" calcext:value-type="float">
            <text:p>394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36:36.000</text:p>
          </table:table-cell>
          <table:table-cell office:value-type="string" calcext:value-type="string">
            <text:p>2025-09-24 13:36:36.000</text:p>
          </table:table-cell>
          <table:table-cell office:value-type="string" calcext:value-type="string">
            <text:p>LONG</text:p>
          </table:table-cell>
          <table:table-cell office:value-type="float" office:value="24737.75" calcext:value-type="float">
            <text:p>24737.75</text:p>
          </table:table-cell>
          <table:table-cell office:value-type="float" office:value="24747.75" calcext:value-type="float">
            <text:p>24747.75</text:p>
          </table:table-cell>
          <table:table-cell office:value-type="float" office:value="24732.75" calcext:value-type="float">
            <text:p>2473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36:39.300</text:p>
          </table:table-cell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134.9" calcext:value-type="float">
            <text:p>4134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34.9" calcext:value-type="float">
            <text:p>413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40:22.100</text:p>
          </table:table-cell>
          <table:table-cell office:value-type="string" calcext:value-type="string">
            <text:p>2025-09-24 13:40:22.100</text:p>
          </table:table-cell>
          <table:table-cell office:value-type="string" calcext:value-type="string">
            <text:p>LONG</text:p>
          </table:table-cell>
          <table:table-cell office:value-type="float" office:value="24727.5" calcext:value-type="float">
            <text:p>24727.5</text:p>
          </table:table-cell>
          <table:table-cell office:value-type="float" office:value="24737.5" calcext:value-type="float">
            <text:p>24737.5</text:p>
          </table:table-cell>
          <table:table-cell office:value-type="float" office:value="24722.5" calcext:value-type="float">
            <text:p>2472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40:24.20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324.2" calcext:value-type="float">
            <text:p>432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24.2" calcext:value-type="float">
            <text:p>43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48:55.800</text:p>
          </table:table-cell>
          <table:table-cell office:value-type="string" calcext:value-type="string">
            <text:p>2025-09-24 13:48:55.800</text:p>
          </table:table-cell>
          <table:table-cell office:value-type="string" calcext:value-type="string">
            <text:p>LONG</text:p>
          </table:table-cell>
          <table:table-cell office:value-type="float" office:value="24706" calcext:value-type="float">
            <text:p>24706</text:p>
          </table:table-cell>
          <table:table-cell office:value-type="float" office:value="24716" calcext:value-type="float">
            <text:p>24716</text:p>
          </table:table-cell>
          <table:table-cell office:value-type="float" office:value="24701" calcext:value-type="float">
            <text:p>2470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7:49:00.00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213.5" calcext:value-type="float">
            <text:p>4213.5</text:p>
          </table:table-cell>
          <table:table-cell office:value-type="float" office:value="1" calcext:value-type="float">
            <text:p>1</text:p>
          </table:table-cell>
          <table:table-cell office:value-type="float" office:value="4213.5" calcext:value-type="float">
            <text:p>4213.5</text:p>
          </table:table-cell>
          <table:table-cell office:value-type="float" office:value="4324.2" calcext:value-type="float">
            <text:p>4324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7:51:41.200</text:p>
          </table:table-cell>
          <table:table-cell office:value-type="string" calcext:value-type="string">
            <text:p>2025-09-24 13:51:41.200</text:p>
          </table:table-cell>
          <table:table-cell office:value-type="string" calcext:value-type="string">
            <text:p>SHORT</text:p>
          </table:table-cell>
          <table:table-cell office:value-type="float" office:value="24707.75" calcext:value-type="float">
            <text:p>24707.75</text:p>
          </table:table-cell>
          <table:table-cell office:value-type="float" office:value="24697.75" calcext:value-type="float">
            <text:p>24697.75</text:p>
          </table:table-cell>
          <table:table-cell office:value-type="float" office:value="24712.75" calcext:value-type="float">
            <text:p>2471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7:51:42.200</text:p>
          </table:table-cell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392.8" calcext:value-type="float">
            <text:p>4392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92.8" calcext:value-type="float">
            <text:p>439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00:59.900</text:p>
          </table:table-cell>
          <table:table-cell office:value-type="string" calcext:value-type="string">
            <text:p>2025-09-24 14:00:59.900</text:p>
          </table:table-cell>
          <table:table-cell office:value-type="string" calcext:value-type="string">
            <text:p>SHORT</text:p>
          </table:table-cell>
          <table:table-cell office:value-type="float" office:value="24710.5" calcext:value-type="float">
            <text:p>24710.5</text:p>
          </table:table-cell>
          <table:table-cell office:value-type="float" office:value="24700.5" calcext:value-type="float">
            <text:p>24700.5</text:p>
          </table:table-cell>
          <table:table-cell office:value-type="float" office:value="24715.5" calcext:value-type="float">
            <text:p>2471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8:01:00.900</text:p>
          </table:table-cell>
          <table:table-cell office:value-type="float" office:value="122" calcext:value-type="float">
            <text:p>122</text:p>
          </table:table-cell>
          <table:table-cell office:value-type="float" office:value="-48" calcext:value-type="float">
            <text:p>-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8:05:57.5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272.1" calcext:value-type="float">
            <text:p>4272.1</text:p>
          </table:table-cell>
          <table:table-cell office:value-type="float" office:value="1" calcext:value-type="float">
            <text:p>1</text:p>
          </table:table-cell>
          <table:table-cell office:value-type="float" office:value="4272.1" calcext:value-type="float">
            <text:p>4272.1</text:p>
          </table:table-cell>
          <table:table-cell office:value-type="float" office:value="4392.8" calcext:value-type="float">
            <text:p>4392.8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13:24.700</text:p>
          </table:table-cell>
          <table:table-cell office:value-type="string" calcext:value-type="string">
            <text:p>2025-09-24 14:13:24.700</text:p>
          </table:table-cell>
          <table:table-cell office:value-type="string" calcext:value-type="string">
            <text:p>SHORT</text:p>
          </table:table-cell>
          <table:table-cell office:value-type="float" office:value="24695.75" calcext:value-type="float">
            <text:p>24695.75</text:p>
          </table:table-cell>
          <table:table-cell office:value-type="float" office:value="24685.75" calcext:value-type="float">
            <text:p>24685.75</text:p>
          </table:table-cell>
          <table:table-cell office:value-type="float" office:value="24700.75" calcext:value-type="float">
            <text:p>2470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8:13:27.700</text:p>
          </table:table-cell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461.4" calcext:value-type="float">
            <text:p>4461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61.4" calcext:value-type="float">
            <text:p>44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14:31.000</text:p>
          </table:table-cell>
          <table:table-cell office:value-type="string" calcext:value-type="string">
            <text:p>2025-09-24 14:14:31.000</text:p>
          </table:table-cell>
          <table:table-cell office:value-type="string" calcext:value-type="string">
            <text:p>SHORT</text:p>
          </table:table-cell>
          <table:table-cell office:value-type="float" office:value="24701.75" calcext:value-type="float">
            <text:p>24701.75</text:p>
          </table:table-cell>
          <table:table-cell office:value-type="float" office:value="24691.75" calcext:value-type="float">
            <text:p>24691.75</text:p>
          </table:table-cell>
          <table:table-cell office:value-type="float" office:value="24706.75" calcext:value-type="float">
            <text:p>2470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8:14:32.000</text:p>
          </table:table-cell>
          <table:table-cell office:value-type="float" office:value="137" calcext:value-type="float">
            <text:p>137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640.7" calcext:value-type="float">
            <text:p>464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40.7" calcext:value-type="float">
            <text:p>464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16:34.800</text:p>
          </table:table-cell>
          <table:table-cell office:value-type="string" calcext:value-type="string">
            <text:p>2025-09-24 14:16:34.800</text:p>
          </table:table-cell>
          <table:table-cell office:value-type="string" calcext:value-type="string">
            <text:p>SHORT</text:p>
          </table:table-cell>
          <table:table-cell office:value-type="float" office:value="24705.5" calcext:value-type="float">
            <text:p>24705.5</text:p>
          </table:table-cell>
          <table:table-cell office:value-type="float" office:value="24695.5" calcext:value-type="float">
            <text:p>24695.5</text:p>
          </table:table-cell>
          <table:table-cell office:value-type="float" office:value="24710.5" calcext:value-type="float">
            <text:p>2471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8:16:35.800</text:p>
          </table:table-cell>
          <table:table-cell office:value-type="float" office:value="73" calcext:value-type="float">
            <text:p>73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8:18:59.2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525" calcext:value-type="float">
            <text:p>4525</text:p>
          </table:table-cell>
          <table:table-cell office:value-type="float" office:value="1" calcext:value-type="float">
            <text:p>1</text:p>
          </table:table-cell>
          <table:table-cell office:value-type="float" office:value="4525" calcext:value-type="float">
            <text:p>4525</text:p>
          </table:table-cell>
          <table:table-cell office:value-type="float" office:value="4640.7" calcext:value-type="float">
            <text:p>4640.7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36:02.800</text:p>
          </table:table-cell>
          <table:table-cell office:value-type="string" calcext:value-type="string">
            <text:p>2025-09-24 14:36:02.800</text:p>
          </table:table-cell>
          <table:table-cell office:value-type="string" calcext:value-type="string">
            <text:p>SHORT</text:p>
          </table:table-cell>
          <table:table-cell office:value-type="float" office:value="24711.75" calcext:value-type="float">
            <text:p>24711.75</text:p>
          </table:table-cell>
          <table:table-cell office:value-type="float" office:value="24701.75" calcext:value-type="float">
            <text:p>24701.75</text:p>
          </table:table-cell>
          <table:table-cell office:value-type="float" office:value="24716.75" calcext:value-type="float">
            <text:p>2471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8:36:05.300</text:p>
          </table:table-cell>
          <table:table-cell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14.3" calcext:value-type="float">
            <text:p>4714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4.3" calcext:value-type="float">
            <text:p>47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40:01.100</text:p>
          </table:table-cell>
          <table:table-cell office:value-type="string" calcext:value-type="string">
            <text:p>2025-09-24 14:40:01.100</text:p>
          </table:table-cell>
          <table:table-cell office:value-type="string" calcext:value-type="string">
            <text:p>SHORT</text:p>
          </table:table-cell>
          <table:table-cell office:value-type="float" office:value="24718.5" calcext:value-type="float">
            <text:p>24718.5</text:p>
          </table:table-cell>
          <table:table-cell office:value-type="float" office:value="24708.5" calcext:value-type="float">
            <text:p>24708.5</text:p>
          </table:table-cell>
          <table:table-cell office:value-type="float" office:value="24723.5" calcext:value-type="float">
            <text:p>2472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8:40:02.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8:45:23.6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593.6" calcext:value-type="float">
            <text:p>4593.6</text:p>
          </table:table-cell>
          <table:table-cell office:value-type="float" office:value="1" calcext:value-type="float">
            <text:p>1</text:p>
          </table:table-cell>
          <table:table-cell office:value-type="float" office:value="4593.6" calcext:value-type="float">
            <text:p>4593.6</text:p>
          </table:table-cell>
          <table:table-cell office:value-type="float" office:value="4714.3" calcext:value-type="float">
            <text:p>4714.3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53:18.200</text:p>
          </table:table-cell>
          <table:table-cell office:value-type="string" calcext:value-type="string">
            <text:p>2025-09-24 14:53:18.200</text:p>
          </table:table-cell>
          <table:table-cell office:value-type="string" calcext:value-type="string">
            <text:p>SHORT</text:p>
          </table:table-cell>
          <table:table-cell office:value-type="float" office:value="24731" calcext:value-type="float">
            <text:p>24731</text:p>
          </table:table-cell>
          <table:table-cell office:value-type="float" office:value="24721" calcext:value-type="float">
            <text:p>24721</text:p>
          </table:table-cell>
          <table:table-cell office:value-type="float" office:value="24736" calcext:value-type="float">
            <text:p>2473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8:53:18.700</text:p>
          </table:table-cell>
          <table:table-cell office:value-type="float" office:value="86" calcext:value-type="float">
            <text:p>8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82.9" calcext:value-type="float">
            <text:p>478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82.9" calcext:value-type="float">
            <text:p>478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53:50.500</text:p>
          </table:table-cell>
          <table:table-cell office:value-type="string" calcext:value-type="string">
            <text:p>2025-09-24 14:53:50.500</text:p>
          </table:table-cell>
          <table:table-cell office:value-type="string" calcext:value-type="string">
            <text:p>LONG</text:p>
          </table:table-cell>
          <table:table-cell office:value-type="float" office:value="24738" calcext:value-type="float">
            <text:p>24738</text:p>
          </table:table-cell>
          <table:table-cell office:value-type="float" office:value="24748" calcext:value-type="float">
            <text:p>24748</text:p>
          </table:table-cell>
          <table:table-cell office:value-type="float" office:value="24733" calcext:value-type="float">
            <text:p>2473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8:53:50.900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972.2" calcext:value-type="float">
            <text:p>497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72.2" calcext:value-type="float">
            <text:p>497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53:51.900</text:p>
          </table:table-cell>
          <table:table-cell office:value-type="string" calcext:value-type="string">
            <text:p>2025-09-24 14:53:51.900</text:p>
          </table:table-cell>
          <table:table-cell office:value-type="string" calcext:value-type="string">
            <text:p>SHORT</text:p>
          </table:table-cell>
          <table:table-cell office:value-type="float" office:value="24738" calcext:value-type="float">
            <text:p>24738</text:p>
          </table:table-cell>
          <table:table-cell office:value-type="float" office:value="24728" calcext:value-type="float">
            <text:p>24728</text:p>
          </table:table-cell>
          <table:table-cell office:value-type="float" office:value="24743" calcext:value-type="float">
            <text:p>2474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8:53:52.400</text:p>
          </table:table-cell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61.5" calcext:value-type="float">
            <text:p>4861.5</text:p>
          </table:table-cell>
          <table:table-cell office:value-type="float" office:value="1" calcext:value-type="float">
            <text:p>1</text:p>
          </table:table-cell>
          <table:table-cell office:value-type="float" office:value="4861.5" calcext:value-type="float">
            <text:p>4861.5</text:p>
          </table:table-cell>
          <table:table-cell office:value-type="float" office:value="4972.2" calcext:value-type="float">
            <text:p>4972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57:24.300</text:p>
          </table:table-cell>
          <table:table-cell office:value-type="string" calcext:value-type="string">
            <text:p>2025-09-24 14:57:24.300</text:p>
          </table:table-cell>
          <table:table-cell office:value-type="string" calcext:value-type="string">
            <text:p>SHORT</text:p>
          </table:table-cell>
          <table:table-cell office:value-type="float" office:value="24738" calcext:value-type="float">
            <text:p>24738</text:p>
          </table:table-cell>
          <table:table-cell office:value-type="float" office:value="24728" calcext:value-type="float">
            <text:p>24728</text:p>
          </table:table-cell>
          <table:table-cell office:value-type="float" office:value="24743" calcext:value-type="float">
            <text:p>2474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8:57:27.000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50.8" calcext:value-type="float">
            <text:p>4750.8</text:p>
          </table:table-cell>
          <table:table-cell office:value-type="float" office:value="2" calcext:value-type="float">
            <text:p>2</text:p>
          </table:table-cell>
          <table:table-cell office:value-type="float" office:value="4750.8" calcext:value-type="float">
            <text:p>4750.8</text:p>
          </table:table-cell>
          <table:table-cell office:value-type="float" office:value="4972.2" calcext:value-type="float">
            <text:p>4972.2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8:58:04.800</text:p>
          </table:table-cell>
          <table:table-cell office:value-type="string" calcext:value-type="string">
            <text:p>2025-09-24 14:58:04.800</text:p>
          </table:table-cell>
          <table:table-cell office:value-type="string" calcext:value-type="string">
            <text:p>SHORT</text:p>
          </table:table-cell>
          <table:table-cell office:value-type="float" office:value="24736.5" calcext:value-type="float">
            <text:p>24736.5</text:p>
          </table:table-cell>
          <table:table-cell office:value-type="float" office:value="24726.5" calcext:value-type="float">
            <text:p>24726.5</text:p>
          </table:table-cell>
          <table:table-cell office:value-type="float" office:value="24741.5" calcext:value-type="float">
            <text:p>24741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8:58:05.800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9:00:18.200</text:p>
          </table:table-cell>
          <table:table-cell office:value-type="float" office:value="-130.7" calcext:value-type="float">
            <text:p>-13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620.1" calcext:value-type="float">
            <text:p>4620.1</text:p>
          </table:table-cell>
          <table:table-cell office:value-type="float" office:value="3" calcext:value-type="float">
            <text:p>3</text:p>
          </table:table-cell>
          <table:table-cell office:value-type="float" office:value="4620.1" calcext:value-type="float">
            <text:p>4620.1</text:p>
          </table:table-cell>
          <table:table-cell office:value-type="float" office:value="4972.2" calcext:value-type="float">
            <text:p>4972.2</text:p>
          </table:table-cell>
          <table:table-cell office:value-type="float" office:value="-352.099999999999" calcext:value-type="float">
            <text:p>-352.099999999999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01:33.500</text:p>
          </table:table-cell>
          <table:table-cell office:value-type="string" calcext:value-type="string">
            <text:p>2025-09-24 15:01:33.500</text:p>
          </table:table-cell>
          <table:table-cell office:value-type="string" calcext:value-type="string">
            <text:p>LONG</text:p>
          </table:table-cell>
          <table:table-cell office:value-type="float" office:value="24731.5" calcext:value-type="float">
            <text:p>24731.5</text:p>
          </table:table-cell>
          <table:table-cell office:value-type="float" office:value="24741.5" calcext:value-type="float">
            <text:p>24741.5</text:p>
          </table:table-cell>
          <table:table-cell office:value-type="float" office:value="24726.5" calcext:value-type="float">
            <text:p>2472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01:36.00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09.4" calcext:value-type="float">
            <text:p>4809.4</text:p>
          </table:table-cell>
          <table:table-cell office:value-type="float" office:value="0" calcext:value-type="float">
            <text:p>0</text:p>
          </table:table-cell>
          <table:table-cell office:value-type="float" office:value="4809.4" calcext:value-type="float">
            <text:p>4809.4</text:p>
          </table:table-cell>
          <table:table-cell office:value-type="float" office:value="4972.2" calcext:value-type="float">
            <text:p>4972.2</text:p>
          </table:table-cell>
          <table:table-cell office:value-type="float" office:value="-162.799999999999" calcext:value-type="float">
            <text:p>-162.799999999999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02:37.500</text:p>
          </table:table-cell>
          <table:table-cell office:value-type="string" calcext:value-type="string">
            <text:p>2025-09-24 15:02:37.500</text:p>
          </table:table-cell>
          <table:table-cell office:value-type="string" calcext:value-type="string">
            <text:p>SHORT</text:p>
          </table:table-cell>
          <table:table-cell office:value-type="float" office:value="24723" calcext:value-type="float">
            <text:p>24723</text:p>
          </table:table-cell>
          <table:table-cell office:value-type="float" office:value="24713" calcext:value-type="float">
            <text:p>24713</text:p>
          </table:table-cell>
          <table:table-cell office:value-type="float" office:value="24728" calcext:value-type="float">
            <text:p>2472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02:38.500</text:p>
          </table:table-cell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993.7" calcext:value-type="float">
            <text:p>499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93.7" calcext:value-type="float">
            <text:p>499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08:33.300</text:p>
          </table:table-cell>
          <table:table-cell office:value-type="string" calcext:value-type="string">
            <text:p>2025-09-24 15:08:33.300</text:p>
          </table:table-cell>
          <table:table-cell office:value-type="string" calcext:value-type="string">
            <text:p>SHORT</text:p>
          </table:table-cell>
          <table:table-cell office:value-type="float" office:value="24724" calcext:value-type="float">
            <text:p>24724</text:p>
          </table:table-cell>
          <table:table-cell office:value-type="float" office:value="24714" calcext:value-type="float">
            <text:p>24714</text:p>
          </table:table-cell>
          <table:table-cell office:value-type="float" office:value="24729" calcext:value-type="float">
            <text:p>2472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08:37.300</text:p>
          </table:table-cell>
          <table:table-cell office:value-type="float" office:value="77" calcext:value-type="float">
            <text:p>7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183.00000000001" calcext:value-type="float">
            <text:p>5183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3.00000000001" calcext:value-type="float">
            <text:p>5183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14:10.100</text:p>
          </table:table-cell>
          <table:table-cell office:value-type="string" calcext:value-type="string">
            <text:p>2025-09-24 15:14:10.100</text:p>
          </table:table-cell>
          <table:table-cell office:value-type="string" calcext:value-type="string">
            <text:p>LONG</text:p>
          </table:table-cell>
          <table:table-cell office:value-type="float" office:value="24721.25" calcext:value-type="float">
            <text:p>24721.25</text:p>
          </table:table-cell>
          <table:table-cell office:value-type="float" office:value="24731.25" calcext:value-type="float">
            <text:p>24731.25</text:p>
          </table:table-cell>
          <table:table-cell office:value-type="float" office:value="24716.25" calcext:value-type="float">
            <text:p>2471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14:11.7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9:15:23.3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072.30000000001" calcext:value-type="float">
            <text:p>5072.30000000001</text:p>
          </table:table-cell>
          <table:table-cell office:value-type="float" office:value="1" calcext:value-type="float">
            <text:p>1</text:p>
          </table:table-cell>
          <table:table-cell office:value-type="float" office:value="5072.30000000001" calcext:value-type="float">
            <text:p>5072.30000000001</text:p>
          </table:table-cell>
          <table:table-cell office:value-type="float" office:value="5183.00000000001" calcext:value-type="float">
            <text:p>5183.0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15:41.200</text:p>
          </table:table-cell>
          <table:table-cell office:value-type="string" calcext:value-type="string">
            <text:p>2025-09-24 15:15:41.200</text:p>
          </table:table-cell>
          <table:table-cell office:value-type="string" calcext:value-type="string">
            <text:p>SHORT</text:p>
          </table:table-cell>
          <table:table-cell office:value-type="float" office:value="24717.25" calcext:value-type="float">
            <text:p>24717.25</text:p>
          </table:table-cell>
          <table:table-cell office:value-type="float" office:value="24707.25" calcext:value-type="float">
            <text:p>24707.25</text:p>
          </table:table-cell>
          <table:table-cell office:value-type="float" office:value="24722.25" calcext:value-type="float">
            <text:p>2472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15:42.20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251.60000000001" calcext:value-type="float">
            <text:p>5251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51.60000000001" calcext:value-type="float">
            <text:p>5251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15:48.300</text:p>
          </table:table-cell>
          <table:table-cell office:value-type="string" calcext:value-type="string">
            <text:p>2025-09-24 15:15:48.300</text:p>
          </table:table-cell>
          <table:table-cell office:value-type="string" calcext:value-type="string">
            <text:p>SHORT</text:p>
          </table:table-cell>
          <table:table-cell office:value-type="float" office:value="24721" calcext:value-type="float">
            <text:p>24721</text:p>
          </table:table-cell>
          <table:table-cell office:value-type="float" office:value="24711" calcext:value-type="float">
            <text:p>24711</text:p>
          </table:table-cell>
          <table:table-cell office:value-type="float" office:value="24726" calcext:value-type="float">
            <text:p>2472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15:49.500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440.90000000001" calcext:value-type="float">
            <text:p>5440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0.90000000001" calcext:value-type="float">
            <text:p>5440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31:48.800</text:p>
          </table:table-cell>
          <table:table-cell office:value-type="string" calcext:value-type="string">
            <text:p>2025-09-24 15:31:48.800</text:p>
          </table:table-cell>
          <table:table-cell office:value-type="string" calcext:value-type="string">
            <text:p>SHORT</text:p>
          </table:table-cell>
          <table:table-cell office:value-type="float" office:value="24726.25" calcext:value-type="float">
            <text:p>24726.25</text:p>
          </table:table-cell>
          <table:table-cell office:value-type="float" office:value="24716.25" calcext:value-type="float">
            <text:p>24716.25</text:p>
          </table:table-cell>
          <table:table-cell office:value-type="float" office:value="24731.25" calcext:value-type="float">
            <text:p>2473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31:52.300</text:p>
          </table:table-cell>
          <table:table-cell office:value-type="float" office:value="113" calcext:value-type="float">
            <text:p>11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9:33:55.5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330.20000000001" calcext:value-type="float">
            <text:p>5330.20000000001</text:p>
          </table:table-cell>
          <table:table-cell office:value-type="float" office:value="1" calcext:value-type="float">
            <text:p>1</text:p>
          </table:table-cell>
          <table:table-cell office:value-type="float" office:value="5330.20000000001" calcext:value-type="float">
            <text:p>5330.20000000001</text:p>
          </table:table-cell>
          <table:table-cell office:value-type="float" office:value="5440.90000000001" calcext:value-type="float">
            <text:p>5440.9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38:49.000</text:p>
          </table:table-cell>
          <table:table-cell office:value-type="string" calcext:value-type="string">
            <text:p>2025-09-24 15:38:49.000</text:p>
          </table:table-cell>
          <table:table-cell office:value-type="string" calcext:value-type="string">
            <text:p>LONG</text:p>
          </table:table-cell>
          <table:table-cell office:value-type="float" office:value="24714.75" calcext:value-type="float">
            <text:p>24714.75</text:p>
          </table:table-cell>
          <table:table-cell office:value-type="float" office:value="24724.75" calcext:value-type="float">
            <text:p>24724.75</text:p>
          </table:table-cell>
          <table:table-cell office:value-type="float" office:value="24709.75" calcext:value-type="float">
            <text:p>2470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38:51.70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4 19:43:20.6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219.50000000001" calcext:value-type="float">
            <text:p>5219.50000000001</text:p>
          </table:table-cell>
          <table:table-cell office:value-type="float" office:value="2" calcext:value-type="float">
            <text:p>2</text:p>
          </table:table-cell>
          <table:table-cell office:value-type="float" office:value="5219.50000000001" calcext:value-type="float">
            <text:p>5219.50000000001</text:p>
          </table:table-cell>
          <table:table-cell office:value-type="float" office:value="5440.90000000001" calcext:value-type="float">
            <text:p>5440.9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44:40.300</text:p>
          </table:table-cell>
          <table:table-cell office:value-type="string" calcext:value-type="string">
            <text:p>2025-09-24 15:44:40.300</text:p>
          </table:table-cell>
          <table:table-cell office:value-type="string" calcext:value-type="string">
            <text:p>SHORT</text:p>
          </table:table-cell>
          <table:table-cell office:value-type="float" office:value="24712" calcext:value-type="float">
            <text:p>24712</text:p>
          </table:table-cell>
          <table:table-cell office:value-type="float" office:value="24702" calcext:value-type="float">
            <text:p>24702</text:p>
          </table:table-cell>
          <table:table-cell office:value-type="float" office:value="24717" calcext:value-type="float">
            <text:p>2471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44:44.90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9:45:54.5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408.80000000001" calcext:value-type="float">
            <text:p>5408.80000000001</text:p>
          </table:table-cell>
          <table:table-cell office:value-type="float" office:value="0" calcext:value-type="float">
            <text:p>0</text:p>
          </table:table-cell>
          <table:table-cell office:value-type="float" office:value="5408.80000000001" calcext:value-type="float">
            <text:p>5408.80000000001</text:p>
          </table:table-cell>
          <table:table-cell office:value-type="float" office:value="5440.90000000001" calcext:value-type="float">
            <text:p>5440.90000000001</text:p>
          </table:table-cell>
          <table:table-cell office:value-type="float" office:value="-32.0999999999995" calcext:value-type="float">
            <text:p>-32.0999999999995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46:31.200</text:p>
          </table:table-cell>
          <table:table-cell office:value-type="string" calcext:value-type="string">
            <text:p>2025-09-24 15:46:31.200</text:p>
          </table:table-cell>
          <table:table-cell office:value-type="string" calcext:value-type="string">
            <text:p>SHORT</text:p>
          </table:table-cell>
          <table:table-cell office:value-type="float" office:value="24705.5" calcext:value-type="float">
            <text:p>24705.5</text:p>
          </table:table-cell>
          <table:table-cell office:value-type="float" office:value="24695.5" calcext:value-type="float">
            <text:p>24695.5</text:p>
          </table:table-cell>
          <table:table-cell office:value-type="float" office:value="24710.5" calcext:value-type="float">
            <text:p>247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46:34.10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598.10000000001" calcext:value-type="float">
            <text:p>5598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98.10000000001" calcext:value-type="float">
            <text:p>5598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46:34.400</text:p>
          </table:table-cell>
          <table:table-cell office:value-type="string" calcext:value-type="string">
            <text:p>2025-09-24 15:46:34.400</text:p>
          </table:table-cell>
          <table:table-cell office:value-type="string" calcext:value-type="string">
            <text:p>SHORT</text:p>
          </table:table-cell>
          <table:table-cell office:value-type="float" office:value="24705.75" calcext:value-type="float">
            <text:p>24705.75</text:p>
          </table:table-cell>
          <table:table-cell office:value-type="float" office:value="24695.75" calcext:value-type="float">
            <text:p>24695.75</text:p>
          </table:table-cell>
          <table:table-cell office:value-type="float" office:value="24710.75" calcext:value-type="float">
            <text:p>2471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46:35.400</text:p>
          </table:table-cell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777.40000000001" calcext:value-type="float">
            <text:p>5777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7.40000000001" calcext:value-type="float">
            <text:p>5777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49:43.200</text:p>
          </table:table-cell>
          <table:table-cell office:value-type="string" calcext:value-type="string">
            <text:p>2025-09-24 15:49:43.200</text:p>
          </table:table-cell>
          <table:table-cell office:value-type="string" calcext:value-type="string">
            <text:p>LONG</text:p>
          </table:table-cell>
          <table:table-cell office:value-type="float" office:value="24722.5" calcext:value-type="float">
            <text:p>24722.5</text:p>
          </table:table-cell>
          <table:table-cell office:value-type="float" office:value="24732.5" calcext:value-type="float">
            <text:p>24732.5</text:p>
          </table:table-cell>
          <table:table-cell office:value-type="float" office:value="24717.5" calcext:value-type="float">
            <text:p>2471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49:45.5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666.70000000001" calcext:value-type="float">
            <text:p>5666.70000000001</text:p>
          </table:table-cell>
          <table:table-cell office:value-type="float" office:value="1" calcext:value-type="float">
            <text:p>1</text:p>
          </table:table-cell>
          <table:table-cell office:value-type="float" office:value="5666.70000000001" calcext:value-type="float">
            <text:p>5666.70000000001</text:p>
          </table:table-cell>
          <table:table-cell office:value-type="float" office:value="5777.40000000001" calcext:value-type="float">
            <text:p>5777.4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1:10.600</text:p>
          </table:table-cell>
          <table:table-cell office:value-type="string" calcext:value-type="string">
            <text:p>2025-09-24 15:51:10.600</text:p>
          </table:table-cell>
          <table:table-cell office:value-type="string" calcext:value-type="string">
            <text:p>SHORT</text:p>
          </table:table-cell>
          <table:table-cell office:value-type="float" office:value="24728" calcext:value-type="float">
            <text:p>24728</text:p>
          </table:table-cell>
          <table:table-cell office:value-type="float" office:value="24718" calcext:value-type="float">
            <text:p>24718</text:p>
          </table:table-cell>
          <table:table-cell office:value-type="float" office:value="24733" calcext:value-type="float">
            <text:p>2473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51:11.600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846.00000000001" calcext:value-type="float">
            <text:p>5846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46.00000000001" calcext:value-type="float">
            <text:p>5846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1:13.000</text:p>
          </table:table-cell>
          <table:table-cell office:value-type="string" calcext:value-type="string">
            <text:p>2025-09-24 15:51:13.000</text:p>
          </table:table-cell>
          <table:table-cell office:value-type="string" calcext:value-type="string">
            <text:p>SHORT</text:p>
          </table:table-cell>
          <table:table-cell office:value-type="float" office:value="24729.75" calcext:value-type="float">
            <text:p>24729.75</text:p>
          </table:table-cell>
          <table:table-cell office:value-type="float" office:value="24719.75" calcext:value-type="float">
            <text:p>24719.75</text:p>
          </table:table-cell>
          <table:table-cell office:value-type="float" office:value="24734.75" calcext:value-type="float">
            <text:p>2473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51:16.900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035.30000000001" calcext:value-type="float">
            <text:p>6035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35.30000000001" calcext:value-type="float">
            <text:p>6035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4:17.000</text:p>
          </table:table-cell>
          <table:table-cell office:value-type="string" calcext:value-type="string">
            <text:p>2025-09-24 15:54:17.000</text:p>
          </table:table-cell>
          <table:table-cell office:value-type="string" calcext:value-type="string">
            <text:p>SHORT</text:p>
          </table:table-cell>
          <table:table-cell office:value-type="float" office:value="24731.75" calcext:value-type="float">
            <text:p>24731.75</text:p>
          </table:table-cell>
          <table:table-cell office:value-type="float" office:value="24721.75" calcext:value-type="float">
            <text:p>24721.75</text:p>
          </table:table-cell>
          <table:table-cell office:value-type="float" office:value="24736.75" calcext:value-type="float">
            <text:p>2473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54:19.000</text:p>
          </table:table-cell>
          <table:table-cell office:value-type="float" office:value="252" calcext:value-type="float">
            <text:p>25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224.60000000001" calcext:value-type="float">
            <text:p>6224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24.60000000001" calcext:value-type="float">
            <text:p>6224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4:30.400</text:p>
          </table:table-cell>
          <table:table-cell office:value-type="string" calcext:value-type="string">
            <text:p>2025-09-24 15:54:30.400</text:p>
          </table:table-cell>
          <table:table-cell office:value-type="string" calcext:value-type="string">
            <text:p>SHORT</text:p>
          </table:table-cell>
          <table:table-cell office:value-type="float" office:value="24736.75" calcext:value-type="float">
            <text:p>24736.75</text:p>
          </table:table-cell>
          <table:table-cell office:value-type="float" office:value="24726.75" calcext:value-type="float">
            <text:p>24726.75</text:p>
          </table:table-cell>
          <table:table-cell office:value-type="float" office:value="24741.75" calcext:value-type="float">
            <text:p>2474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54:31.40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4 19:55:27.3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403.90000000001" calcext:value-type="float">
            <text:p>6403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3.90000000001" calcext:value-type="float">
            <text:p>6403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5:42.400</text:p>
          </table:table-cell>
          <table:table-cell office:value-type="string" calcext:value-type="string">
            <text:p>2025-09-24 15:55:42.400</text:p>
          </table:table-cell>
          <table:table-cell office:value-type="string" calcext:value-type="string">
            <text:p>SHORT</text:p>
          </table:table-cell>
          <table:table-cell office:value-type="float" office:value="24731.25" calcext:value-type="float">
            <text:p>24731.25</text:p>
          </table:table-cell>
          <table:table-cell office:value-type="float" office:value="24721.25" calcext:value-type="float">
            <text:p>24721.25</text:p>
          </table:table-cell>
          <table:table-cell office:value-type="float" office:value="24736.25" calcext:value-type="float">
            <text:p>2473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55:43.700</text:p>
          </table:table-cell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593.20000000001" calcext:value-type="float">
            <text:p>6593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93.20000000001" calcext:value-type="float">
            <text:p>6593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6:14.100</text:p>
          </table:table-cell>
          <table:table-cell office:value-type="string" calcext:value-type="string">
            <text:p>2025-09-24 15:56:14.100</text:p>
          </table:table-cell>
          <table:table-cell office:value-type="string" calcext:value-type="string">
            <text:p>SHORT</text:p>
          </table:table-cell>
          <table:table-cell office:value-type="float" office:value="24732" calcext:value-type="float">
            <text:p>24732</text:p>
          </table:table-cell>
          <table:table-cell office:value-type="float" office:value="24722" calcext:value-type="float">
            <text:p>24722</text:p>
          </table:table-cell>
          <table:table-cell office:value-type="float" office:value="24737" calcext:value-type="float">
            <text:p>2473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56:15.100</text:p>
          </table:table-cell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772.50000000001" calcext:value-type="float">
            <text:p>6772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72.50000000001" calcext:value-type="float">
            <text:p>6772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6:59.700</text:p>
          </table:table-cell>
          <table:table-cell office:value-type="string" calcext:value-type="string">
            <text:p>2025-09-24 15:56:59.700</text:p>
          </table:table-cell>
          <table:table-cell office:value-type="string" calcext:value-type="string">
            <text:p>SHORT</text:p>
          </table:table-cell>
          <table:table-cell office:value-type="float" office:value="24728.5" calcext:value-type="float">
            <text:p>24728.5</text:p>
          </table:table-cell>
          <table:table-cell office:value-type="float" office:value="24718.5" calcext:value-type="float">
            <text:p>24718.5</text:p>
          </table:table-cell>
          <table:table-cell office:value-type="float" office:value="24733.5" calcext:value-type="float">
            <text:p>2473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57:00.0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961.80000000001" calcext:value-type="float">
            <text:p>6961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61.80000000001" calcext:value-type="float">
            <text:p>6961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7:09.500</text:p>
          </table:table-cell>
          <table:table-cell office:value-type="string" calcext:value-type="string">
            <text:p>2025-09-24 15:57:09.500</text:p>
          </table:table-cell>
          <table:table-cell office:value-type="string" calcext:value-type="string">
            <text:p>SHORT</text:p>
          </table:table-cell>
          <table:table-cell office:value-type="float" office:value="24727.25" calcext:value-type="float">
            <text:p>24727.25</text:p>
          </table:table-cell>
          <table:table-cell office:value-type="float" office:value="24717.25" calcext:value-type="float">
            <text:p>24717.25</text:p>
          </table:table-cell>
          <table:table-cell office:value-type="float" office:value="24732.25" calcext:value-type="float">
            <text:p>2473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57:10.500</text:p>
          </table:table-cell>
          <table:table-cell office:value-type="float" office:value="279" calcext:value-type="float">
            <text:p>279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7131.10000000001" calcext:value-type="float">
            <text:p>7131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31.10000000001" calcext:value-type="float">
            <text:p>7131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7:54.700</text:p>
          </table:table-cell>
          <table:table-cell office:value-type="string" calcext:value-type="string">
            <text:p>2025-09-24 15:57:54.700</text:p>
          </table:table-cell>
          <table:table-cell office:value-type="string" calcext:value-type="string">
            <text:p>SHORT</text:p>
          </table:table-cell>
          <table:table-cell office:value-type="float" office:value="24736.75" calcext:value-type="float">
            <text:p>24736.75</text:p>
          </table:table-cell>
          <table:table-cell office:value-type="float" office:value="24726.75" calcext:value-type="float">
            <text:p>24726.75</text:p>
          </table:table-cell>
          <table:table-cell office:value-type="float" office:value="24741.75" calcext:value-type="float">
            <text:p>2474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4 19:57:55.700</text:p>
          </table:table-cell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7300.40000000001" calcext:value-type="float">
            <text:p>7300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00.40000000001" calcext:value-type="float">
            <text:p>7300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2025-09-24 19:58:19.900</text:p>
          </table:table-cell>
          <table:table-cell office:value-type="string" calcext:value-type="string">
            <text:p>2025-09-24 15:58:19.900</text:p>
          </table:table-cell>
          <table:table-cell office:value-type="string" calcext:value-type="string">
            <text:p>SHORT</text:p>
          </table:table-cell>
          <table:table-cell office:value-type="float" office:value="24740" calcext:value-type="float">
            <text:p>24740</text:p>
          </table:table-cell>
          <table:table-cell office:value-type="float" office:value="24730" calcext:value-type="float">
            <text:p>24730</text:p>
          </table:table-cell>
          <table:table-cell office:value-type="float" office:value="24745" calcext:value-type="float">
            <text:p>2474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4 19:58:20.700</text:p>
          </table:table-cell>
          <table:table-cell office:value-type="float" office:value="85" calcext:value-type="float">
            <text:p>85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841.25" calcext:value-type="float">
            <text:p>24841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7489.70000000001" calcext:value-type="float">
            <text:p>7489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89.70000000001" calcext:value-type="float">
            <text:p>7489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3:50:51.600</text:p>
          </table:table-cell>
          <table:table-cell office:value-type="string" calcext:value-type="string">
            <text:p>2025-09-29 09:50:51.600</text:p>
          </table:table-cell>
          <table:table-cell office:value-type="string" calcext:value-type="string">
            <text:p>LONG</text:p>
          </table:table-cell>
          <table:table-cell office:value-type="float" office:value="24948.75" calcext:value-type="float">
            <text:p>24948.75</text:p>
          </table:table-cell>
          <table:table-cell office:value-type="float" office:value="24958.75" calcext:value-type="float">
            <text:p>24958.75</text:p>
          </table:table-cell>
          <table:table-cell office:value-type="float" office:value="24943.75" calcext:value-type="float">
            <text:p>24943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3:50:52.00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-57.1" calcext:value-type="float">
            <text:p>-57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10:36.200</text:p>
          </table:table-cell>
          <table:table-cell office:value-type="string" calcext:value-type="string">
            <text:p>2025-09-29 10:10:36.200</text:p>
          </table:table-cell>
          <table:table-cell office:value-type="string" calcext:value-type="string">
            <text:p>LONG</text:p>
          </table:table-cell>
          <table:table-cell office:value-type="float" office:value="24961" calcext:value-type="float">
            <text:p>24961</text:p>
          </table:table-cell>
          <table:table-cell office:value-type="float" office:value="24971" calcext:value-type="float">
            <text:p>24971</text:p>
          </table:table-cell>
          <table:table-cell office:value-type="float" office:value="24956" calcext:value-type="float">
            <text:p>2495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4:10:37.20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85.1000000000001" calcext:value-type="float">
            <text:p>85.10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3.6" calcext:value-type="float">
            <text:p>3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26:58.600</text:p>
          </table:table-cell>
          <table:table-cell office:value-type="string" calcext:value-type="string">
            <text:p>2025-09-29 10:26:58.600</text:p>
          </table:table-cell>
          <table:table-cell office:value-type="string" calcext:value-type="string">
            <text:p>LONG</text:p>
          </table:table-cell>
          <table:table-cell office:value-type="float" office:value="24962" calcext:value-type="float">
            <text:p>24962</text:p>
          </table:table-cell>
          <table:table-cell office:value-type="float" office:value="24972" calcext:value-type="float">
            <text:p>24972</text:p>
          </table:table-cell>
          <table:table-cell office:value-type="float" office:value="24957" calcext:value-type="float">
            <text:p>2495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4:27:00.30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274.4" calcext:value-type="float">
            <text:p>27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2.9" calcext:value-type="float">
            <text:p>56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28:12.400</text:p>
          </table:table-cell>
          <table:table-cell office:value-type="string" calcext:value-type="string">
            <text:p>2025-09-29 10:28:12.400</text:p>
          </table:table-cell>
          <table:table-cell office:value-type="string" calcext:value-type="string">
            <text:p>LONG</text:p>
          </table:table-cell>
          <table:table-cell office:value-type="float" office:value="24961" calcext:value-type="float">
            <text:p>24961</text:p>
          </table:table-cell>
          <table:table-cell office:value-type="float" office:value="24971" calcext:value-type="float">
            <text:p>24971</text:p>
          </table:table-cell>
          <table:table-cell office:value-type="float" office:value="24956" calcext:value-type="float">
            <text:p>2495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4:28:13.40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458.7" calcext:value-type="float">
            <text:p>45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7.2" calcext:value-type="float">
            <text:p>7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37:31.000</text:p>
          </table:table-cell>
          <table:table-cell office:value-type="string" calcext:value-type="string">
            <text:p>2025-09-29 10:37:31.000</text:p>
          </table:table-cell>
          <table:table-cell office:value-type="string" calcext:value-type="string">
            <text:p>LONG</text:p>
          </table:table-cell>
          <table:table-cell office:value-type="float" office:value="24941.25" calcext:value-type="float">
            <text:p>24941.25</text:p>
          </table:table-cell>
          <table:table-cell office:value-type="float" office:value="24951.25" calcext:value-type="float">
            <text:p>24951.25</text:p>
          </table:table-cell>
          <table:table-cell office:value-type="float" office:value="24936.25" calcext:value-type="float">
            <text:p>2493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4:37:31.90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4:38:09.9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636.5" calcext:value-type="float">
            <text:p>636.5</text:p>
          </table:table-cell>
          <table:table-cell office:value-type="float" office:value="747.2" calcext:value-type="float">
            <text:p>747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50:32.500</text:p>
          </table:table-cell>
          <table:table-cell office:value-type="string" calcext:value-type="string">
            <text:p>2025-09-29 10:50:32.500</text:p>
          </table:table-cell>
          <table:table-cell office:value-type="string" calcext:value-type="string">
            <text:p>LONG</text:p>
          </table:table-cell>
          <table:table-cell office:value-type="float" office:value="24952.5" calcext:value-type="float">
            <text:p>24952.5</text:p>
          </table:table-cell>
          <table:table-cell office:value-type="float" office:value="24962.5" calcext:value-type="float">
            <text:p>24962.5</text:p>
          </table:table-cell>
          <table:table-cell office:value-type="float" office:value="24947.5" calcext:value-type="float">
            <text:p>2494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4:50:33.500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27.3" calcext:value-type="float">
            <text:p>527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52:42.100</text:p>
          </table:table-cell>
          <table:table-cell office:value-type="string" calcext:value-type="string">
            <text:p>2025-09-29 10:52:42.100</text:p>
          </table:table-cell>
          <table:table-cell office:value-type="string" calcext:value-type="string">
            <text:p>SHORT</text:p>
          </table:table-cell>
          <table:table-cell office:value-type="float" office:value="24958" calcext:value-type="float">
            <text:p>24958</text:p>
          </table:table-cell>
          <table:table-cell office:value-type="float" office:value="24948" calcext:value-type="float">
            <text:p>24948</text:p>
          </table:table-cell>
          <table:table-cell office:value-type="float" office:value="24963" calcext:value-type="float">
            <text:p>2496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4:52:42.50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16.6" calcext:value-type="float">
            <text:p>416.6</text:p>
          </table:table-cell>
          <table:table-cell office:value-type="float" office:value="1" calcext:value-type="float">
            <text:p>1</text:p>
          </table:table-cell>
          <table:table-cell office:value-type="float" office:value="705.1" calcext:value-type="float">
            <text:p>705.1</text:p>
          </table:table-cell>
          <table:table-cell office:value-type="float" office:value="815.8" calcext:value-type="float">
            <text:p>815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55:08.700</text:p>
          </table:table-cell>
          <table:table-cell office:value-type="string" calcext:value-type="string">
            <text:p>2025-09-29 10:55:08.700</text:p>
          </table:table-cell>
          <table:table-cell office:value-type="string" calcext:value-type="string">
            <text:p>SHORT</text:p>
          </table:table-cell>
          <table:table-cell office:value-type="float" office:value="24943" calcext:value-type="float">
            <text:p>24943</text:p>
          </table:table-cell>
          <table:table-cell office:value-type="float" office:value="24933" calcext:value-type="float">
            <text:p>24933</text:p>
          </table:table-cell>
          <table:table-cell office:value-type="float" office:value="24948" calcext:value-type="float">
            <text:p>2494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4:55:09.7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0.9" calcext:value-type="float">
            <text:p>300.9</text:p>
          </table:table-cell>
          <table:table-cell office:value-type="float" office:value="2" calcext:value-type="float">
            <text:p>2</text:p>
          </table:table-cell>
          <table:table-cell office:value-type="float" office:value="589.4" calcext:value-type="float">
            <text:p>589.4</text:p>
          </table:table-cell>
          <table:table-cell office:value-type="float" office:value="815.8" calcext:value-type="float">
            <text:p>815.8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55:14.200</text:p>
          </table:table-cell>
          <table:table-cell office:value-type="string" calcext:value-type="string">
            <text:p>2025-09-29 10:55:14.200</text:p>
          </table:table-cell>
          <table:table-cell office:value-type="string" calcext:value-type="string">
            <text:p>LONG</text:p>
          </table:table-cell>
          <table:table-cell office:value-type="float" office:value="24942" calcext:value-type="float">
            <text:p>24942</text:p>
          </table:table-cell>
          <table:table-cell office:value-type="float" office:value="24952" calcext:value-type="float">
            <text:p>24952</text:p>
          </table:table-cell>
          <table:table-cell office:value-type="float" office:value="24937" calcext:value-type="float">
            <text:p>2493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4:55:15.200</text:p>
          </table:table-cell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80.2" calcext:value-type="float">
            <text:p>480.2</text:p>
          </table:table-cell>
          <table:table-cell office:value-type="float" office:value="0" calcext:value-type="float">
            <text:p>0</text:p>
          </table:table-cell>
          <table:table-cell office:value-type="float" office:value="768.7" calcext:value-type="float">
            <text:p>768.7</text:p>
          </table:table-cell>
          <table:table-cell office:value-type="float" office:value="815.8" calcext:value-type="float">
            <text:p>815.8</text:p>
          </table:table-cell>
          <table:table-cell office:value-type="float" office:value="-47.1000000000001" calcext:value-type="float">
            <text:p>-47.1000000000001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4:55:31.200</text:p>
          </table:table-cell>
          <table:table-cell office:value-type="string" calcext:value-type="string">
            <text:p>2025-09-29 10:55:31.200</text:p>
          </table:table-cell>
          <table:table-cell office:value-type="string" calcext:value-type="string">
            <text:p>LONG</text:p>
          </table:table-cell>
          <table:table-cell office:value-type="float" office:value="24938.75" calcext:value-type="float">
            <text:p>24938.75</text:p>
          </table:table-cell>
          <table:table-cell office:value-type="float" office:value="24948.75" calcext:value-type="float">
            <text:p>24948.75</text:p>
          </table:table-cell>
          <table:table-cell office:value-type="float" office:value="24933.75" calcext:value-type="float">
            <text:p>2493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4:55:32.200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59.5" calcext:value-type="float">
            <text:p>65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00:25.400</text:p>
          </table:table-cell>
          <table:table-cell office:value-type="string" calcext:value-type="string">
            <text:p>2025-09-29 11:00:25.400</text:p>
          </table:table-cell>
          <table:table-cell office:value-type="string" calcext:value-type="string">
            <text:p>SHORT</text:p>
          </table:table-cell>
          <table:table-cell office:value-type="float" office:value="24934" calcext:value-type="float">
            <text:p>24934</text:p>
          </table:table-cell>
          <table:table-cell office:value-type="float" office:value="24924" calcext:value-type="float">
            <text:p>24924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5:00:28.000</text:p>
          </table:table-cell>
          <table:table-cell office:value-type="float" office:value="93" calcext:value-type="float">
            <text:p>93</text:p>
          </table:table-cell>
          <table:table-cell office:value-type="float" office:value="-36" calcext:value-type="float">
            <text:p>-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5:01:25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48.8" calcext:value-type="float">
            <text:p>548.8</text:p>
          </table:table-cell>
          <table:table-cell office:value-type="float" office:value="1" calcext:value-type="float">
            <text:p>1</text:p>
          </table:table-cell>
          <table:table-cell office:value-type="float" office:value="837.3" calcext:value-type="float">
            <text:p>837.3</text:p>
          </table:table-cell>
          <table:table-cell office:value-type="float" office:value="948" calcext:value-type="float">
            <text:p>94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12:37.900</text:p>
          </table:table-cell>
          <table:table-cell office:value-type="string" calcext:value-type="string">
            <text:p>2025-09-29 11:12:37.900</text:p>
          </table:table-cell>
          <table:table-cell office:value-type="string" calcext:value-type="string">
            <text:p>LONG</text:p>
          </table:table-cell>
          <table:table-cell office:value-type="float" office:value="24896.25" calcext:value-type="float">
            <text:p>24896.25</text:p>
          </table:table-cell>
          <table:table-cell office:value-type="float" office:value="24906.25" calcext:value-type="float">
            <text:p>24906.25</text:p>
          </table:table-cell>
          <table:table-cell office:value-type="float" office:value="24891.25" calcext:value-type="float">
            <text:p>2489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5:12:40.30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38.1" calcext:value-type="float">
            <text:p>738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6.6" calcext:value-type="float">
            <text:p>10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12:43.500</text:p>
          </table:table-cell>
          <table:table-cell office:value-type="string" calcext:value-type="string">
            <text:p>2025-09-29 11:12:43.500</text:p>
          </table:table-cell>
          <table:table-cell office:value-type="string" calcext:value-type="string">
            <text:p>LONG</text:p>
          </table:table-cell>
          <table:table-cell office:value-type="float" office:value="24894.5" calcext:value-type="float">
            <text:p>24894.5</text:p>
          </table:table-cell>
          <table:table-cell office:value-type="float" office:value="24904.5" calcext:value-type="float">
            <text:p>24904.5</text:p>
          </table:table-cell>
          <table:table-cell office:value-type="float" office:value="24889.5" calcext:value-type="float">
            <text:p>2488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5:12:44.400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927.4" calcext:value-type="float">
            <text:p>927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5.9" calcext:value-type="float">
            <text:p>121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21:15.900</text:p>
          </table:table-cell>
          <table:table-cell office:value-type="string" calcext:value-type="string">
            <text:p>2025-09-29 11:21:15.900</text:p>
          </table:table-cell>
          <table:table-cell office:value-type="string" calcext:value-type="string">
            <text:p>LONG</text:p>
          </table:table-cell>
          <table:table-cell office:value-type="float" office:value="24876.5" calcext:value-type="float">
            <text:p>24876.5</text:p>
          </table:table-cell>
          <table:table-cell office:value-type="float" office:value="24886.5" calcext:value-type="float">
            <text:p>24886.5</text:p>
          </table:table-cell>
          <table:table-cell office:value-type="float" office:value="24871.5" calcext:value-type="float">
            <text:p>2487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5:21:17.50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5:22:17.4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116.7" calcext:value-type="float">
            <text:p>1116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5.2" calcext:value-type="float">
            <text:p>140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39:26.500</text:p>
          </table:table-cell>
          <table:table-cell office:value-type="string" calcext:value-type="string">
            <text:p>2025-09-29 11:39:26.500</text:p>
          </table:table-cell>
          <table:table-cell office:value-type="string" calcext:value-type="string">
            <text:p>LONG</text:p>
          </table:table-cell>
          <table:table-cell office:value-type="float" office:value="24857.5" calcext:value-type="float">
            <text:p>24857.5</text:p>
          </table:table-cell>
          <table:table-cell office:value-type="float" office:value="24867.5" calcext:value-type="float">
            <text:p>24867.5</text:p>
          </table:table-cell>
          <table:table-cell office:value-type="float" office:value="24852.5" calcext:value-type="float">
            <text:p>2485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5:39:27.500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5:40:37.9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284.5" calcext:value-type="float">
            <text:p>1284.5</text:p>
          </table:table-cell>
          <table:table-cell office:value-type="float" office:value="1405.2" calcext:value-type="float">
            <text:p>1405.2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41:04.200</text:p>
          </table:table-cell>
          <table:table-cell office:value-type="string" calcext:value-type="string">
            <text:p>2025-09-29 11:41:04.200</text:p>
          </table:table-cell>
          <table:table-cell office:value-type="string" calcext:value-type="string">
            <text:p>SHORT</text:p>
          </table:table-cell>
          <table:table-cell office:value-type="float" office:value="24854.5" calcext:value-type="float">
            <text:p>24854.5</text:p>
          </table:table-cell>
          <table:table-cell office:value-type="float" office:value="24844.5" calcext:value-type="float">
            <text:p>24844.5</text:p>
          </table:table-cell>
          <table:table-cell office:value-type="float" office:value="24859.5" calcext:value-type="float">
            <text:p>2485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5:41:05.200</text:p>
          </table:table-cell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5:41:14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80.3" calcext:value-type="float">
            <text:p>880.3</text:p>
          </table:table-cell>
          <table:table-cell office:value-type="float" office:value="2" calcext:value-type="float">
            <text:p>2</text:p>
          </table:table-cell>
          <table:table-cell office:value-type="float" office:value="1168.8" calcext:value-type="float">
            <text:p>1168.8</text:p>
          </table:table-cell>
          <table:table-cell office:value-type="float" office:value="1405.2" calcext:value-type="float">
            <text:p>1405.2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51:48.200</text:p>
          </table:table-cell>
          <table:table-cell office:value-type="string" calcext:value-type="string">
            <text:p>2025-09-29 11:51:48.200</text:p>
          </table:table-cell>
          <table:table-cell office:value-type="string" calcext:value-type="string">
            <text:p>LONG</text:p>
          </table:table-cell>
          <table:table-cell office:value-type="float" office:value="24845.75" calcext:value-type="float">
            <text:p>24845.75</text:p>
          </table:table-cell>
          <table:table-cell office:value-type="float" office:value="24855.75" calcext:value-type="float">
            <text:p>24855.75</text:p>
          </table:table-cell>
          <table:table-cell office:value-type="float" office:value="24840.75" calcext:value-type="float">
            <text:p>2484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5:51:48.500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5:52:17.1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69.6" calcext:value-type="float">
            <text:p>769.6</text:p>
          </table:table-cell>
          <table:table-cell office:value-type="float" office:value="3" calcext:value-type="float">
            <text:p>3</text:p>
          </table:table-cell>
          <table:table-cell office:value-type="float" office:value="1058.1" calcext:value-type="float">
            <text:p>1058.1</text:p>
          </table:table-cell>
          <table:table-cell office:value-type="float" office:value="1405.2" calcext:value-type="float">
            <text:p>1405.2</text:p>
          </table:table-cell>
          <table:table-cell office:value-type="float" office:value="-347.1" calcext:value-type="float">
            <text:p>-347.1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55:52.500</text:p>
          </table:table-cell>
          <table:table-cell office:value-type="string" calcext:value-type="string">
            <text:p>2025-09-29 11:55:52.500</text:p>
          </table:table-cell>
          <table:table-cell office:value-type="string" calcext:value-type="string">
            <text:p>SHORT</text:p>
          </table:table-cell>
          <table:table-cell office:value-type="float" office:value="24842.75" calcext:value-type="float">
            <text:p>24842.75</text:p>
          </table:table-cell>
          <table:table-cell office:value-type="float" office:value="24832.75" calcext:value-type="float">
            <text:p>24832.75</text:p>
          </table:table-cell>
          <table:table-cell office:value-type="float" office:value="24847.75" calcext:value-type="float">
            <text:p>2484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5:55:53.500</text:p>
          </table:table-cell>
          <table:table-cell office:value-type="float" office:value="112" calcext:value-type="float">
            <text:p>11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5:56:23.2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33.2" calcext:value-type="float">
            <text:p>833.2</text:p>
          </table:table-cell>
          <table:table-cell office:value-type="float" office:value="0" calcext:value-type="float">
            <text:p>0</text:p>
          </table:table-cell>
          <table:table-cell office:value-type="float" office:value="1237.4" calcext:value-type="float">
            <text:p>1237.4</text:p>
          </table:table-cell>
          <table:table-cell office:value-type="float" office:value="1405.2" calcext:value-type="float">
            <text:p>1405.2</text:p>
          </table:table-cell>
          <table:table-cell office:value-type="float" office:value="-167.8" calcext:value-type="float">
            <text:p>-167.8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5:56:27.800</text:p>
          </table:table-cell>
          <table:table-cell office:value-type="string" calcext:value-type="string">
            <text:p>2025-09-29 11:56:27.800</text:p>
          </table:table-cell>
          <table:table-cell office:value-type="string" calcext:value-type="string">
            <text:p>SHORT</text:p>
          </table:table-cell>
          <table:table-cell office:value-type="float" office:value="24833" calcext:value-type="float">
            <text:p>24833</text:p>
          </table:table-cell>
          <table:table-cell office:value-type="float" office:value="24823" calcext:value-type="float">
            <text:p>24823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5:56:28.800</text:p>
          </table:table-cell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12.5" calcext:value-type="float">
            <text:p>101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6.7" calcext:value-type="float">
            <text:p>14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02:01.600</text:p>
          </table:table-cell>
          <table:table-cell office:value-type="string" calcext:value-type="string">
            <text:p>2025-09-29 12:02:01.600</text:p>
          </table:table-cell>
          <table:table-cell office:value-type="string" calcext:value-type="string">
            <text:p>SHORT</text:p>
          </table:table-cell>
          <table:table-cell office:value-type="float" office:value="24844" calcext:value-type="float">
            <text:p>24844</text:p>
          </table:table-cell>
          <table:table-cell office:value-type="float" office:value="24834" calcext:value-type="float">
            <text:p>24834</text:p>
          </table:table-cell>
          <table:table-cell office:value-type="float" office:value="24849" calcext:value-type="float">
            <text:p>2484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02:01.700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6:03:30.1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01.8" calcext:value-type="float">
            <text:p>120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04:36.900</text:p>
          </table:table-cell>
          <table:table-cell office:value-type="string" calcext:value-type="string">
            <text:p>2025-09-29 12:04:36.900</text:p>
          </table:table-cell>
          <table:table-cell office:value-type="string" calcext:value-type="string">
            <text:p>SHORT</text:p>
          </table:table-cell>
          <table:table-cell office:value-type="float" office:value="24829.5" calcext:value-type="float">
            <text:p>24829.5</text:p>
          </table:table-cell>
          <table:table-cell office:value-type="float" office:value="24819.5" calcext:value-type="float">
            <text:p>24819.5</text:p>
          </table:table-cell>
          <table:table-cell office:value-type="float" office:value="24834.5" calcext:value-type="float">
            <text:p>2483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04:37.900</text:p>
          </table:table-cell>
          <table:table-cell office:value-type="float" office:value="200" calcext:value-type="float">
            <text:p>20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91.1" calcext:value-type="float">
            <text:p>139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5.3" calcext:value-type="float">
            <text:p>179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09:09.200</text:p>
          </table:table-cell>
          <table:table-cell office:value-type="string" calcext:value-type="string">
            <text:p>2025-09-29 12:09:09.200</text:p>
          </table:table-cell>
          <table:table-cell office:value-type="string" calcext:value-type="string">
            <text:p>LONG</text:p>
          </table:table-cell>
          <table:table-cell office:value-type="float" office:value="24840.5" calcext:value-type="float">
            <text:p>24840.5</text:p>
          </table:table-cell>
          <table:table-cell office:value-type="float" office:value="24850.5" calcext:value-type="float">
            <text:p>24850.5</text:p>
          </table:table-cell>
          <table:table-cell office:value-type="float" office:value="24835.5" calcext:value-type="float">
            <text:p>2483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09:09.50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6:10:16.6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80.4" calcext:value-type="float">
            <text:p>158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4.6" calcext:value-type="float">
            <text:p>198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2:38.400</text:p>
          </table:table-cell>
          <table:table-cell office:value-type="string" calcext:value-type="string">
            <text:p>2025-09-29 12:12:38.400</text:p>
          </table:table-cell>
          <table:table-cell office:value-type="string" calcext:value-type="string">
            <text:p>SHORT</text:p>
          </table:table-cell>
          <table:table-cell office:value-type="float" office:value="24860" calcext:value-type="float">
            <text:p>24860</text:p>
          </table:table-cell>
          <table:table-cell office:value-type="float" office:value="24850" calcext:value-type="float">
            <text:p>24850</text:p>
          </table:table-cell>
          <table:table-cell office:value-type="float" office:value="24865" calcext:value-type="float">
            <text:p>2486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12:38.900</text:p>
          </table:table-cell>
          <table:table-cell office:value-type="float" office:value="90" calcext:value-type="float">
            <text:p>90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6:14:39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69.7" calcext:value-type="float">
            <text:p>1469.7</text:p>
          </table:table-cell>
          <table:table-cell office:value-type="float" office:value="1" calcext:value-type="float">
            <text:p>1</text:p>
          </table:table-cell>
          <table:table-cell office:value-type="float" office:value="1873.9" calcext:value-type="float">
            <text:p>1873.9</text:p>
          </table:table-cell>
          <table:table-cell office:value-type="float" office:value="1984.6" calcext:value-type="float">
            <text:p>1984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6:54.000</text:p>
          </table:table-cell>
          <table:table-cell office:value-type="string" calcext:value-type="string">
            <text:p>2025-09-29 12:16:54.000</text:p>
          </table:table-cell>
          <table:table-cell office:value-type="string" calcext:value-type="string">
            <text:p>LONG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6" calcext:value-type="float">
            <text:p>2484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16:55.0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63.2" calcext:value-type="float">
            <text:p>206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7:29.300</text:p>
          </table:table-cell>
          <table:table-cell office:value-type="string" calcext:value-type="string">
            <text:p>2025-09-29 12:17:29.300</text:p>
          </table:table-cell>
          <table:table-cell office:value-type="string" calcext:value-type="string">
            <text:p>SHORT</text:p>
          </table:table-cell>
          <table:table-cell office:value-type="float" office:value="24841" calcext:value-type="float">
            <text:p>24841</text:p>
          </table:table-cell>
          <table:table-cell office:value-type="float" office:value="24831" calcext:value-type="float">
            <text:p>24831</text:p>
          </table:table-cell>
          <table:table-cell office:value-type="float" office:value="24846" calcext:value-type="float">
            <text:p>2484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17:29.400</text:p>
          </table:table-cell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6:17:50.9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48.3" calcext:value-type="float">
            <text:p>184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2.5" calcext:value-type="float">
            <text:p>22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8:12.500</text:p>
          </table:table-cell>
          <table:table-cell office:value-type="string" calcext:value-type="string">
            <text:p>2025-09-29 12:18:12.500</text:p>
          </table:table-cell>
          <table:table-cell office:value-type="string" calcext:value-type="string">
            <text:p>LONG</text:p>
          </table:table-cell>
          <table:table-cell office:value-type="float" office:value="24834.5" calcext:value-type="float">
            <text:p>24834.5</text:p>
          </table:table-cell>
          <table:table-cell office:value-type="float" office:value="24844.5" calcext:value-type="float">
            <text:p>24844.5</text:p>
          </table:table-cell>
          <table:table-cell office:value-type="float" office:value="24829.5" calcext:value-type="float">
            <text:p>2482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18:14.30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37.6" calcext:value-type="float">
            <text:p>1737.6</text:p>
          </table:table-cell>
          <table:table-cell office:value-type="float" office:value="1" calcext:value-type="float">
            <text:p>1</text:p>
          </table:table-cell>
          <table:table-cell office:value-type="float" office:value="2141.8" calcext:value-type="float">
            <text:p>2141.8</text:p>
          </table:table-cell>
          <table:table-cell office:value-type="float" office:value="2252.5" calcext:value-type="float">
            <text:p>2252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8:21.900</text:p>
          </table:table-cell>
          <table:table-cell office:value-type="string" calcext:value-type="string">
            <text:p>2025-09-29 12:18:21.900</text:p>
          </table:table-cell>
          <table:table-cell office:value-type="string" calcext:value-type="string">
            <text:p>LONG</text:p>
          </table:table-cell>
          <table:table-cell office:value-type="float" office:value="24835.5" calcext:value-type="float">
            <text:p>24835.5</text:p>
          </table:table-cell>
          <table:table-cell office:value-type="float" office:value="24845.5" calcext:value-type="float">
            <text:p>24845.5</text:p>
          </table:table-cell>
          <table:table-cell office:value-type="float" office:value="24830.5" calcext:value-type="float">
            <text:p>2483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18:26.20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26.9" calcext:value-type="float">
            <text:p>1626.9</text:p>
          </table:table-cell>
          <table:table-cell office:value-type="float" office:value="2" calcext:value-type="float">
            <text:p>2</text:p>
          </table:table-cell>
          <table:table-cell office:value-type="float" office:value="2031.1" calcext:value-type="float">
            <text:p>2031.1</text:p>
          </table:table-cell>
          <table:table-cell office:value-type="float" office:value="2252.5" calcext:value-type="float">
            <text:p>2252.5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8:53.700</text:p>
          </table:table-cell>
          <table:table-cell office:value-type="string" calcext:value-type="string">
            <text:p>2025-09-29 12:18:53.700</text:p>
          </table:table-cell>
          <table:table-cell office:value-type="string" calcext:value-type="string">
            <text:p>LONG</text:p>
          </table:table-cell>
          <table:table-cell office:value-type="float" office:value="24838.5" calcext:value-type="float">
            <text:p>24838.5</text:p>
          </table:table-cell>
          <table:table-cell office:value-type="float" office:value="24848.5" calcext:value-type="float">
            <text:p>24848.5</text:p>
          </table:table-cell>
          <table:table-cell office:value-type="float" office:value="24833.5" calcext:value-type="float">
            <text:p>2483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6:18:54.70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11.2" calcext:value-type="float">
            <text:p>1511.2</text:p>
          </table:table-cell>
          <table:table-cell office:value-type="float" office:value="3" calcext:value-type="float">
            <text:p>3</text:p>
          </table:table-cell>
          <table:table-cell office:value-type="float" office:value="1915.4" calcext:value-type="float">
            <text:p>1915.4</text:p>
          </table:table-cell>
          <table:table-cell office:value-type="float" office:value="2252.5" calcext:value-type="float">
            <text:p>2252.5</text:p>
          </table:table-cell>
          <table:table-cell office:value-type="float" office:value="-337.1" calcext:value-type="float">
            <text:p>-337.1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19:16.600</text:p>
          </table:table-cell>
          <table:table-cell office:value-type="string" calcext:value-type="string">
            <text:p>2025-09-29 12:19:16.600</text:p>
          </table:table-cell>
          <table:table-cell office:value-type="string" calcext:value-type="string">
            <text:p>SHORT</text:p>
          </table:table-cell>
          <table:table-cell office:value-type="float" office:value="24849" calcext:value-type="float">
            <text:p>24849</text:p>
          </table:table-cell>
          <table:table-cell office:value-type="float" office:value="24839" calcext:value-type="float">
            <text:p>24839</text:p>
          </table:table-cell>
          <table:table-cell office:value-type="float" office:value="24854" calcext:value-type="float">
            <text:p>2485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19:19.000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00.5" calcext:value-type="float">
            <text:p>1700.5</text:p>
          </table:table-cell>
          <table:table-cell office:value-type="float" office:value="0" calcext:value-type="float">
            <text:p>0</text:p>
          </table:table-cell>
          <table:table-cell office:value-type="float" office:value="2104.7" calcext:value-type="float">
            <text:p>2104.7</text:p>
          </table:table-cell>
          <table:table-cell office:value-type="float" office:value="2252.5" calcext:value-type="float">
            <text:p>2252.5</text:p>
          </table:table-cell>
          <table:table-cell office:value-type="float" office:value="-147.8" calcext:value-type="float">
            <text:p>-147.8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20:25.600</text:p>
          </table:table-cell>
          <table:table-cell office:value-type="string" calcext:value-type="string">
            <text:p>2025-09-29 12:20:25.600</text:p>
          </table:table-cell>
          <table:table-cell office:value-type="string" calcext:value-type="string">
            <text:p>SHORT</text:p>
          </table:table-cell>
          <table:table-cell office:value-type="float" office:value="24852" calcext:value-type="float">
            <text:p>24852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7" calcext:value-type="float">
            <text:p>2485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6:20:26.600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6:21:22.6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84.8" calcext:value-type="float">
            <text:p>188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22:02.200</text:p>
          </table:table-cell>
          <table:table-cell office:value-type="string" calcext:value-type="string">
            <text:p>2025-09-29 12:22:02.200</text:p>
          </table:table-cell>
          <table:table-cell office:value-type="string" calcext:value-type="string">
            <text:p>SHORT</text:p>
          </table:table-cell>
          <table:table-cell office:value-type="float" office:value="24845.5" calcext:value-type="float">
            <text:p>24845.5</text:p>
          </table:table-cell>
          <table:table-cell office:value-type="float" office:value="24835.5" calcext:value-type="float">
            <text:p>24835.5</text:p>
          </table:table-cell>
          <table:table-cell office:value-type="float" office:value="24850.5" calcext:value-type="float">
            <text:p>2485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6:22:03.200</text:p>
          </table:table-cell>
          <table:table-cell office:value-type="float" office:value="71" calcext:value-type="float">
            <text:p>7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69.1" calcext:value-type="float">
            <text:p>206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73.3" calcext:value-type="float">
            <text:p>247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24:44.700</text:p>
          </table:table-cell>
          <table:table-cell office:value-type="string" calcext:value-type="string">
            <text:p>2025-09-29 12:24:44.700</text:p>
          </table:table-cell>
          <table:table-cell office:value-type="string" calcext:value-type="string">
            <text:p>SHORT</text:p>
          </table:table-cell>
          <table:table-cell office:value-type="float" office:value="24854.75" calcext:value-type="float">
            <text:p>24854.75</text:p>
          </table:table-cell>
          <table:table-cell office:value-type="float" office:value="24844.75" calcext:value-type="float">
            <text:p>24844.75</text:p>
          </table:table-cell>
          <table:table-cell office:value-type="float" office:value="24859.75" calcext:value-type="float">
            <text:p>2485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24:48.700</text:p>
          </table:table-cell>
          <table:table-cell office:value-type="float" office:value="224" calcext:value-type="float">
            <text:p>22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58.4" calcext:value-type="float">
            <text:p>2258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2.6" calcext:value-type="float">
            <text:p>266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31:15.400</text:p>
          </table:table-cell>
          <table:table-cell office:value-type="string" calcext:value-type="string">
            <text:p>2025-09-29 12:31:15.400</text:p>
          </table:table-cell>
          <table:table-cell office:value-type="string" calcext:value-type="string">
            <text:p>LONG</text:p>
          </table:table-cell>
          <table:table-cell office:value-type="float" office:value="24860.5" calcext:value-type="float">
            <text:p>24860.5</text:p>
          </table:table-cell>
          <table:table-cell office:value-type="float" office:value="24870.5" calcext:value-type="float">
            <text:p>24870.5</text:p>
          </table:table-cell>
          <table:table-cell office:value-type="float" office:value="24855.5" calcext:value-type="float">
            <text:p>2485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31:16.500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47.7" calcext:value-type="float">
            <text:p>2447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1.9" calcext:value-type="float">
            <text:p>285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34:21.300</text:p>
          </table:table-cell>
          <table:table-cell office:value-type="string" calcext:value-type="string">
            <text:p>2025-09-29 12:34:21.300</text:p>
          </table:table-cell>
          <table:table-cell office:value-type="string" calcext:value-type="string">
            <text:p>LONG</text:p>
          </table:table-cell>
          <table:table-cell office:value-type="float" office:value="24856.75" calcext:value-type="float">
            <text:p>24856.75</text:p>
          </table:table-cell>
          <table:table-cell office:value-type="float" office:value="24866.75" calcext:value-type="float">
            <text:p>24866.75</text:p>
          </table:table-cell>
          <table:table-cell office:value-type="float" office:value="24851.75" calcext:value-type="float">
            <text:p>2485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6:34:22.300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36.2" calcext:value-type="float">
            <text:p>303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35:24.700</text:p>
          </table:table-cell>
          <table:table-cell office:value-type="string" calcext:value-type="string">
            <text:p>2025-09-29 12:35:24.700</text:p>
          </table:table-cell>
          <table:table-cell office:value-type="string" calcext:value-type="string">
            <text:p>LONG</text:p>
          </table:table-cell>
          <table:table-cell office:value-type="float" office:value="24853.25" calcext:value-type="float">
            <text:p>24853.25</text:p>
          </table:table-cell>
          <table:table-cell office:value-type="float" office:value="24863.25" calcext:value-type="float">
            <text:p>24863.25</text:p>
          </table:table-cell>
          <table:table-cell office:value-type="float" office:value="24848.25" calcext:value-type="float">
            <text:p>2484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6:35:25.70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6:37:02.8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16.3" calcext:value-type="float">
            <text:p>2516.3</text:p>
          </table:table-cell>
          <table:table-cell office:value-type="float" office:value="1" calcext:value-type="float">
            <text:p>1</text:p>
          </table:table-cell>
          <table:table-cell office:value-type="float" office:value="2920.5" calcext:value-type="float">
            <text:p>2920.5</text:p>
          </table:table-cell>
          <table:table-cell office:value-type="float" office:value="3036.2" calcext:value-type="float">
            <text:p>3036.2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37:46.200</text:p>
          </table:table-cell>
          <table:table-cell office:value-type="string" calcext:value-type="string">
            <text:p>2025-09-29 12:37:46.200</text:p>
          </table:table-cell>
          <table:table-cell office:value-type="string" calcext:value-type="string">
            <text:p>LONG</text:p>
          </table:table-cell>
          <table:table-cell office:value-type="float" office:value="24851.25" calcext:value-type="float">
            <text:p>24851.25</text:p>
          </table:table-cell>
          <table:table-cell office:value-type="float" office:value="24861.25" calcext:value-type="float">
            <text:p>24861.25</text:p>
          </table:table-cell>
          <table:table-cell office:value-type="float" office:value="24846.25" calcext:value-type="float">
            <text:p>2484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37:48.2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6:42:01.8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705.6" calcext:value-type="float">
            <text:p>2705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9.8" calcext:value-type="float">
            <text:p>310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6:53:57.000</text:p>
          </table:table-cell>
          <table:table-cell office:value-type="string" calcext:value-type="string">
            <text:p>2025-09-29 12:53:57.000</text:p>
          </table:table-cell>
          <table:table-cell office:value-type="string" calcext:value-type="string">
            <text:p>SHORT</text:p>
          </table:table-cell>
          <table:table-cell office:value-type="float" office:value="24829.75" calcext:value-type="float">
            <text:p>24829.75</text:p>
          </table:table-cell>
          <table:table-cell office:value-type="float" office:value="24819.75" calcext:value-type="float">
            <text:p>24819.75</text:p>
          </table:table-cell>
          <table:table-cell office:value-type="float" office:value="24834.75" calcext:value-type="float">
            <text:p>2483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6:54:00.10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6:59:34.8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94.9" calcext:value-type="float">
            <text:p>2594.9</text:p>
          </table:table-cell>
          <table:table-cell office:value-type="float" office:value="1" calcext:value-type="float">
            <text:p>1</text:p>
          </table:table-cell>
          <table:table-cell office:value-type="float" office:value="2999.1" calcext:value-type="float">
            <text:p>2999.1</text:p>
          </table:table-cell>
          <table:table-cell office:value-type="float" office:value="3109.8" calcext:value-type="float">
            <text:p>3109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0:59.600</text:p>
          </table:table-cell>
          <table:table-cell office:value-type="string" calcext:value-type="string">
            <text:p>2025-09-29 13:00:59.600</text:p>
          </table:table-cell>
          <table:table-cell office:value-type="string" calcext:value-type="string">
            <text:p>SHORT</text:p>
          </table:table-cell>
          <table:table-cell office:value-type="float" office:value="24830.75" calcext:value-type="float">
            <text:p>24830.75</text:p>
          </table:table-cell>
          <table:table-cell office:value-type="float" office:value="24820.75" calcext:value-type="float">
            <text:p>24820.75</text:p>
          </table:table-cell>
          <table:table-cell office:value-type="float" office:value="24835.75" calcext:value-type="float">
            <text:p>2483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01:00.600</text:p>
          </table:table-cell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79.2" calcext:value-type="float">
            <text:p>2479.2</text:p>
          </table:table-cell>
          <table:table-cell office:value-type="float" office:value="2" calcext:value-type="float">
            <text:p>2</text:p>
          </table:table-cell>
          <table:table-cell office:value-type="float" office:value="2883.4" calcext:value-type="float">
            <text:p>2883.4</text:p>
          </table:table-cell>
          <table:table-cell office:value-type="float" office:value="3109.8" calcext:value-type="float">
            <text:p>3109.8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1:31.100</text:p>
          </table:table-cell>
          <table:table-cell office:value-type="string" calcext:value-type="string">
            <text:p>2025-09-29 13:01:31.100</text:p>
          </table:table-cell>
          <table:table-cell office:value-type="string" calcext:value-type="string">
            <text:p>SHORT</text:p>
          </table:table-cell>
          <table:table-cell office:value-type="float" office:value="24827.25" calcext:value-type="float">
            <text:p>24827.25</text:p>
          </table:table-cell>
          <table:table-cell office:value-type="float" office:value="24817.25" calcext:value-type="float">
            <text:p>24817.25</text:p>
          </table:table-cell>
          <table:table-cell office:value-type="float" office:value="24832.25" calcext:value-type="float">
            <text:p>2483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01:32.100</text:p>
          </table:table-cell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7:02:27.2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58.5" calcext:value-type="float">
            <text:p>2658.5</text:p>
          </table:table-cell>
          <table:table-cell office:value-type="float" office:value="0" calcext:value-type="float">
            <text:p>0</text:p>
          </table:table-cell>
          <table:table-cell office:value-type="float" office:value="3062.7" calcext:value-type="float">
            <text:p>3062.7</text:p>
          </table:table-cell>
          <table:table-cell office:value-type="float" office:value="3109.8" calcext:value-type="float">
            <text:p>3109.8</text:p>
          </table:table-cell>
          <table:table-cell office:value-type="float" office:value="-47.0999999999995" calcext:value-type="float">
            <text:p>-47.099999999999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3:21.700</text:p>
          </table:table-cell>
          <table:table-cell office:value-type="string" calcext:value-type="string">
            <text:p>2025-09-29 13:03:21.700</text:p>
          </table:table-cell>
          <table:table-cell office:value-type="string" calcext:value-type="string">
            <text:p>SHORT</text:p>
          </table:table-cell>
          <table:table-cell office:value-type="float" office:value="24805.25" calcext:value-type="float">
            <text:p>24805.25</text:p>
          </table:table-cell>
          <table:table-cell office:value-type="float" office:value="24795.25" calcext:value-type="float">
            <text:p>24795.25</text:p>
          </table:table-cell>
          <table:table-cell office:value-type="float" office:value="24810.25" calcext:value-type="float">
            <text:p>248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03:23.100</text:p>
          </table:table-cell>
          <table:table-cell office:value-type="float" office:value="283" calcext:value-type="float">
            <text:p>28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47.8" calcext:value-type="float">
            <text:p>2847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4:21.300</text:p>
          </table:table-cell>
          <table:table-cell office:value-type="string" calcext:value-type="string">
            <text:p>2025-09-29 13:04:21.300</text:p>
          </table:table-cell>
          <table:table-cell office:value-type="string" calcext:value-type="string">
            <text:p>SHORT</text:p>
          </table:table-cell>
          <table:table-cell office:value-type="float" office:value="24810" calcext:value-type="float">
            <text:p>2481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15" calcext:value-type="float">
            <text:p>2481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04:22.200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37.1" calcext:value-type="float">
            <text:p>3037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41.3" calcext:value-type="float">
            <text:p>344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6:09.700</text:p>
          </table:table-cell>
          <table:table-cell office:value-type="string" calcext:value-type="string">
            <text:p>2025-09-29 13:06:09.700</text:p>
          </table:table-cell>
          <table:table-cell office:value-type="string" calcext:value-type="string">
            <text:p>SHORT</text:p>
          </table:table-cell>
          <table:table-cell office:value-type="float" office:value="24822.25" calcext:value-type="float">
            <text:p>24822.25</text:p>
          </table:table-cell>
          <table:table-cell office:value-type="float" office:value="24812.25" calcext:value-type="float">
            <text:p>24812.25</text:p>
          </table:table-cell>
          <table:table-cell office:value-type="float" office:value="24827.25" calcext:value-type="float">
            <text:p>2482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06:09.90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26.4" calcext:value-type="float">
            <text:p>3226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30.6" calcext:value-type="float">
            <text:p>36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6:35.100</text:p>
          </table:table-cell>
          <table:table-cell office:value-type="string" calcext:value-type="string">
            <text:p>2025-09-29 13:06:35.100</text:p>
          </table:table-cell>
          <table:table-cell office:value-type="string" calcext:value-type="string">
            <text:p>SHORT</text:p>
          </table:table-cell>
          <table:table-cell office:value-type="float" office:value="24821" calcext:value-type="float">
            <text:p>24821</text:p>
          </table:table-cell>
          <table:table-cell office:value-type="float" office:value="24811" calcext:value-type="float">
            <text:p>24811</text:p>
          </table:table-cell>
          <table:table-cell office:value-type="float" office:value="24826" calcext:value-type="float">
            <text:p>2482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06:36.100</text:p>
          </table:table-cell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10.7" calcext:value-type="float">
            <text:p>341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4.9" calcext:value-type="float">
            <text:p>381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8:16.900</text:p>
          </table:table-cell>
          <table:table-cell office:value-type="string" calcext:value-type="string">
            <text:p>2025-09-29 13:08:16.900</text:p>
          </table:table-cell>
          <table:table-cell office:value-type="string" calcext:value-type="string">
            <text:p>SHORT</text:p>
          </table:table-cell>
          <table:table-cell office:value-type="float" office:value="24825.25" calcext:value-type="float">
            <text:p>24825.25</text:p>
          </table:table-cell>
          <table:table-cell office:value-type="float" office:value="24815.25" calcext:value-type="float">
            <text:p>24815.25</text:p>
          </table:table-cell>
          <table:table-cell office:value-type="float" office:value="24830.25" calcext:value-type="float">
            <text:p>2483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08:18.2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4.2" calcext:value-type="float">
            <text:p>400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8:59.800</text:p>
          </table:table-cell>
          <table:table-cell office:value-type="string" calcext:value-type="string">
            <text:p>2025-09-29 13:08:59.800</text:p>
          </table:table-cell>
          <table:table-cell office:value-type="string" calcext:value-type="string">
            <text:p>LONG</text:p>
          </table:table-cell>
          <table:table-cell office:value-type="float" office:value="24827.5" calcext:value-type="float">
            <text:p>24827.5</text:p>
          </table:table-cell>
          <table:table-cell office:value-type="float" office:value="24837.5" calcext:value-type="float">
            <text:p>24837.5</text:p>
          </table:table-cell>
          <table:table-cell office:value-type="float" office:value="24822.5" calcext:value-type="float">
            <text:p>2482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09:00.80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784.3" calcext:value-type="float">
            <text:p>3784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88.5" calcext:value-type="float">
            <text:p>41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09:24.500</text:p>
          </table:table-cell>
          <table:table-cell office:value-type="string" calcext:value-type="string">
            <text:p>2025-09-29 13:09:24.500</text:p>
          </table:table-cell>
          <table:table-cell office:value-type="string" calcext:value-type="string">
            <text:p>SHORT</text:p>
          </table:table-cell>
          <table:table-cell office:value-type="float" office:value="24829" calcext:value-type="float">
            <text:p>24829</text:p>
          </table:table-cell>
          <table:table-cell office:value-type="float" office:value="24819" calcext:value-type="float">
            <text:p>24819</text:p>
          </table:table-cell>
          <table:table-cell office:value-type="float" office:value="24834" calcext:value-type="float">
            <text:p>2483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09:25.800</text:p>
          </table:table-cell>
          <table:table-cell office:value-type="float" office:value="96" calcext:value-type="float">
            <text:p>96</text:p>
          </table:table-cell>
          <table:table-cell office:value-type="float" office:value="-25" calcext:value-type="float">
            <text:p>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7:11:23.1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73.6" calcext:value-type="float">
            <text:p>3673.6</text:p>
          </table:table-cell>
          <table:table-cell office:value-type="float" office:value="1" calcext:value-type="float">
            <text:p>1</text:p>
          </table:table-cell>
          <table:table-cell office:value-type="float" office:value="4077.8" calcext:value-type="float">
            <text:p>4077.8</text:p>
          </table:table-cell>
          <table:table-cell office:value-type="float" office:value="4188.5" calcext:value-type="float">
            <text:p>4188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12:44.200</text:p>
          </table:table-cell>
          <table:table-cell office:value-type="string" calcext:value-type="string">
            <text:p>2025-09-29 13:12:44.200</text:p>
          </table:table-cell>
          <table:table-cell office:value-type="string" calcext:value-type="string">
            <text:p>SHORT</text:p>
          </table:table-cell>
          <table:table-cell office:value-type="float" office:value="24828.25" calcext:value-type="float">
            <text:p>24828.25</text:p>
          </table:table-cell>
          <table:table-cell office:value-type="float" office:value="24818.25" calcext:value-type="float">
            <text:p>24818.25</text:p>
          </table:table-cell>
          <table:table-cell office:value-type="float" office:value="24833.25" calcext:value-type="float">
            <text:p>2483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12:45.6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7:14:42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62.9" calcext:value-type="float">
            <text:p>386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67.1" calcext:value-type="float">
            <text:p>426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18:52.100</text:p>
          </table:table-cell>
          <table:table-cell office:value-type="string" calcext:value-type="string">
            <text:p>2025-09-29 13:18:52.100</text:p>
          </table:table-cell>
          <table:table-cell office:value-type="string" calcext:value-type="string">
            <text:p>SHORT</text:p>
          </table:table-cell>
          <table:table-cell office:value-type="float" office:value="24834.75" calcext:value-type="float">
            <text:p>24834.75</text:p>
          </table:table-cell>
          <table:table-cell office:value-type="float" office:value="24824.75" calcext:value-type="float">
            <text:p>24824.75</text:p>
          </table:table-cell>
          <table:table-cell office:value-type="float" office:value="24839.75" calcext:value-type="float">
            <text:p>2483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18:52.900</text:p>
          </table:table-cell>
          <table:table-cell office:value-type="float" office:value="57" calcext:value-type="float">
            <text:p>5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7:20:45.4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052.2" calcext:value-type="float">
            <text:p>405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56.4" calcext:value-type="float">
            <text:p>445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22:39.700</text:p>
          </table:table-cell>
          <table:table-cell office:value-type="string" calcext:value-type="string">
            <text:p>2025-09-29 13:22:39.700</text:p>
          </table:table-cell>
          <table:table-cell office:value-type="string" calcext:value-type="string">
            <text:p>SHORT</text:p>
          </table:table-cell>
          <table:table-cell office:value-type="float" office:value="24828.5" calcext:value-type="float">
            <text:p>24828.5</text:p>
          </table:table-cell>
          <table:table-cell office:value-type="float" office:value="24818.5" calcext:value-type="float">
            <text:p>24818.5</text:p>
          </table:table-cell>
          <table:table-cell office:value-type="float" office:value="24833.5" calcext:value-type="float">
            <text:p>2483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22:40.700</text:p>
          </table:table-cell>
          <table:table-cell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7:23:49.7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936.5" calcext:value-type="float">
            <text:p>3936.5</text:p>
          </table:table-cell>
          <table:table-cell office:value-type="float" office:value="1" calcext:value-type="float">
            <text:p>1</text:p>
          </table:table-cell>
          <table:table-cell office:value-type="float" office:value="4340.7" calcext:value-type="float">
            <text:p>4340.7</text:p>
          </table:table-cell>
          <table:table-cell office:value-type="float" office:value="4456.4" calcext:value-type="float">
            <text:p>4456.4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27:45.400</text:p>
          </table:table-cell>
          <table:table-cell office:value-type="string" calcext:value-type="string">
            <text:p>2025-09-29 13:27:45.400</text:p>
          </table:table-cell>
          <table:table-cell office:value-type="string" calcext:value-type="string">
            <text:p>SHORT</text:p>
          </table:table-cell>
          <table:table-cell office:value-type="float" office:value="24833.25" calcext:value-type="float">
            <text:p>24833.25</text:p>
          </table:table-cell>
          <table:table-cell office:value-type="float" office:value="24823.25" calcext:value-type="float">
            <text:p>24823.25</text:p>
          </table:table-cell>
          <table:table-cell office:value-type="float" office:value="24838.25" calcext:value-type="float">
            <text:p>2483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27:46.400</text:p>
          </table:table-cell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15.8" calcext:value-type="float">
            <text:p>3815.8</text:p>
          </table:table-cell>
          <table:table-cell office:value-type="float" office:value="2" calcext:value-type="float">
            <text:p>2</text:p>
          </table:table-cell>
          <table:table-cell office:value-type="float" office:value="4220" calcext:value-type="float">
            <text:p>4220</text:p>
          </table:table-cell>
          <table:table-cell office:value-type="float" office:value="4456.4" calcext:value-type="float">
            <text:p>4456.4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27:59.400</text:p>
          </table:table-cell>
          <table:table-cell office:value-type="string" calcext:value-type="string">
            <text:p>2025-09-29 13:27:59.400</text:p>
          </table:table-cell>
          <table:table-cell office:value-type="string" calcext:value-type="string">
            <text:p>SHORT</text:p>
          </table:table-cell>
          <table:table-cell office:value-type="float" office:value="24828.75" calcext:value-type="float">
            <text:p>24828.75</text:p>
          </table:table-cell>
          <table:table-cell office:value-type="float" office:value="24818.75" calcext:value-type="float">
            <text:p>24818.75</text:p>
          </table:table-cell>
          <table:table-cell office:value-type="float" office:value="24833.75" calcext:value-type="float">
            <text:p>24833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28:01.500</text:p>
          </table:table-cell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7:29:38.7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705.1" calcext:value-type="float">
            <text:p>3705.1</text:p>
          </table:table-cell>
          <table:table-cell office:value-type="float" office:value="3" calcext:value-type="float">
            <text:p>3</text:p>
          </table:table-cell>
          <table:table-cell office:value-type="float" office:value="4109.3" calcext:value-type="float">
            <text:p>4109.3</text:p>
          </table:table-cell>
          <table:table-cell office:value-type="float" office:value="4456.4" calcext:value-type="float">
            <text:p>4456.4</text:p>
          </table:table-cell>
          <table:table-cell office:value-type="float" office:value="-347.099999999999" calcext:value-type="float">
            <text:p>-347.099999999999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34:02.300</text:p>
          </table:table-cell>
          <table:table-cell office:value-type="string" calcext:value-type="string">
            <text:p>2025-09-29 13:34:02.300</text:p>
          </table:table-cell>
          <table:table-cell office:value-type="string" calcext:value-type="string">
            <text:p>SHORT</text:p>
          </table:table-cell>
          <table:table-cell office:value-type="float" office:value="24830.75" calcext:value-type="float">
            <text:p>24830.75</text:p>
          </table:table-cell>
          <table:table-cell office:value-type="float" office:value="24820.75" calcext:value-type="float">
            <text:p>24820.75</text:p>
          </table:table-cell>
          <table:table-cell office:value-type="float" office:value="24835.75" calcext:value-type="float">
            <text:p>2483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34:03.300</text:p>
          </table:table-cell>
          <table:table-cell office:value-type="float" office:value="220" calcext:value-type="float">
            <text:p>22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7:36:07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74.4" calcext:value-type="float">
            <text:p>3874.4</text:p>
          </table:table-cell>
          <table:table-cell office:value-type="float" office:value="0" calcext:value-type="float">
            <text:p>0</text:p>
          </table:table-cell>
          <table:table-cell office:value-type="float" office:value="4278.6" calcext:value-type="float">
            <text:p>4278.6</text:p>
          </table:table-cell>
          <table:table-cell office:value-type="float" office:value="4456.4" calcext:value-type="float">
            <text:p>4456.4</text:p>
          </table:table-cell>
          <table:table-cell office:value-type="float" office:value="-177.799999999999" calcext:value-type="float">
            <text:p>-177.799999999999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50:38.900</text:p>
          </table:table-cell>
          <table:table-cell office:value-type="string" calcext:value-type="string">
            <text:p>2025-09-29 13:50:38.900</text:p>
          </table:table-cell>
          <table:table-cell office:value-type="string" calcext:value-type="string">
            <text:p>SHORT</text:p>
          </table:table-cell>
          <table:table-cell office:value-type="float" office:value="24825.5" calcext:value-type="float">
            <text:p>24825.5</text:p>
          </table:table-cell>
          <table:table-cell office:value-type="float" office:value="24815.5" calcext:value-type="float">
            <text:p>24815.5</text:p>
          </table:table-cell>
          <table:table-cell office:value-type="float" office:value="24830.5" calcext:value-type="float">
            <text:p>2483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7:50:39.900</text:p>
          </table:table-cell>
          <table:table-cell office:value-type="float" office:value="69" calcext:value-type="float">
            <text:p>69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058.7" calcext:value-type="float">
            <text:p>405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62.9" calcext:value-type="float">
            <text:p>446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7:51:42.800</text:p>
          </table:table-cell>
          <table:table-cell office:value-type="string" calcext:value-type="string">
            <text:p>2025-09-29 13:51:42.800</text:p>
          </table:table-cell>
          <table:table-cell office:value-type="string" calcext:value-type="string">
            <text:p>SHORT</text:p>
          </table:table-cell>
          <table:table-cell office:value-type="float" office:value="24837.25" calcext:value-type="float">
            <text:p>24837.25</text:p>
          </table:table-cell>
          <table:table-cell office:value-type="float" office:value="24827.25" calcext:value-type="float">
            <text:p>24827.25</text:p>
          </table:table-cell>
          <table:table-cell office:value-type="float" office:value="24842.25" calcext:value-type="float">
            <text:p>2484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7:51:43.600</text:p>
          </table:table-cell>
          <table:table-cell office:value-type="float" office:value="69" calcext:value-type="float">
            <text:p>69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248" calcext:value-type="float">
            <text:p>4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52.2" calcext:value-type="float">
            <text:p>465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00:17.600</text:p>
          </table:table-cell>
          <table:table-cell office:value-type="string" calcext:value-type="string">
            <text:p>2025-09-29 14:00:17.600</text:p>
          </table:table-cell>
          <table:table-cell office:value-type="string" calcext:value-type="string">
            <text:p>SHORT</text:p>
          </table:table-cell>
          <table:table-cell office:value-type="float" office:value="24843.25" calcext:value-type="float">
            <text:p>24843.25</text:p>
          </table:table-cell>
          <table:table-cell office:value-type="float" office:value="24833.25" calcext:value-type="float">
            <text:p>24833.25</text:p>
          </table:table-cell>
          <table:table-cell office:value-type="float" office:value="24848.25" calcext:value-type="float">
            <text:p>2484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8:00:19.900</text:p>
          </table:table-cell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437.3" calcext:value-type="float">
            <text:p>4437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41.50000000001" calcext:value-type="float">
            <text:p>4841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08:02.000</text:p>
          </table:table-cell>
          <table:table-cell office:value-type="string" calcext:value-type="string">
            <text:p>2025-09-29 14:08:02.000</text:p>
          </table:table-cell>
          <table:table-cell office:value-type="string" calcext:value-type="string">
            <text:p>SHORT</text:p>
          </table:table-cell>
          <table:table-cell office:value-type="float" office:value="24848.75" calcext:value-type="float">
            <text:p>24848.75</text:p>
          </table:table-cell>
          <table:table-cell office:value-type="float" office:value="24838.75" calcext:value-type="float">
            <text:p>24838.75</text:p>
          </table:table-cell>
          <table:table-cell office:value-type="float" office:value="24853.75" calcext:value-type="float">
            <text:p>2485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8:08:03.000</text:p>
          </table:table-cell>
          <table:table-cell office:value-type="float" office:value="97" calcext:value-type="float">
            <text:p>9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621.6" calcext:value-type="float">
            <text:p>462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25.80000000001" calcext:value-type="float">
            <text:p>5025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09:17.000</text:p>
          </table:table-cell>
          <table:table-cell office:value-type="string" calcext:value-type="string">
            <text:p>2025-09-29 14:09:17.000</text:p>
          </table:table-cell>
          <table:table-cell office:value-type="string" calcext:value-type="string">
            <text:p>LONG</text:p>
          </table:table-cell>
          <table:table-cell office:value-type="float" office:value="24845" calcext:value-type="float">
            <text:p>24845</text:p>
          </table:table-cell>
          <table:table-cell office:value-type="float" office:value="24855" calcext:value-type="float">
            <text:p>24855</text:p>
          </table:table-cell>
          <table:table-cell office:value-type="float" office:value="24840" calcext:value-type="float">
            <text:p>2484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8:09:18.000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8:09:51.4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500.9" calcext:value-type="float">
            <text:p>4500.9</text:p>
          </table:table-cell>
          <table:table-cell office:value-type="float" office:value="1" calcext:value-type="float">
            <text:p>1</text:p>
          </table:table-cell>
          <table:table-cell office:value-type="float" office:value="4905.10000000001" calcext:value-type="float">
            <text:p>4905.10000000001</text:p>
          </table:table-cell>
          <table:table-cell office:value-type="float" office:value="5025.80000000001" calcext:value-type="float">
            <text:p>5025.8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12:00.600</text:p>
          </table:table-cell>
          <table:table-cell office:value-type="string" calcext:value-type="string">
            <text:p>2025-09-29 14:12:00.600</text:p>
          </table:table-cell>
          <table:table-cell office:value-type="string" calcext:value-type="string">
            <text:p>SHORT</text:p>
          </table:table-cell>
          <table:table-cell office:value-type="float" office:value="24851.25" calcext:value-type="float">
            <text:p>24851.25</text:p>
          </table:table-cell>
          <table:table-cell office:value-type="float" office:value="24841.25" calcext:value-type="float">
            <text:p>24841.25</text:p>
          </table:table-cell>
          <table:table-cell office:value-type="float" office:value="24856.25" calcext:value-type="float">
            <text:p>2485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8:12:01.600</text:p>
          </table:table-cell>
          <table:table-cell office:value-type="float" office:value="155" calcext:value-type="float">
            <text:p>155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680.2" calcext:value-type="float">
            <text:p>468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4.40000000001" calcext:value-type="float">
            <text:p>5084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13:23.500</text:p>
          </table:table-cell>
          <table:table-cell office:value-type="string" calcext:value-type="string">
            <text:p>2025-09-29 14:13:23.500</text:p>
          </table:table-cell>
          <table:table-cell office:value-type="string" calcext:value-type="string">
            <text:p>SHORT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8" calcext:value-type="float">
            <text:p>24848</text:p>
          </table:table-cell>
          <table:table-cell office:value-type="float" office:value="24863" calcext:value-type="float">
            <text:p>2486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8:13:24.500</text:p>
          </table:table-cell>
          <table:table-cell office:value-type="float" office:value="97" calcext:value-type="float">
            <text:p>9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64.50000000001" calcext:value-type="float">
            <text:p>4864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8.70000000001" calcext:value-type="float">
            <text:p>5268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25:40.600</text:p>
          </table:table-cell>
          <table:table-cell office:value-type="string" calcext:value-type="string">
            <text:p>2025-09-29 14:25:40.600</text:p>
          </table:table-cell>
          <table:table-cell office:value-type="string" calcext:value-type="string">
            <text:p>SHORT</text:p>
          </table:table-cell>
          <table:table-cell office:value-type="float" office:value="24866.25" calcext:value-type="float">
            <text:p>24866.25</text:p>
          </table:table-cell>
          <table:table-cell office:value-type="float" office:value="24856.25" calcext:value-type="float">
            <text:p>24856.25</text:p>
          </table:table-cell>
          <table:table-cell office:value-type="float" office:value="24871.25" calcext:value-type="float">
            <text:p>2487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8:25:41.600</text:p>
          </table:table-cell>
          <table:table-cell office:value-type="float" office:value="140" calcext:value-type="float">
            <text:p>14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43.80000000001" calcext:value-type="float">
            <text:p>4743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5148.00000000001" calcext:value-type="float">
            <text:p>5148.00000000001</text:p>
          </table:table-cell>
          <table:table-cell office:value-type="float" office:value="5268.70000000001" calcext:value-type="float">
            <text:p>5268.7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33:02.200</text:p>
          </table:table-cell>
          <table:table-cell office:value-type="string" calcext:value-type="string">
            <text:p>2025-09-29 14:33:02.200</text:p>
          </table:table-cell>
          <table:table-cell office:value-type="string" calcext:value-type="string">
            <text:p>SHORT</text:p>
          </table:table-cell>
          <table:table-cell office:value-type="float" office:value="24861.5" calcext:value-type="float">
            <text:p>24861.5</text:p>
          </table:table-cell>
          <table:table-cell office:value-type="float" office:value="24851.5" calcext:value-type="float">
            <text:p>24851.5</text:p>
          </table:table-cell>
          <table:table-cell office:value-type="float" office:value="24866.5" calcext:value-type="float">
            <text:p>2486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8:33:03.200</text:p>
          </table:table-cell>
          <table:table-cell office:value-type="float" office:value="88" calcext:value-type="float">
            <text:p>8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628.10000000001" calcext:value-type="float">
            <text:p>4628.10000000001</text:p>
          </table:table-cell>
          <table:table-cell office:value-type="float" office:value="2" calcext:value-type="float">
            <text:p>2</text:p>
          </table:table-cell>
          <table:table-cell office:value-type="float" office:value="5032.30000000001" calcext:value-type="float">
            <text:p>5032.30000000001</text:p>
          </table:table-cell>
          <table:table-cell office:value-type="float" office:value="5268.70000000001" calcext:value-type="float">
            <text:p>5268.70000000001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8:37:11.300</text:p>
          </table:table-cell>
          <table:table-cell office:value-type="string" calcext:value-type="string">
            <text:p>2025-09-29 14:37:11.300</text:p>
          </table:table-cell>
          <table:table-cell office:value-type="string" calcext:value-type="string">
            <text:p>SHORT</text:p>
          </table:table-cell>
          <table:table-cell office:value-type="float" office:value="24853.5" calcext:value-type="float">
            <text:p>24853.5</text:p>
          </table:table-cell>
          <table:table-cell office:value-type="float" office:value="24843.5" calcext:value-type="float">
            <text:p>24843.5</text:p>
          </table:table-cell>
          <table:table-cell office:value-type="float" office:value="24858.5" calcext:value-type="float">
            <text:p>2485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8:37:11.400</text:p>
          </table:table-cell>
          <table:table-cell office:value-type="float" office:value="75" calcext:value-type="float">
            <text:p>75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517.40000000001" calcext:value-type="float">
            <text:p>4517.40000000001</text:p>
          </table:table-cell>
          <table:table-cell office:value-type="float" office:value="3" calcext:value-type="float">
            <text:p>3</text:p>
          </table:table-cell>
          <table:table-cell office:value-type="float" office:value="4921.60000000001" calcext:value-type="float">
            <text:p>4921.60000000001</text:p>
          </table:table-cell>
          <table:table-cell office:value-type="float" office:value="5268.70000000001" calcext:value-type="float">
            <text:p>5268.70000000001</text:p>
          </table:table-cell>
          <table:table-cell office:value-type="float" office:value="-347.099999999999" calcext:value-type="float">
            <text:p>-347.099999999999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09:14.600</text:p>
          </table:table-cell>
          <table:table-cell office:value-type="string" calcext:value-type="string">
            <text:p>2025-09-29 15:09:14.600</text:p>
          </table:table-cell>
          <table:table-cell office:value-type="string" calcext:value-type="string">
            <text:p>LONG</text:p>
          </table:table-cell>
          <table:table-cell office:value-type="float" office:value="24810.5" calcext:value-type="float">
            <text:p>24810.5</text:p>
          </table:table-cell>
          <table:table-cell office:value-type="float" office:value="24820.5" calcext:value-type="float">
            <text:p>24820.5</text:p>
          </table:table-cell>
          <table:table-cell office:value-type="float" office:value="24805.5" calcext:value-type="float">
            <text:p>2480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09:15.70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9:10:33.8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123.20000000001" calcext:value-type="float">
            <text:p>4123.20000000001</text:p>
          </table:table-cell>
          <table:table-cell office:value-type="float" office:value="0" calcext:value-type="float">
            <text:p>0</text:p>
          </table:table-cell>
          <table:table-cell office:value-type="float" office:value="5110.90000000001" calcext:value-type="float">
            <text:p>5110.90000000001</text:p>
          </table:table-cell>
          <table:table-cell office:value-type="float" office:value="5268.70000000001" calcext:value-type="float">
            <text:p>5268.70000000001</text:p>
          </table:table-cell>
          <table:table-cell office:value-type="float" office:value="-157.799999999999" calcext:value-type="float">
            <text:p>-157.799999999999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0:40.200</text:p>
          </table:table-cell>
          <table:table-cell office:value-type="string" calcext:value-type="string">
            <text:p>2025-09-29 15:10:40.200</text:p>
          </table:table-cell>
          <table:table-cell office:value-type="string" calcext:value-type="string">
            <text:p>LONG</text:p>
          </table:table-cell>
          <table:table-cell office:value-type="float" office:value="24822" calcext:value-type="float">
            <text:p>24822</text:p>
          </table:table-cell>
          <table:table-cell office:value-type="float" office:value="24832" calcext:value-type="float">
            <text:p>24832</text:p>
          </table:table-cell>
          <table:table-cell office:value-type="float" office:value="24817" calcext:value-type="float">
            <text:p>2481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10:41.2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307.50000000001" calcext:value-type="float">
            <text:p>4307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95.20000000001" calcext:value-type="float">
            <text:p>5295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0:47.700</text:p>
          </table:table-cell>
          <table:table-cell office:value-type="string" calcext:value-type="string">
            <text:p>2025-09-29 15:10:47.700</text:p>
          </table:table-cell>
          <table:table-cell office:value-type="string" calcext:value-type="string">
            <text:p>LONG</text:p>
          </table:table-cell>
          <table:table-cell office:value-type="float" office:value="24824" calcext:value-type="float">
            <text:p>24824</text:p>
          </table:table-cell>
          <table:table-cell office:value-type="float" office:value="24834" calcext:value-type="float">
            <text:p>24834</text:p>
          </table:table-cell>
          <table:table-cell office:value-type="float" office:value="24819" calcext:value-type="float">
            <text:p>2481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10:48.700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486.80000000001" calcext:value-type="float">
            <text:p>4486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74.50000000001" calcext:value-type="float">
            <text:p>5474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1:50.000</text:p>
          </table:table-cell>
          <table:table-cell office:value-type="string" calcext:value-type="string">
            <text:p>2025-09-29 15:11:50.000</text:p>
          </table:table-cell>
          <table:table-cell office:value-type="string" calcext:value-type="string">
            <text:p>LONG</text:p>
          </table:table-cell>
          <table:table-cell office:value-type="float" office:value="24819.25" calcext:value-type="float">
            <text:p>24819.25</text:p>
          </table:table-cell>
          <table:table-cell office:value-type="float" office:value="24829.25" calcext:value-type="float">
            <text:p>24829.25</text:p>
          </table:table-cell>
          <table:table-cell office:value-type="float" office:value="24814.25" calcext:value-type="float">
            <text:p>24814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11:51.00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671.10000000001" calcext:value-type="float">
            <text:p>4671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8.80000000001" calcext:value-type="float">
            <text:p>5658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1:51.000</text:p>
          </table:table-cell>
          <table:table-cell office:value-type="string" calcext:value-type="string">
            <text:p>2025-09-29 15:11:51.000</text:p>
          </table:table-cell>
          <table:table-cell office:value-type="string" calcext:value-type="string">
            <text:p>LONG</text:p>
          </table:table-cell>
          <table:table-cell office:value-type="float" office:value="24818.75" calcext:value-type="float">
            <text:p>24818.75</text:p>
          </table:table-cell>
          <table:table-cell office:value-type="float" office:value="24828.75" calcext:value-type="float">
            <text:p>24828.75</text:p>
          </table:table-cell>
          <table:table-cell office:value-type="float" office:value="24813.75" calcext:value-type="float">
            <text:p>24813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11:51.100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60.40000000001" calcext:value-type="float">
            <text:p>4860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48.10000000001" calcext:value-type="float">
            <text:p>5848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3:31.700</text:p>
          </table:table-cell>
          <table:table-cell office:value-type="string" calcext:value-type="string">
            <text:p>2025-09-29 15:13:31.700</text:p>
          </table:table-cell>
          <table:table-cell office:value-type="string" calcext:value-type="string">
            <text:p>SHORT</text:p>
          </table:table-cell>
          <table:table-cell office:value-type="float" office:value="24812" calcext:value-type="float">
            <text:p>24812</text:p>
          </table:table-cell>
          <table:table-cell office:value-type="float" office:value="24802" calcext:value-type="float">
            <text:p>24802</text:p>
          </table:table-cell>
          <table:table-cell office:value-type="float" office:value="24817" calcext:value-type="float">
            <text:p>2481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13:32.100</text:p>
          </table:table-cell>
          <table:table-cell office:value-type="float" office:value="123" calcext:value-type="float">
            <text:p>12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49.70000000001" calcext:value-type="float">
            <text:p>4749.70000000001</text:p>
          </table:table-cell>
          <table:table-cell office:value-type="float" office:value="1" calcext:value-type="float">
            <text:p>1</text:p>
          </table:table-cell>
          <table:table-cell office:value-type="float" office:value="5737.40000000001" calcext:value-type="float">
            <text:p>5737.40000000001</text:p>
          </table:table-cell>
          <table:table-cell office:value-type="float" office:value="5848.10000000001" calcext:value-type="float">
            <text:p>5848.1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7:12.700</text:p>
          </table:table-cell>
          <table:table-cell office:value-type="string" calcext:value-type="string">
            <text:p>2025-09-29 15:17:12.700</text:p>
          </table:table-cell>
          <table:table-cell office:value-type="string" calcext:value-type="string">
            <text:p>SHORT</text:p>
          </table:table-cell>
          <table:table-cell office:value-type="float" office:value="24783.5" calcext:value-type="float">
            <text:p>24783.5</text:p>
          </table:table-cell>
          <table:table-cell office:value-type="float" office:value="24773.5" calcext:value-type="float">
            <text:p>24773.5</text:p>
          </table:table-cell>
          <table:table-cell office:value-type="float" office:value="24788.5" calcext:value-type="float">
            <text:p>2478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17:13.000</text:p>
          </table:table-cell>
          <table:table-cell office:value-type="float" office:value="232" calcext:value-type="float">
            <text:p>232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939.00000000001" calcext:value-type="float">
            <text:p>4939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26.70000000001" calcext:value-type="float">
            <text:p>5926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7:18.400</text:p>
          </table:table-cell>
          <table:table-cell office:value-type="string" calcext:value-type="string">
            <text:p>2025-09-29 15:17:18.400</text:p>
          </table:table-cell>
          <table:table-cell office:value-type="string" calcext:value-type="string">
            <text:p>LONG</text:p>
          </table:table-cell>
          <table:table-cell office:value-type="float" office:value="24788" calcext:value-type="float">
            <text:p>24788</text:p>
          </table:table-cell>
          <table:table-cell office:value-type="float" office:value="24798" calcext:value-type="float">
            <text:p>24798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17:19.4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9:17:23.9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18.30000000001" calcext:value-type="float">
            <text:p>4818.30000000001</text:p>
          </table:table-cell>
          <table:table-cell office:value-type="float" office:value="1" calcext:value-type="float">
            <text:p>1</text:p>
          </table:table-cell>
          <table:table-cell office:value-type="float" office:value="5806.00000000001" calcext:value-type="float">
            <text:p>5806.00000000001</text:p>
          </table:table-cell>
          <table:table-cell office:value-type="float" office:value="5926.70000000001" calcext:value-type="float">
            <text:p>5926.7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8:40.900</text:p>
          </table:table-cell>
          <table:table-cell office:value-type="string" calcext:value-type="string">
            <text:p>2025-09-29 15:18:40.900</text:p>
          </table:table-cell>
          <table:table-cell office:value-type="string" calcext:value-type="string">
            <text:p>LONG</text:p>
          </table:table-cell>
          <table:table-cell office:value-type="float" office:value="24799.25" calcext:value-type="float">
            <text:p>24799.25</text:p>
          </table:table-cell>
          <table:table-cell office:value-type="float" office:value="24809.25" calcext:value-type="float">
            <text:p>24809.25</text:p>
          </table:table-cell>
          <table:table-cell office:value-type="float" office:value="24794.25" calcext:value-type="float">
            <text:p>2479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18:42.50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07.60000000001" calcext:value-type="float">
            <text:p>4707.60000000001</text:p>
          </table:table-cell>
          <table:table-cell office:value-type="float" office:value="2" calcext:value-type="float">
            <text:p>2</text:p>
          </table:table-cell>
          <table:table-cell office:value-type="float" office:value="5695.30000000001" calcext:value-type="float">
            <text:p>5695.30000000001</text:p>
          </table:table-cell>
          <table:table-cell office:value-type="float" office:value="5926.70000000001" calcext:value-type="float">
            <text:p>5926.70000000001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19:37.200</text:p>
          </table:table-cell>
          <table:table-cell office:value-type="string" calcext:value-type="string">
            <text:p>2025-09-29 15:19:37.200</text:p>
          </table:table-cell>
          <table:table-cell office:value-type="string" calcext:value-type="string">
            <text:p>SHORT</text:p>
          </table:table-cell>
          <table:table-cell office:value-type="float" office:value="24801" calcext:value-type="float">
            <text:p>24801</text:p>
          </table:table-cell>
          <table:table-cell office:value-type="float" office:value="24791" calcext:value-type="float">
            <text:p>24791</text:p>
          </table:table-cell>
          <table:table-cell office:value-type="float" office:value="24806" calcext:value-type="float">
            <text:p>2480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19:38.200</text:p>
          </table:table-cell>
          <table:table-cell office:value-type="float" office:value="86" calcext:value-type="float">
            <text:p>86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91.90000000001" calcext:value-type="float">
            <text:p>4891.90000000001</text:p>
          </table:table-cell>
          <table:table-cell office:value-type="float" office:value="0" calcext:value-type="float">
            <text:p>0</text:p>
          </table:table-cell>
          <table:table-cell office:value-type="float" office:value="5879.60000000001" calcext:value-type="float">
            <text:p>5879.60000000001</text:p>
          </table:table-cell>
          <table:table-cell office:value-type="float" office:value="5926.70000000001" calcext:value-type="float">
            <text:p>5926.70000000001</text:p>
          </table:table-cell>
          <table:table-cell office:value-type="float" office:value="-47.0999999999995" calcext:value-type="float">
            <text:p>-47.099999999999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20:13.100</text:p>
          </table:table-cell>
          <table:table-cell office:value-type="string" calcext:value-type="string">
            <text:p>2025-09-29 15:20:13.100</text:p>
          </table:table-cell>
          <table:table-cell office:value-type="string" calcext:value-type="string">
            <text:p>SHORT</text:p>
          </table:table-cell>
          <table:table-cell office:value-type="float" office:value="24806.25" calcext:value-type="float">
            <text:p>24806.25</text:p>
          </table:table-cell>
          <table:table-cell office:value-type="float" office:value="24796.25" calcext:value-type="float">
            <text:p>24796.25</text:p>
          </table:table-cell>
          <table:table-cell office:value-type="float" office:value="24811.25" calcext:value-type="float">
            <text:p>2481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20:14.100</text:p>
          </table:table-cell>
          <table:table-cell office:value-type="float" office:value="75" calcext:value-type="float">
            <text:p>75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081.20000000001" calcext:value-type="float">
            <text:p>5081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68.90000000001" calcext:value-type="float">
            <text:p>6068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20:55.900</text:p>
          </table:table-cell>
          <table:table-cell office:value-type="string" calcext:value-type="string">
            <text:p>2025-09-29 15:20:55.900</text:p>
          </table:table-cell>
          <table:table-cell office:value-type="string" calcext:value-type="string">
            <text:p>SHORT</text:p>
          </table:table-cell>
          <table:table-cell office:value-type="float" office:value="24808.5" calcext:value-type="float">
            <text:p>24808.5</text:p>
          </table:table-cell>
          <table:table-cell office:value-type="float" office:value="24798.5" calcext:value-type="float">
            <text:p>24798.5</text:p>
          </table:table-cell>
          <table:table-cell office:value-type="float" office:value="24813.5" calcext:value-type="float">
            <text:p>2481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20:56.500</text:p>
          </table:table-cell>
          <table:table-cell office:value-type="float" office:value="78" calcext:value-type="float">
            <text:p>78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270.50000000001" calcext:value-type="float">
            <text:p>5270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58.20000000001" calcext:value-type="float">
            <text:p>6258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28:00.900</text:p>
          </table:table-cell>
          <table:table-cell office:value-type="string" calcext:value-type="string">
            <text:p>2025-09-29 15:28:00.900</text:p>
          </table:table-cell>
          <table:table-cell office:value-type="string" calcext:value-type="string">
            <text:p>SHORT</text:p>
          </table:table-cell>
          <table:table-cell office:value-type="float" office:value="24817.25" calcext:value-type="float">
            <text:p>24817.25</text:p>
          </table:table-cell>
          <table:table-cell office:value-type="float" office:value="24807.25" calcext:value-type="float">
            <text:p>24807.25</text:p>
          </table:table-cell>
          <table:table-cell office:value-type="float" office:value="24822.25" calcext:value-type="float">
            <text:p>2482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28:01.900</text:p>
          </table:table-cell>
          <table:table-cell office:value-type="float" office:value="70" calcext:value-type="float">
            <text:p>7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154.80000000001" calcext:value-type="float">
            <text:p>5154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6142.50000000001" calcext:value-type="float">
            <text:p>6142.50000000001</text:p>
          </table:table-cell>
          <table:table-cell office:value-type="float" office:value="6258.20000000001" calcext:value-type="float">
            <text:p>6258.2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28:20.600</text:p>
          </table:table-cell>
          <table:table-cell office:value-type="string" calcext:value-type="string">
            <text:p>2025-09-29 15:28:20.600</text:p>
          </table:table-cell>
          <table:table-cell office:value-type="string" calcext:value-type="string">
            <text:p>SHORT</text:p>
          </table:table-cell>
          <table:table-cell office:value-type="float" office:value="24815.5" calcext:value-type="float">
            <text:p>24815.5</text:p>
          </table:table-cell>
          <table:table-cell office:value-type="float" office:value="24805.5" calcext:value-type="float">
            <text:p>24805.5</text:p>
          </table:table-cell>
          <table:table-cell office:value-type="float" office:value="24820.5" calcext:value-type="float">
            <text:p>2482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28:22.600</text:p>
          </table:table-cell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044.10000000001" calcext:value-type="float">
            <text:p>5044.10000000001</text:p>
          </table:table-cell>
          <table:table-cell office:value-type="float" office:value="2" calcext:value-type="float">
            <text:p>2</text:p>
          </table:table-cell>
          <table:table-cell office:value-type="float" office:value="6031.80000000001" calcext:value-type="float">
            <text:p>6031.80000000001</text:p>
          </table:table-cell>
          <table:table-cell office:value-type="float" office:value="6258.20000000001" calcext:value-type="float">
            <text:p>6258.20000000001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43:33.900</text:p>
          </table:table-cell>
          <table:table-cell office:value-type="string" calcext:value-type="string">
            <text:p>2025-09-29 15:43:33.900</text:p>
          </table:table-cell>
          <table:table-cell office:value-type="string" calcext:value-type="string">
            <text:p>SHORT</text:p>
          </table:table-cell>
          <table:table-cell office:value-type="float" office:value="24820.5" calcext:value-type="float">
            <text:p>24820.5</text:p>
          </table:table-cell>
          <table:table-cell office:value-type="float" office:value="24810.5" calcext:value-type="float">
            <text:p>24810.5</text:p>
          </table:table-cell>
          <table:table-cell office:value-type="float" office:value="24825.5" calcext:value-type="float">
            <text:p>2482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29 19:43:34.90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228.40000000001" calcext:value-type="float">
            <text:p>5228.40000000001</text:p>
          </table:table-cell>
          <table:table-cell office:value-type="float" office:value="0" calcext:value-type="float">
            <text:p>0</text:p>
          </table:table-cell>
          <table:table-cell office:value-type="float" office:value="6216.10000000001" calcext:value-type="float">
            <text:p>6216.10000000001</text:p>
          </table:table-cell>
          <table:table-cell office:value-type="float" office:value="6258.20000000001" calcext:value-type="float">
            <text:p>6258.20000000001</text:p>
          </table:table-cell>
          <table:table-cell office:value-type="float" office:value="-42.0999999999995" calcext:value-type="float">
            <text:p>-42.099999999999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47:16.300</text:p>
          </table:table-cell>
          <table:table-cell office:value-type="string" calcext:value-type="string">
            <text:p>2025-09-29 15:47:16.300</text:p>
          </table:table-cell>
          <table:table-cell office:value-type="string" calcext:value-type="string">
            <text:p>LONG</text:p>
          </table:table-cell>
          <table:table-cell office:value-type="float" office:value="24832.5" calcext:value-type="float">
            <text:p>24832.5</text:p>
          </table:table-cell>
          <table:table-cell office:value-type="float" office:value="24842.5" calcext:value-type="float">
            <text:p>24842.5</text:p>
          </table:table-cell>
          <table:table-cell office:value-type="float" office:value="24827.5" calcext:value-type="float">
            <text:p>2482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47:19.80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29 19:50:01.3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417.70000000001" calcext:value-type="float">
            <text:p>5417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5.40000000001" calcext:value-type="float">
            <text:p>6405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0:21.200</text:p>
          </table:table-cell>
          <table:table-cell office:value-type="string" calcext:value-type="string">
            <text:p>2025-09-29 15:50:21.200</text:p>
          </table:table-cell>
          <table:table-cell office:value-type="string" calcext:value-type="string">
            <text:p>LONG</text:p>
          </table:table-cell>
          <table:table-cell office:value-type="float" office:value="24840.75" calcext:value-type="float">
            <text:p>24840.75</text:p>
          </table:table-cell>
          <table:table-cell office:value-type="float" office:value="24850.75" calcext:value-type="float">
            <text:p>24850.75</text:p>
          </table:table-cell>
          <table:table-cell office:value-type="float" office:value="24835.75" calcext:value-type="float">
            <text:p>2483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0:21.80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607.00000000001" calcext:value-type="float">
            <text:p>5607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94.70000000001" calcext:value-type="float">
            <text:p>6594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0:24.100</text:p>
          </table:table-cell>
          <table:table-cell office:value-type="string" calcext:value-type="string">
            <text:p>2025-09-29 15:50:24.100</text:p>
          </table:table-cell>
          <table:table-cell office:value-type="string" calcext:value-type="string">
            <text:p>LONG</text:p>
          </table:table-cell>
          <table:table-cell office:value-type="float" office:value="24839" calcext:value-type="float">
            <text:p>2483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34" calcext:value-type="float">
            <text:p>2483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0:24.300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796.30000000001" calcext:value-type="float">
            <text:p>5796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84.00000000001" calcext:value-type="float">
            <text:p>6784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1:55.200</text:p>
          </table:table-cell>
          <table:table-cell office:value-type="string" calcext:value-type="string">
            <text:p>2025-09-29 15:51:55.200</text:p>
          </table:table-cell>
          <table:table-cell office:value-type="string" calcext:value-type="string">
            <text:p>LONG</text:p>
          </table:table-cell>
          <table:table-cell office:value-type="float" office:value="24834" calcext:value-type="float">
            <text:p>2483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1:57.700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29 19:53:16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685.60000000001" calcext:value-type="float">
            <text:p>5685.60000000001</text:p>
          </table:table-cell>
          <table:table-cell office:value-type="float" office:value="1" calcext:value-type="float">
            <text:p>1</text:p>
          </table:table-cell>
          <table:table-cell office:value-type="float" office:value="6673.30000000001" calcext:value-type="float">
            <text:p>6673.30000000001</text:p>
          </table:table-cell>
          <table:table-cell office:value-type="float" office:value="6784.00000000001" calcext:value-type="float">
            <text:p>6784.0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5:24.000</text:p>
          </table:table-cell>
          <table:table-cell office:value-type="string" calcext:value-type="string">
            <text:p>2025-09-29 15:55:24.000</text:p>
          </table:table-cell>
          <table:table-cell office:value-type="string" calcext:value-type="string">
            <text:p>SHORT</text:p>
          </table:table-cell>
          <table:table-cell office:value-type="float" office:value="24832.5" calcext:value-type="float">
            <text:p>24832.5</text:p>
          </table:table-cell>
          <table:table-cell office:value-type="float" office:value="24822.5" calcext:value-type="float">
            <text:p>24822.5</text:p>
          </table:table-cell>
          <table:table-cell office:value-type="float" office:value="24837.5" calcext:value-type="float">
            <text:p>2483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5:26.900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874.90000000001" calcext:value-type="float">
            <text:p>5874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62.60000000001" calcext:value-type="float">
            <text:p>6862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8:35.000</text:p>
          </table:table-cell>
          <table:table-cell office:value-type="string" calcext:value-type="string">
            <text:p>2025-09-29 15:58:35.000</text:p>
          </table:table-cell>
          <table:table-cell office:value-type="string" calcext:value-type="string">
            <text:p>LONG</text:p>
          </table:table-cell>
          <table:table-cell office:value-type="float" office:value="24827" calcext:value-type="float">
            <text:p>24827</text:p>
          </table:table-cell>
          <table:table-cell office:value-type="float" office:value="24837" calcext:value-type="float">
            <text:p>24837</text:p>
          </table:table-cell>
          <table:table-cell office:value-type="float" office:value="24822" calcext:value-type="float">
            <text:p>2482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8:40.000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764.20000000001" calcext:value-type="float">
            <text:p>5764.20000000001</text:p>
          </table:table-cell>
          <table:table-cell office:value-type="float" office:value="1" calcext:value-type="float">
            <text:p>1</text:p>
          </table:table-cell>
          <table:table-cell office:value-type="float" office:value="6751.90000000001" calcext:value-type="float">
            <text:p>6751.90000000001</text:p>
          </table:table-cell>
          <table:table-cell office:value-type="float" office:value="6862.60000000001" calcext:value-type="float">
            <text:p>6862.6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8:46.100</text:p>
          </table:table-cell>
          <table:table-cell office:value-type="string" calcext:value-type="string">
            <text:p>2025-09-29 15:58:46.100</text:p>
          </table:table-cell>
          <table:table-cell office:value-type="string" calcext:value-type="string">
            <text:p>SHORT</text:p>
          </table:table-cell>
          <table:table-cell office:value-type="float" office:value="24826.25" calcext:value-type="float">
            <text:p>24826.25</text:p>
          </table:table-cell>
          <table:table-cell office:value-type="float" office:value="24816.25" calcext:value-type="float">
            <text:p>24816.25</text:p>
          </table:table-cell>
          <table:table-cell office:value-type="float" office:value="24831.25" calcext:value-type="float">
            <text:p>2483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8:48.0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953.50000000001" calcext:value-type="float">
            <text:p>5953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1.20000000001" calcext:value-type="float">
            <text:p>6941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9:20.700</text:p>
          </table:table-cell>
          <table:table-cell office:value-type="string" calcext:value-type="string">
            <text:p>2025-09-29 15:59:20.700</text:p>
          </table:table-cell>
          <table:table-cell office:value-type="string" calcext:value-type="string">
            <text:p>LONG</text:p>
          </table:table-cell>
          <table:table-cell office:value-type="float" office:value="24832.5" calcext:value-type="float">
            <text:p>24832.5</text:p>
          </table:table-cell>
          <table:table-cell office:value-type="float" office:value="24842.5" calcext:value-type="float">
            <text:p>24842.5</text:p>
          </table:table-cell>
          <table:table-cell office:value-type="float" office:value="24827.5" calcext:value-type="float">
            <text:p>2482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9:21.40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842.80000000001" calcext:value-type="float">
            <text:p>5842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6830.50000000001" calcext:value-type="float">
            <text:p>6830.50000000001</text:p>
          </table:table-cell>
          <table:table-cell office:value-type="float" office:value="6941.20000000001" calcext:value-type="float">
            <text:p>6941.2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2025-09-29 19:59:22.600</text:p>
          </table:table-cell>
          <table:table-cell office:value-type="string" calcext:value-type="string">
            <text:p>2025-09-29 15:59:22.600</text:p>
          </table:table-cell>
          <table:table-cell office:value-type="string" calcext:value-type="string">
            <text:p>SHORT</text:p>
          </table:table-cell>
          <table:table-cell office:value-type="float" office:value="24831.75" calcext:value-type="float">
            <text:p>24831.75</text:p>
          </table:table-cell>
          <table:table-cell office:value-type="float" office:value="24821.75" calcext:value-type="float">
            <text:p>24821.75</text:p>
          </table:table-cell>
          <table:table-cell office:value-type="float" office:value="24836.75" calcext:value-type="float">
            <text:p>2483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29 19:59:26.000</text:p>
          </table:table-cell>
          <table:table-cell office:value-type="float" office:value="78" calcext:value-type="float">
            <text:p>78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4878.75" calcext:value-type="float">
            <text:p>24878.75</text:p>
          </table:table-cell>
          <table:table-cell office:value-type="float" office:value="24875" calcext:value-type="float">
            <text:p>248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6032.10000000001" calcext:value-type="float">
            <text:p>6032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19.80000000001" calcext:value-type="float">
            <text:p>7019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5:01:12.100</text:p>
          </table:table-cell>
          <table:table-cell office:value-type="string" calcext:value-type="string">
            <text:p>2025-09-30 11:01:12.100</text:p>
          </table:table-cell>
          <table:table-cell office:value-type="string" calcext:value-type="string">
            <text:p>LONG</text:p>
          </table:table-cell>
          <table:table-cell office:value-type="float" office:value="24853.75" calcext:value-type="float">
            <text:p>24853.75</text:p>
          </table:table-cell>
          <table:table-cell office:value-type="float" office:value="24863.75" calcext:value-type="float">
            <text:p>24863.75</text:p>
          </table:table-cell>
          <table:table-cell office:value-type="float" office:value="24848.75" calcext:value-type="float">
            <text:p>2484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5:01:13.100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5.1000000000001" calcext:value-type="float">
            <text:p>55.10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5:37:50.700</text:p>
          </table:table-cell>
          <table:table-cell office:value-type="string" calcext:value-type="string">
            <text:p>2025-09-30 11:37:50.700</text:p>
          </table:table-cell>
          <table:table-cell office:value-type="string" calcext:value-type="string">
            <text:p>LONG</text:p>
          </table:table-cell>
          <table:table-cell office:value-type="float" office:value="24776" calcext:value-type="float">
            <text:p>24776</text:p>
          </table:table-cell>
          <table:table-cell office:value-type="float" office:value="24786" calcext:value-type="float">
            <text:p>24786</text:p>
          </table:table-cell>
          <table:table-cell office:value-type="float" office:value="24771" calcext:value-type="float">
            <text:p>2477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5:37:52.50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44.4" calcext:value-type="float">
            <text:p>24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8.6" calcext:value-type="float">
            <text:p>36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5:42:29.600</text:p>
          </table:table-cell>
          <table:table-cell office:value-type="string" calcext:value-type="string">
            <text:p>2025-09-30 11:42:29.600</text:p>
          </table:table-cell>
          <table:table-cell office:value-type="string" calcext:value-type="string">
            <text:p>SHORT</text:p>
          </table:table-cell>
          <table:table-cell office:value-type="float" office:value="24769.5" calcext:value-type="float">
            <text:p>24769.5</text:p>
          </table:table-cell>
          <table:table-cell office:value-type="float" office:value="24759.5" calcext:value-type="float">
            <text:p>24759.5</text:p>
          </table:table-cell>
          <table:table-cell office:value-type="float" office:value="24774.5" calcext:value-type="float">
            <text:p>2477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5:42:30.60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3.7" calcext:value-type="float">
            <text:p>42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7.9" calcext:value-type="float">
            <text:p>5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5:49:32.900</text:p>
          </table:table-cell>
          <table:table-cell office:value-type="string" calcext:value-type="string">
            <text:p>2025-09-30 11:49:32.900</text:p>
          </table:table-cell>
          <table:table-cell office:value-type="string" calcext:value-type="string">
            <text:p>SHORT</text:p>
          </table:table-cell>
          <table:table-cell office:value-type="float" office:value="24797" calcext:value-type="float">
            <text:p>24797</text:p>
          </table:table-cell>
          <table:table-cell office:value-type="float" office:value="24787" calcext:value-type="float">
            <text:p>24787</text:p>
          </table:table-cell>
          <table:table-cell office:value-type="float" office:value="24802" calcext:value-type="float">
            <text:p>2480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5:49:33.300</text:p>
          </table:table-cell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5:50:08.5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437.2" calcext:value-type="float">
            <text:p>437.2</text:p>
          </table:table-cell>
          <table:table-cell office:value-type="float" office:value="547.9" calcext:value-type="float">
            <text:p>547.9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5:51:40.600</text:p>
          </table:table-cell>
          <table:table-cell office:value-type="string" calcext:value-type="string">
            <text:p>2025-09-30 11:51:40.600</text:p>
          </table:table-cell>
          <table:table-cell office:value-type="string" calcext:value-type="string">
            <text:p>SHORT</text:p>
          </table:table-cell>
          <table:table-cell office:value-type="float" office:value="24804.25" calcext:value-type="float">
            <text:p>24804.25</text:p>
          </table:table-cell>
          <table:table-cell office:value-type="float" office:value="24794.25" calcext:value-type="float">
            <text:p>24794.25</text:p>
          </table:table-cell>
          <table:table-cell office:value-type="float" office:value="24809.25" calcext:value-type="float">
            <text:p>24809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5:51:41.60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30 15:52:26.1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92.3" calcext:value-type="float">
            <text:p>492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6.5" calcext:value-type="float">
            <text:p>6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5:58:34.800</text:p>
          </table:table-cell>
          <table:table-cell office:value-type="string" calcext:value-type="string">
            <text:p>2025-09-30 11:58:34.800</text:p>
          </table:table-cell>
          <table:table-cell office:value-type="string" calcext:value-type="string">
            <text:p>LONG</text:p>
          </table:table-cell>
          <table:table-cell office:value-type="float" office:value="24810.25" calcext:value-type="float">
            <text:p>24810.25</text:p>
          </table:table-cell>
          <table:table-cell office:value-type="float" office:value="24820.25" calcext:value-type="float">
            <text:p>24820.25</text:p>
          </table:table-cell>
          <table:table-cell office:value-type="float" office:value="24805.25" calcext:value-type="float">
            <text:p>2480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5:58:35.60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81.6" calcext:value-type="float">
            <text:p>68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5.8" calcext:value-type="float">
            <text:p>80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08:54.500</text:p>
          </table:table-cell>
          <table:table-cell office:value-type="string" calcext:value-type="string">
            <text:p>2025-09-30 12:08:54.500</text:p>
          </table:table-cell>
          <table:table-cell office:value-type="string" calcext:value-type="string">
            <text:p>LONG</text:p>
          </table:table-cell>
          <table:table-cell office:value-type="float" office:value="24794" calcext:value-type="float">
            <text:p>24794</text:p>
          </table:table-cell>
          <table:table-cell office:value-type="float" office:value="24804" calcext:value-type="float">
            <text:p>24804</text:p>
          </table:table-cell>
          <table:table-cell office:value-type="float" office:value="24789" calcext:value-type="float">
            <text:p>2478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6:08:55.000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870.9" calcext:value-type="float">
            <text:p>87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5.1" calcext:value-type="float">
            <text:p>99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10:36.000</text:p>
          </table:table-cell>
          <table:table-cell office:value-type="string" calcext:value-type="string">
            <text:p>2025-09-30 12:10:36.000</text:p>
          </table:table-cell>
          <table:table-cell office:value-type="string" calcext:value-type="string">
            <text:p>SHORT</text:p>
          </table:table-cell>
          <table:table-cell office:value-type="float" office:value="24793.5" calcext:value-type="float">
            <text:p>24793.5</text:p>
          </table:table-cell>
          <table:table-cell office:value-type="float" office:value="24783.5" calcext:value-type="float">
            <text:p>24783.5</text:p>
          </table:table-cell>
          <table:table-cell office:value-type="float" office:value="24798.5" calcext:value-type="float">
            <text:p>2479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6:10:37.000</text:p>
          </table:table-cell>
          <table:table-cell office:value-type="float" office:value="122" calcext:value-type="float">
            <text:p>12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50.2" calcext:value-type="float">
            <text:p>105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4.4" calcext:value-type="float">
            <text:p>117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16:42.700</text:p>
          </table:table-cell>
          <table:table-cell office:value-type="string" calcext:value-type="string">
            <text:p>2025-09-30 12:16:42.700</text:p>
          </table:table-cell>
          <table:table-cell office:value-type="string" calcext:value-type="string">
            <text:p>SHORT</text:p>
          </table:table-cell>
          <table:table-cell office:value-type="float" office:value="24788" calcext:value-type="float">
            <text:p>24788</text:p>
          </table:table-cell>
          <table:table-cell office:value-type="float" office:value="24778" calcext:value-type="float">
            <text:p>24778</text:p>
          </table:table-cell>
          <table:table-cell office:value-type="float" office:value="24793" calcext:value-type="float">
            <text:p>2479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6:16:43.7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229.5" calcext:value-type="float">
            <text:p>122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3.7" calcext:value-type="float">
            <text:p>135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16:53.500</text:p>
          </table:table-cell>
          <table:table-cell office:value-type="string" calcext:value-type="string">
            <text:p>2025-09-30 12:16:53.500</text:p>
          </table:table-cell>
          <table:table-cell office:value-type="string" calcext:value-type="string">
            <text:p>SHORT</text:p>
          </table:table-cell>
          <table:table-cell office:value-type="float" office:value="24790.25" calcext:value-type="float">
            <text:p>24790.25</text:p>
          </table:table-cell>
          <table:table-cell office:value-type="float" office:value="24780.25" calcext:value-type="float">
            <text:p>24780.25</text:p>
          </table:table-cell>
          <table:table-cell office:value-type="float" office:value="24795.25" calcext:value-type="float">
            <text:p>24795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6:16:54.500</text:p>
          </table:table-cell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408.8" calcext:value-type="float">
            <text:p>1408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19:49.700</text:p>
          </table:table-cell>
          <table:table-cell office:value-type="string" calcext:value-type="string">
            <text:p>2025-09-30 12:19:49.700</text:p>
          </table:table-cell>
          <table:table-cell office:value-type="string" calcext:value-type="string">
            <text:p>SHORT</text:p>
          </table:table-cell>
          <table:table-cell office:value-type="float" office:value="24805.5" calcext:value-type="float">
            <text:p>24805.5</text:p>
          </table:table-cell>
          <table:table-cell office:value-type="float" office:value="24795.5" calcext:value-type="float">
            <text:p>24795.5</text:p>
          </table:table-cell>
          <table:table-cell office:value-type="float" office:value="24810.5" calcext:value-type="float">
            <text:p>248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6:19:52.800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598.1" calcext:value-type="float">
            <text:p>1598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2.3" calcext:value-type="float">
            <text:p>172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41:49.300</text:p>
          </table:table-cell>
          <table:table-cell office:value-type="string" calcext:value-type="string">
            <text:p>2025-09-30 12:41:49.300</text:p>
          </table:table-cell>
          <table:table-cell office:value-type="string" calcext:value-type="string">
            <text:p>LONG</text:p>
          </table:table-cell>
          <table:table-cell office:value-type="float" office:value="24803.5" calcext:value-type="float">
            <text:p>24803.5</text:p>
          </table:table-cell>
          <table:table-cell office:value-type="float" office:value="24813.5" calcext:value-type="float">
            <text:p>24813.5</text:p>
          </table:table-cell>
          <table:table-cell office:value-type="float" office:value="24798.5" calcext:value-type="float">
            <text:p>2479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6:41:53.00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6:42:41.8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487.4" calcext:value-type="float">
            <text:p>1487.4</text:p>
          </table:table-cell>
          <table:table-cell office:value-type="float" office:value="1" calcext:value-type="float">
            <text:p>1</text:p>
          </table:table-cell>
          <table:table-cell office:value-type="float" office:value="1611.6" calcext:value-type="float">
            <text:p>1611.6</text:p>
          </table:table-cell>
          <table:table-cell office:value-type="float" office:value="1722.3" calcext:value-type="float">
            <text:p>1722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43:16.400</text:p>
          </table:table-cell>
          <table:table-cell office:value-type="string" calcext:value-type="string">
            <text:p>2025-09-30 12:43:16.400</text:p>
          </table:table-cell>
          <table:table-cell office:value-type="string" calcext:value-type="string">
            <text:p>SHORT</text:p>
          </table:table-cell>
          <table:table-cell office:value-type="float" office:value="24799" calcext:value-type="float">
            <text:p>24799</text:p>
          </table:table-cell>
          <table:table-cell office:value-type="float" office:value="24789" calcext:value-type="float">
            <text:p>24789</text:p>
          </table:table-cell>
          <table:table-cell office:value-type="float" office:value="24804" calcext:value-type="float">
            <text:p>2480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6:43:17.40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66.7" calcext:value-type="float">
            <text:p>1666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0.9" calcext:value-type="float">
            <text:p>179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43:51.100</text:p>
          </table:table-cell>
          <table:table-cell office:value-type="string" calcext:value-type="string">
            <text:p>2025-09-30 12:43:51.100</text:p>
          </table:table-cell>
          <table:table-cell office:value-type="string" calcext:value-type="string">
            <text:p>SHORT</text:p>
          </table:table-cell>
          <table:table-cell office:value-type="float" office:value="24801.25" calcext:value-type="float">
            <text:p>24801.25</text:p>
          </table:table-cell>
          <table:table-cell office:value-type="float" office:value="24791.25" calcext:value-type="float">
            <text:p>24791.25</text:p>
          </table:table-cell>
          <table:table-cell office:value-type="float" office:value="24806.25" calcext:value-type="float">
            <text:p>2480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6:43:54.000</text:p>
          </table:table-cell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0.2" calcext:value-type="float">
            <text:p>198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58:10.300</text:p>
          </table:table-cell>
          <table:table-cell office:value-type="string" calcext:value-type="string">
            <text:p>2025-09-30 12:58:10.300</text:p>
          </table:table-cell>
          <table:table-cell office:value-type="string" calcext:value-type="string">
            <text:p>LONG</text:p>
          </table:table-cell>
          <table:table-cell office:value-type="float" office:value="24791" calcext:value-type="float">
            <text:p>24791</text:p>
          </table:table-cell>
          <table:table-cell office:value-type="float" office:value="24801" calcext:value-type="float">
            <text:p>24801</text:p>
          </table:table-cell>
          <table:table-cell office:value-type="float" office:value="24786" calcext:value-type="float">
            <text:p>2478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6:58:11.30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040.3" calcext:value-type="float">
            <text:p>204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4.5" calcext:value-type="float">
            <text:p>21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6:59:28.700</text:p>
          </table:table-cell>
          <table:table-cell office:value-type="string" calcext:value-type="string">
            <text:p>2025-09-30 12:59:28.700</text:p>
          </table:table-cell>
          <table:table-cell office:value-type="string" calcext:value-type="string">
            <text:p>SHORT</text:p>
          </table:table-cell>
          <table:table-cell office:value-type="float" office:value="24782.75" calcext:value-type="float">
            <text:p>24782.75</text:p>
          </table:table-cell>
          <table:table-cell office:value-type="float" office:value="24772.75" calcext:value-type="float">
            <text:p>24772.75</text:p>
          </table:table-cell>
          <table:table-cell office:value-type="float" office:value="24787.75" calcext:value-type="float">
            <text:p>2478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6:59:32.300</text:p>
          </table:table-cell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929.6" calcext:value-type="float">
            <text:p>1929.6</text:p>
          </table:table-cell>
          <table:table-cell office:value-type="float" office:value="1" calcext:value-type="float">
            <text:p>1</text:p>
          </table:table-cell>
          <table:table-cell office:value-type="float" office:value="2053.8" calcext:value-type="float">
            <text:p>2053.8</text:p>
          </table:table-cell>
          <table:table-cell office:value-type="float" office:value="2164.5" calcext:value-type="float">
            <text:p>2164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14:46.100</text:p>
          </table:table-cell>
          <table:table-cell office:value-type="string" calcext:value-type="string">
            <text:p>2025-09-30 13:14:46.100</text:p>
          </table:table-cell>
          <table:table-cell office:value-type="string" calcext:value-type="string">
            <text:p>LONG</text:p>
          </table:table-cell>
          <table:table-cell office:value-type="float" office:value="24767.25" calcext:value-type="float">
            <text:p>24767.25</text:p>
          </table:table-cell>
          <table:table-cell office:value-type="float" office:value="24777.25" calcext:value-type="float">
            <text:p>24777.25</text:p>
          </table:table-cell>
          <table:table-cell office:value-type="float" office:value="24762.25" calcext:value-type="float">
            <text:p>2476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7:14:48.50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18.9" calcext:value-type="float">
            <text:p>2118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43.1" calcext:value-type="float">
            <text:p>224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20:55.200</text:p>
          </table:table-cell>
          <table:table-cell office:value-type="string" calcext:value-type="string">
            <text:p>2025-09-30 13:20:55.200</text:p>
          </table:table-cell>
          <table:table-cell office:value-type="string" calcext:value-type="string">
            <text:p>SHORT</text:p>
          </table:table-cell>
          <table:table-cell office:value-type="float" office:value="24762.25" calcext:value-type="float">
            <text:p>24762.25</text:p>
          </table:table-cell>
          <table:table-cell office:value-type="float" office:value="24752.25" calcext:value-type="float">
            <text:p>24752.25</text:p>
          </table:table-cell>
          <table:table-cell office:value-type="float" office:value="24767.25" calcext:value-type="float">
            <text:p>2476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7:20:56.200</text:p>
          </table:table-cell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03.2" calcext:value-type="float">
            <text:p>2003.2</text:p>
          </table:table-cell>
          <table:table-cell office:value-type="float" office:value="1" calcext:value-type="float">
            <text:p>1</text:p>
          </table:table-cell>
          <table:table-cell office:value-type="float" office:value="2127.4" calcext:value-type="float">
            <text:p>2127.4</text:p>
          </table:table-cell>
          <table:table-cell office:value-type="float" office:value="2243.1" calcext:value-type="float">
            <text:p>2243.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21:26.600</text:p>
          </table:table-cell>
          <table:table-cell office:value-type="string" calcext:value-type="string">
            <text:p>2025-09-30 13:21:26.600</text:p>
          </table:table-cell>
          <table:table-cell office:value-type="string" calcext:value-type="string">
            <text:p>SHORT</text:p>
          </table:table-cell>
          <table:table-cell office:value-type="float" office:value="24747.5" calcext:value-type="float">
            <text:p>24747.5</text:p>
          </table:table-cell>
          <table:table-cell office:value-type="float" office:value="24737.5" calcext:value-type="float">
            <text:p>24737.5</text:p>
          </table:table-cell>
          <table:table-cell office:value-type="float" office:value="24752.5" calcext:value-type="float">
            <text:p>2475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7:21:27.000</text:p>
          </table:table-cell>
          <table:table-cell office:value-type="float" office:value="99" calcext:value-type="float">
            <text:p>99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7:22:16.3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92.5" calcext:value-type="float">
            <text:p>1892.5</text:p>
          </table:table-cell>
          <table:table-cell office:value-type="float" office:value="2" calcext:value-type="float">
            <text:p>2</text:p>
          </table:table-cell>
          <table:table-cell office:value-type="float" office:value="2016.7" calcext:value-type="float">
            <text:p>2016.7</text:p>
          </table:table-cell>
          <table:table-cell office:value-type="float" office:value="2243.1" calcext:value-type="float">
            <text:p>2243.1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22:20.700</text:p>
          </table:table-cell>
          <table:table-cell office:value-type="string" calcext:value-type="string">
            <text:p>2025-09-30 13:22:20.700</text:p>
          </table:table-cell>
          <table:table-cell office:value-type="string" calcext:value-type="string">
            <text:p>SHORT</text:p>
          </table:table-cell>
          <table:table-cell office:value-type="float" office:value="24752.5" calcext:value-type="float">
            <text:p>24752.5</text:p>
          </table:table-cell>
          <table:table-cell office:value-type="float" office:value="24742.5" calcext:value-type="float">
            <text:p>24742.5</text:p>
          </table:table-cell>
          <table:table-cell office:value-type="float" office:value="24757.5" calcext:value-type="float">
            <text:p>2475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7:22:23.500</text:p>
          </table:table-cell>
          <table:table-cell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81.8" calcext:value-type="float">
            <text:p>1781.8</text:p>
          </table:table-cell>
          <table:table-cell office:value-type="float" office:value="3" calcext:value-type="float">
            <text:p>3</text:p>
          </table:table-cell>
          <table:table-cell office:value-type="float" office:value="1906" calcext:value-type="float">
            <text:p>1906</text:p>
          </table:table-cell>
          <table:table-cell office:value-type="float" office:value="2243.1" calcext:value-type="float">
            <text:p>2243.1</text:p>
          </table:table-cell>
          <table:table-cell office:value-type="float" office:value="-337.1" calcext:value-type="float">
            <text:p>-337.1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23:48.300</text:p>
          </table:table-cell>
          <table:table-cell office:value-type="string" calcext:value-type="string">
            <text:p>2025-09-30 13:23:48.300</text:p>
          </table:table-cell>
          <table:table-cell office:value-type="string" calcext:value-type="string">
            <text:p>LONG</text:p>
          </table:table-cell>
          <table:table-cell office:value-type="float" office:value="24746" calcext:value-type="float">
            <text:p>24746</text:p>
          </table:table-cell>
          <table:table-cell office:value-type="float" office:value="24756" calcext:value-type="float">
            <text:p>24756</text:p>
          </table:table-cell>
          <table:table-cell office:value-type="float" office:value="24741" calcext:value-type="float">
            <text:p>2474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7:23:49.30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66.1" calcext:value-type="float">
            <text:p>1966.1</text:p>
          </table:table-cell>
          <table:table-cell office:value-type="float" office:value="0" calcext:value-type="float">
            <text:p>0</text:p>
          </table:table-cell>
          <table:table-cell office:value-type="float" office:value="2090.3" calcext:value-type="float">
            <text:p>2090.3</text:p>
          </table:table-cell>
          <table:table-cell office:value-type="float" office:value="2243.1" calcext:value-type="float">
            <text:p>2243.1</text:p>
          </table:table-cell>
          <table:table-cell office:value-type="float" office:value="-152.8" calcext:value-type="float">
            <text:p>-152.8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29:48.400</text:p>
          </table:table-cell>
          <table:table-cell office:value-type="string" calcext:value-type="string">
            <text:p>2025-09-30 13:29:48.400</text:p>
          </table:table-cell>
          <table:table-cell office:value-type="string" calcext:value-type="string">
            <text:p>SHORT</text:p>
          </table:table-cell>
          <table:table-cell office:value-type="float" office:value="24750.25" calcext:value-type="float">
            <text:p>24750.25</text:p>
          </table:table-cell>
          <table:table-cell office:value-type="float" office:value="24740.25" calcext:value-type="float">
            <text:p>24740.25</text:p>
          </table:table-cell>
          <table:table-cell office:value-type="float" office:value="24755.25" calcext:value-type="float">
            <text:p>2475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7:29:49.800</text:p>
          </table:table-cell>
          <table:table-cell office:value-type="float" office:value="79" calcext:value-type="float">
            <text:p>79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55.4" calcext:value-type="float">
            <text:p>1855.4</text:p>
          </table:table-cell>
          <table:table-cell office:value-type="float" office:value="1" calcext:value-type="float">
            <text:p>1</text:p>
          </table:table-cell>
          <table:table-cell office:value-type="float" office:value="1979.6" calcext:value-type="float">
            <text:p>1979.6</text:p>
          </table:table-cell>
          <table:table-cell office:value-type="float" office:value="2243.1" calcext:value-type="float">
            <text:p>2243.1</text:p>
          </table:table-cell>
          <table:table-cell office:value-type="float" office:value="-263.5" calcext:value-type="float">
            <text:p>-263.5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33:08.300</text:p>
          </table:table-cell>
          <table:table-cell office:value-type="string" calcext:value-type="string">
            <text:p>2025-09-30 13:33:08.300</text:p>
          </table:table-cell>
          <table:table-cell office:value-type="string" calcext:value-type="string">
            <text:p>SHORT</text:p>
          </table:table-cell>
          <table:table-cell office:value-type="float" office:value="24744.5" calcext:value-type="float">
            <text:p>24744.5</text:p>
          </table:table-cell>
          <table:table-cell office:value-type="float" office:value="24734.5" calcext:value-type="float">
            <text:p>24734.5</text:p>
          </table:table-cell>
          <table:table-cell office:value-type="float" office:value="24749.5" calcext:value-type="float">
            <text:p>2474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7:33:08.500</text:p>
          </table:table-cell>
          <table:table-cell office:value-type="float" office:value="113" calcext:value-type="float">
            <text:p>113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7:33:59.5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44.7" calcext:value-type="float">
            <text:p>1744.7</text:p>
          </table:table-cell>
          <table:table-cell office:value-type="float" office:value="2" calcext:value-type="float">
            <text:p>2</text:p>
          </table:table-cell>
          <table:table-cell office:value-type="float" office:value="1868.9" calcext:value-type="float">
            <text:p>1868.9</text:p>
          </table:table-cell>
          <table:table-cell office:value-type="float" office:value="2243.1" calcext:value-type="float">
            <text:p>2243.1</text:p>
          </table:table-cell>
          <table:table-cell office:value-type="float" office:value="-374.2" calcext:value-type="float">
            <text:p>-374.2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36:48.400</text:p>
          </table:table-cell>
          <table:table-cell office:value-type="string" calcext:value-type="string">
            <text:p>2025-09-30 13:36:48.400</text:p>
          </table:table-cell>
          <table:table-cell office:value-type="string" calcext:value-type="string">
            <text:p>LONG</text:p>
          </table:table-cell>
          <table:table-cell office:value-type="float" office:value="24735" calcext:value-type="float">
            <text:p>24735</text:p>
          </table:table-cell>
          <table:table-cell office:value-type="float" office:value="24745" calcext:value-type="float">
            <text:p>24745</text:p>
          </table:table-cell>
          <table:table-cell office:value-type="float" office:value="24730" calcext:value-type="float">
            <text:p>2473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7:36:49.10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office:value-type="float" office:value="1758.2" calcext:value-type="float">
            <text:p>1758.2</text:p>
          </table:table-cell>
          <table:table-cell office:value-type="float" office:value="2243.1" calcext:value-type="float">
            <text:p>2243.1</text:p>
          </table:table-cell>
          <table:table-cell office:value-type="float" office:value="-484.9" calcext:value-type="float">
            <text:p>-484.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47:35.000</text:p>
          </table:table-cell>
          <table:table-cell office:value-type="string" calcext:value-type="string">
            <text:p>2025-09-30 13:47:35.000</text:p>
          </table:table-cell>
          <table:table-cell office:value-type="string" calcext:value-type="string">
            <text:p>SHORT</text:p>
          </table:table-cell>
          <table:table-cell office:value-type="float" office:value="24772" calcext:value-type="float">
            <text:p>24772</text:p>
          </table:table-cell>
          <table:table-cell office:value-type="float" office:value="24762" calcext:value-type="float">
            <text:p>24762</text:p>
          </table:table-cell>
          <table:table-cell office:value-type="float" office:value="24777" calcext:value-type="float">
            <text:p>2477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7:47:36.000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13.3" calcext:value-type="float">
            <text:p>1813.3</text:p>
          </table:table-cell>
          <table:table-cell office:value-type="float" office:value="0" calcext:value-type="float">
            <text:p>0</text:p>
          </table:table-cell>
          <table:table-cell office:value-type="float" office:value="1937.5" calcext:value-type="float">
            <text:p>1937.5</text:p>
          </table:table-cell>
          <table:table-cell office:value-type="float" office:value="2243.1" calcext:value-type="float">
            <text:p>2243.1</text:p>
          </table:table-cell>
          <table:table-cell office:value-type="float" office:value="-305.6" calcext:value-type="float">
            <text:p>-305.6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7:53:44.300</text:p>
          </table:table-cell>
          <table:table-cell office:value-type="string" calcext:value-type="string">
            <text:p>2025-09-30 13:53:44.300</text:p>
          </table:table-cell>
          <table:table-cell office:value-type="string" calcext:value-type="string">
            <text:p>SHORT</text:p>
          </table:table-cell>
          <table:table-cell office:value-type="float" office:value="24794" calcext:value-type="float">
            <text:p>24794</text:p>
          </table:table-cell>
          <table:table-cell office:value-type="float" office:value="24784" calcext:value-type="float">
            <text:p>24784</text:p>
          </table:table-cell>
          <table:table-cell office:value-type="float" office:value="24799" calcext:value-type="float">
            <text:p>2479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7:53:45.300</text:p>
          </table:table-cell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97.6" calcext:value-type="float">
            <text:p>1697.6</text:p>
          </table:table-cell>
          <table:table-cell office:value-type="float" office:value="1" calcext:value-type="float">
            <text:p>1</text:p>
          </table:table-cell>
          <table:table-cell office:value-type="float" office:value="1821.8" calcext:value-type="float">
            <text:p>1821.8</text:p>
          </table:table-cell>
          <table:table-cell office:value-type="float" office:value="2243.1" calcext:value-type="float">
            <text:p>2243.1</text:p>
          </table:table-cell>
          <table:table-cell office:value-type="float" office:value="-421.3" calcext:value-type="float">
            <text:p>-421.3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08:06.200</text:p>
          </table:table-cell>
          <table:table-cell office:value-type="string" calcext:value-type="string">
            <text:p>2025-09-30 14:08:06.200</text:p>
          </table:table-cell>
          <table:table-cell office:value-type="string" calcext:value-type="string">
            <text:p>SHORT</text:p>
          </table:table-cell>
          <table:table-cell office:value-type="float" office:value="24779" calcext:value-type="float">
            <text:p>24779</text:p>
          </table:table-cell>
          <table:table-cell office:value-type="float" office:value="24769" calcext:value-type="float">
            <text:p>24769</text:p>
          </table:table-cell>
          <table:table-cell office:value-type="float" office:value="24784" calcext:value-type="float">
            <text:p>2478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08:06.400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86.9" calcext:value-type="float">
            <text:p>1886.9</text:p>
          </table:table-cell>
          <table:table-cell office:value-type="float" office:value="0" calcext:value-type="float">
            <text:p>0</text:p>
          </table:table-cell>
          <table:table-cell office:value-type="float" office:value="2011.1" calcext:value-type="float">
            <text:p>2011.1</text:p>
          </table:table-cell>
          <table:table-cell office:value-type="float" office:value="2243.1" calcext:value-type="float">
            <text:p>2243.1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14:31.300</text:p>
          </table:table-cell>
          <table:table-cell office:value-type="string" calcext:value-type="string">
            <text:p>2025-09-30 14:14:31.300</text:p>
          </table:table-cell>
          <table:table-cell office:value-type="string" calcext:value-type="string">
            <text:p>SHORT</text:p>
          </table:table-cell>
          <table:table-cell office:value-type="float" office:value="24807.75" calcext:value-type="float">
            <text:p>24807.75</text:p>
          </table:table-cell>
          <table:table-cell office:value-type="float" office:value="24797.75" calcext:value-type="float">
            <text:p>24797.75</text:p>
          </table:table-cell>
          <table:table-cell office:value-type="float" office:value="24812.75" calcext:value-type="float">
            <text:p>2481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14:31.600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076.2" calcext:value-type="float">
            <text:p>2076.2</text:p>
          </table:table-cell>
          <table:table-cell office:value-type="float" office:value="0" calcext:value-type="float">
            <text:p>0</text:p>
          </table:table-cell>
          <table:table-cell office:value-type="float" office:value="2200.4" calcext:value-type="float">
            <text:p>2200.4</text:p>
          </table:table-cell>
          <table:table-cell office:value-type="float" office:value="2243.1" calcext:value-type="float">
            <text:p>2243.1</text:p>
          </table:table-cell>
          <table:table-cell office:value-type="float" office:value="-42.6999999999998" calcext:value-type="float">
            <text:p>-42.6999999999998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18:58.800</text:p>
          </table:table-cell>
          <table:table-cell office:value-type="string" calcext:value-type="string">
            <text:p>2025-09-30 14:18:58.800</text:p>
          </table:table-cell>
          <table:table-cell office:value-type="string" calcext:value-type="string">
            <text:p>SHORT</text:p>
          </table:table-cell>
          <table:table-cell office:value-type="float" office:value="24805.75" calcext:value-type="float">
            <text:p>24805.75</text:p>
          </table:table-cell>
          <table:table-cell office:value-type="float" office:value="24795.75" calcext:value-type="float">
            <text:p>24795.75</text:p>
          </table:table-cell>
          <table:table-cell office:value-type="float" office:value="24810.75" calcext:value-type="float">
            <text:p>2481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19:01.300</text:p>
          </table:table-cell>
          <table:table-cell office:value-type="float" office:value="80" calcext:value-type="float">
            <text:p>80</text:p>
          </table:table-cell>
          <table:table-cell office:value-type="float" office:value="-43" calcext:value-type="float">
            <text:p>-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65.5" calcext:value-type="float">
            <text:p>226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89.7" calcext:value-type="float">
            <text:p>238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22:55.200</text:p>
          </table:table-cell>
          <table:table-cell office:value-type="string" calcext:value-type="string">
            <text:p>2025-09-30 14:22:55.200</text:p>
          </table:table-cell>
          <table:table-cell office:value-type="string" calcext:value-type="string">
            <text:p>LONG</text:p>
          </table:table-cell>
          <table:table-cell office:value-type="float" office:value="24815.5" calcext:value-type="float">
            <text:p>24815.5</text:p>
          </table:table-cell>
          <table:table-cell office:value-type="float" office:value="24825.5" calcext:value-type="float">
            <text:p>24825.5</text:p>
          </table:table-cell>
          <table:table-cell office:value-type="float" office:value="24810.5" calcext:value-type="float">
            <text:p>248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22:56.100</text:p>
          </table:table-cell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54.8" calcext:value-type="float">
            <text:p>2154.8</text:p>
          </table:table-cell>
          <table:table-cell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2389.7" calcext:value-type="float">
            <text:p>2389.7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29:40.700</text:p>
          </table:table-cell>
          <table:table-cell office:value-type="string" calcext:value-type="string">
            <text:p>2025-09-30 14:29:40.700</text:p>
          </table:table-cell>
          <table:table-cell office:value-type="string" calcext:value-type="string">
            <text:p>SHORT</text:p>
          </table:table-cell>
          <table:table-cell office:value-type="float" office:value="24827.5" calcext:value-type="float">
            <text:p>24827.5</text:p>
          </table:table-cell>
          <table:table-cell office:value-type="float" office:value="24817.5" calcext:value-type="float">
            <text:p>24817.5</text:p>
          </table:table-cell>
          <table:table-cell office:value-type="float" office:value="24832.5" calcext:value-type="float">
            <text:p>2483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29:43.400</text:p>
          </table:table-cell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8:32:49.8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044.1" calcext:value-type="float">
            <text:p>2044.1</text:p>
          </table:table-cell>
          <table:table-cell office:value-type="float" office:value="2" calcext:value-type="float">
            <text:p>2</text:p>
          </table:table-cell>
          <table:table-cell office:value-type="float" office:value="2168.3" calcext:value-type="float">
            <text:p>2168.3</text:p>
          </table:table-cell>
          <table:table-cell office:value-type="float" office:value="2389.7" calcext:value-type="float">
            <text:p>2389.7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32:58.600</text:p>
          </table:table-cell>
          <table:table-cell office:value-type="string" calcext:value-type="string">
            <text:p>2025-09-30 14:32:58.600</text:p>
          </table:table-cell>
          <table:table-cell office:value-type="string" calcext:value-type="string">
            <text:p>SHORT</text:p>
          </table:table-cell>
          <table:table-cell office:value-type="float" office:value="24828" calcext:value-type="float">
            <text:p>24828</text:p>
          </table:table-cell>
          <table:table-cell office:value-type="float" office:value="24818" calcext:value-type="float">
            <text:p>24818</text:p>
          </table:table-cell>
          <table:table-cell office:value-type="float" office:value="24833" calcext:value-type="float">
            <text:p>2483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33:01.800</text:p>
          </table:table-cell>
          <table:table-cell office:value-type="float" office:value="156" calcext:value-type="float">
            <text:p>15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09-30 18:33:53.3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33.4" calcext:value-type="float">
            <text:p>2233.4</text:p>
          </table:table-cell>
          <table:table-cell office:value-type="float" office:value="0" calcext:value-type="float">
            <text:p>0</text:p>
          </table:table-cell>
          <table:table-cell office:value-type="float" office:value="2357.6" calcext:value-type="float">
            <text:p>2357.6</text:p>
          </table:table-cell>
          <table:table-cell office:value-type="float" office:value="2389.7" calcext:value-type="float">
            <text:p>2389.7</text:p>
          </table:table-cell>
          <table:table-cell office:value-type="float" office:value="-32.0999999999995" calcext:value-type="float">
            <text:p>-32.0999999999995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39:53.600</text:p>
          </table:table-cell>
          <table:table-cell office:value-type="string" calcext:value-type="string">
            <text:p>2025-09-30 14:39:53.600</text:p>
          </table:table-cell>
          <table:table-cell office:value-type="string" calcext:value-type="string">
            <text:p>LONG</text:p>
          </table:table-cell>
          <table:table-cell office:value-type="float" office:value="24827.25" calcext:value-type="float">
            <text:p>24827.25</text:p>
          </table:table-cell>
          <table:table-cell office:value-type="float" office:value="24837.25" calcext:value-type="float">
            <text:p>24837.25</text:p>
          </table:table-cell>
          <table:table-cell office:value-type="float" office:value="24822.25" calcext:value-type="float">
            <text:p>2482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8:39:54.60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12.7" calcext:value-type="float">
            <text:p>2112.7</text:p>
          </table:table-cell>
          <table:table-cell office:value-type="float" office:value="1" calcext:value-type="float">
            <text:p>1</text:p>
          </table:table-cell>
          <table:table-cell office:value-type="float" office:value="2236.9" calcext:value-type="float">
            <text:p>2236.9</text:p>
          </table:table-cell>
          <table:table-cell office:value-type="float" office:value="2389.7" calcext:value-type="float">
            <text:p>2389.7</text:p>
          </table:table-cell>
          <table:table-cell office:value-type="float" office:value="-152.799999999999" calcext:value-type="float">
            <text:p>-152.7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41:31.200</text:p>
          </table:table-cell>
          <table:table-cell office:value-type="string" calcext:value-type="string">
            <text:p>2025-09-30 14:41:31.200</text:p>
          </table:table-cell>
          <table:table-cell office:value-type="string" calcext:value-type="string">
            <text:p>LONG</text:p>
          </table:table-cell>
          <table:table-cell office:value-type="float" office:value="24829" calcext:value-type="float">
            <text:p>24829</text:p>
          </table:table-cell>
          <table:table-cell office:value-type="float" office:value="24839" calcext:value-type="float">
            <text:p>24839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8:41:32.200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2116.2" calcext:value-type="float">
            <text:p>2116.2</text:p>
          </table:table-cell>
          <table:table-cell office:value-type="float" office:value="2389.7" calcext:value-type="float">
            <text:p>2389.7</text:p>
          </table:table-cell>
          <table:table-cell office:value-type="float" office:value="-273.499999999999" calcext:value-type="float">
            <text:p>-273.4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44:21.700</text:p>
          </table:table-cell>
          <table:table-cell office:value-type="string" calcext:value-type="string">
            <text:p>2025-09-30 14:44:21.700</text:p>
          </table:table-cell>
          <table:table-cell office:value-type="string" calcext:value-type="string">
            <text:p>SHORT</text:p>
          </table:table-cell>
          <table:table-cell office:value-type="float" office:value="24837.25" calcext:value-type="float">
            <text:p>24837.25</text:p>
          </table:table-cell>
          <table:table-cell office:value-type="float" office:value="24827.25" calcext:value-type="float">
            <text:p>24827.25</text:p>
          </table:table-cell>
          <table:table-cell office:value-type="float" office:value="24842.25" calcext:value-type="float">
            <text:p>2484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44:22.200</text:p>
          </table:table-cell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81.3" calcext:value-type="float">
            <text:p>2181.3</text:p>
          </table:table-cell>
          <table:table-cell office:value-type="float" office:value="0" calcext:value-type="float">
            <text:p>0</text:p>
          </table:table-cell>
          <table:table-cell office:value-type="float" office:value="2305.5" calcext:value-type="float">
            <text:p>2305.5</text:p>
          </table:table-cell>
          <table:table-cell office:value-type="float" office:value="2389.7" calcext:value-type="float">
            <text:p>2389.7</text:p>
          </table:table-cell>
          <table:table-cell office:value-type="float" office:value="-84.1999999999989" calcext:value-type="float">
            <text:p>-84.199999999998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44:45.100</text:p>
          </table:table-cell>
          <table:table-cell office:value-type="string" calcext:value-type="string">
            <text:p>2025-09-30 14:44:45.100</text:p>
          </table:table-cell>
          <table:table-cell office:value-type="string" calcext:value-type="string">
            <text:p>SHORT</text:p>
          </table:table-cell>
          <table:table-cell office:value-type="float" office:value="24839.5" calcext:value-type="float">
            <text:p>24839.5</text:p>
          </table:table-cell>
          <table:table-cell office:value-type="float" office:value="24829.5" calcext:value-type="float">
            <text:p>24829.5</text:p>
          </table:table-cell>
          <table:table-cell office:value-type="float" office:value="24844.5" calcext:value-type="float">
            <text:p>2484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44:46.6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370.6" calcext:value-type="float">
            <text:p>237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4.8" calcext:value-type="float">
            <text:p>249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46:24.700</text:p>
          </table:table-cell>
          <table:table-cell office:value-type="string" calcext:value-type="string">
            <text:p>2025-09-30 14:46:24.700</text:p>
          </table:table-cell>
          <table:table-cell office:value-type="string" calcext:value-type="string">
            <text:p>SHORT</text:p>
          </table:table-cell>
          <table:table-cell office:value-type="float" office:value="24835" calcext:value-type="float">
            <text:p>24835</text:p>
          </table:table-cell>
          <table:table-cell office:value-type="float" office:value="24825" calcext:value-type="float">
            <text:p>24825</text:p>
          </table:table-cell>
          <table:table-cell office:value-type="float" office:value="24840" calcext:value-type="float">
            <text:p>2484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8:46:25.00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559.9" calcext:value-type="float">
            <text:p>2559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4.1" calcext:value-type="float">
            <text:p>268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8:52:02.100</text:p>
          </table:table-cell>
          <table:table-cell office:value-type="string" calcext:value-type="string">
            <text:p>2025-09-30 14:52:02.100</text:p>
          </table:table-cell>
          <table:table-cell office:value-type="string" calcext:value-type="string">
            <text:p>SHORT</text:p>
          </table:table-cell>
          <table:table-cell office:value-type="float" office:value="24844.5" calcext:value-type="float">
            <text:p>24844.5</text:p>
          </table:table-cell>
          <table:table-cell office:value-type="float" office:value="24834.5" calcext:value-type="float">
            <text:p>24834.5</text:p>
          </table:table-cell>
          <table:table-cell office:value-type="float" office:value="24849.5" calcext:value-type="float">
            <text:p>2484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8:52:03.100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8:53:41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439.2" calcext:value-type="float">
            <text:p>2439.2</text:p>
          </table:table-cell>
          <table:table-cell office:value-type="float" office:value="1" calcext:value-type="float">
            <text:p>1</text:p>
          </table:table-cell>
          <table:table-cell office:value-type="float" office:value="2563.4" calcext:value-type="float">
            <text:p>2563.4</text:p>
          </table:table-cell>
          <table:table-cell office:value-type="float" office:value="2684.1" calcext:value-type="float">
            <text:p>2684.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14:33.700</text:p>
          </table:table-cell>
          <table:table-cell office:value-type="string" calcext:value-type="string">
            <text:p>2025-09-30 15:14:33.700</text:p>
          </table:table-cell>
          <table:table-cell office:value-type="string" calcext:value-type="string">
            <text:p>LONG</text:p>
          </table:table-cell>
          <table:table-cell office:value-type="float" office:value="24830" calcext:value-type="float">
            <text:p>24830</text:p>
          </table:table-cell>
          <table:table-cell office:value-type="float" office:value="24840" calcext:value-type="float">
            <text:p>24840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9:14:33.9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9:15:34.9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328.5" calcext:value-type="float">
            <text:p>2328.5</text:p>
          </table:table-cell>
          <table:table-cell office:value-type="float" office:value="2" calcext:value-type="float">
            <text:p>2</text:p>
          </table:table-cell>
          <table:table-cell office:value-type="float" office:value="2452.7" calcext:value-type="float">
            <text:p>2452.7</text:p>
          </table:table-cell>
          <table:table-cell office:value-type="float" office:value="2684.1" calcext:value-type="float">
            <text:p>2684.1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17:03.700</text:p>
          </table:table-cell>
          <table:table-cell office:value-type="string" calcext:value-type="string">
            <text:p>2025-09-30 15:17:03.700</text:p>
          </table:table-cell>
          <table:table-cell office:value-type="string" calcext:value-type="string">
            <text:p>LONG</text:p>
          </table:table-cell>
          <table:table-cell office:value-type="float" office:value="24827.25" calcext:value-type="float">
            <text:p>24827.25</text:p>
          </table:table-cell>
          <table:table-cell office:value-type="float" office:value="24837.25" calcext:value-type="float">
            <text:p>24837.25</text:p>
          </table:table-cell>
          <table:table-cell office:value-type="float" office:value="24822.25" calcext:value-type="float">
            <text:p>2482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09-30 19:17:03.900</text:p>
          </table:table-cell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17.8" calcext:value-type="float">
            <text:p>2217.8</text:p>
          </table:table-cell>
          <table:table-cell office:value-type="float" office:value="3" calcext:value-type="float">
            <text:p>3</text:p>
          </table:table-cell>
          <table:table-cell office:value-type="float" office:value="2342" calcext:value-type="float">
            <text:p>2342</text:p>
          </table:table-cell>
          <table:table-cell office:value-type="float" office:value="2684.1" calcext:value-type="float">
            <text:p>2684.1</text:p>
          </table:table-cell>
          <table:table-cell office:value-type="float" office:value="-342.099999999999" calcext:value-type="float">
            <text:p>-342.0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19:27.900</text:p>
          </table:table-cell>
          <table:table-cell office:value-type="string" calcext:value-type="string">
            <text:p>2025-09-30 15:19:27.900</text:p>
          </table:table-cell>
          <table:table-cell office:value-type="string" calcext:value-type="string">
            <text:p>SHORT</text:p>
          </table:table-cell>
          <table:table-cell office:value-type="float" office:value="24833.5" calcext:value-type="float">
            <text:p>24833.5</text:p>
          </table:table-cell>
          <table:table-cell office:value-type="float" office:value="24823.5" calcext:value-type="float">
            <text:p>24823.5</text:p>
          </table:table-cell>
          <table:table-cell office:value-type="float" office:value="24838.5" calcext:value-type="float">
            <text:p>2483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9:19:28.900</text:p>
          </table:table-cell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81.4" calcext:value-type="float">
            <text:p>2281.4</text:p>
          </table:table-cell>
          <table:table-cell office:value-type="float" office:value="0" calcext:value-type="float">
            <text:p>0</text:p>
          </table:table-cell>
          <table:table-cell office:value-type="float" office:value="2521.3" calcext:value-type="float">
            <text:p>2521.3</text:p>
          </table:table-cell>
          <table:table-cell office:value-type="float" office:value="2684.1" calcext:value-type="float">
            <text:p>2684.1</text:p>
          </table:table-cell>
          <table:table-cell office:value-type="float" office:value="-162.799999999999" calcext:value-type="float">
            <text:p>-162.7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24:27.600</text:p>
          </table:table-cell>
          <table:table-cell office:value-type="string" calcext:value-type="string">
            <text:p>2025-09-30 15:24:27.600</text:p>
          </table:table-cell>
          <table:table-cell office:value-type="string" calcext:value-type="string">
            <text:p>LONG</text:p>
          </table:table-cell>
          <table:table-cell office:value-type="float" office:value="24850.25" calcext:value-type="float">
            <text:p>24850.25</text:p>
          </table:table-cell>
          <table:table-cell office:value-type="float" office:value="24860.25" calcext:value-type="float">
            <text:p>24860.25</text:p>
          </table:table-cell>
          <table:table-cell office:value-type="float" office:value="24845.25" calcext:value-type="float">
            <text:p>24845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9:24:28.600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60.7" calcext:value-type="float">
            <text:p>2160.7</text:p>
          </table:table-cell>
          <table:table-cell office:value-type="float" office:value="1" calcext:value-type="float">
            <text:p>1</text:p>
          </table:table-cell>
          <table:table-cell office:value-type="float" office:value="2400.6" calcext:value-type="float">
            <text:p>2400.6</text:p>
          </table:table-cell>
          <table:table-cell office:value-type="float" office:value="2684.1" calcext:value-type="float">
            <text:p>2684.1</text:p>
          </table:table-cell>
          <table:table-cell office:value-type="float" office:value="-283.499999999999" calcext:value-type="float">
            <text:p>-283.4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24:52.700</text:p>
          </table:table-cell>
          <table:table-cell office:value-type="string" calcext:value-type="string">
            <text:p>2025-09-30 15:24:52.700</text:p>
          </table:table-cell>
          <table:table-cell office:value-type="string" calcext:value-type="string">
            <text:p>SHORT</text:p>
          </table:table-cell>
          <table:table-cell office:value-type="float" office:value="24851.5" calcext:value-type="float">
            <text:p>24851.5</text:p>
          </table:table-cell>
          <table:table-cell office:value-type="float" office:value="24841.5" calcext:value-type="float">
            <text:p>24841.5</text:p>
          </table:table-cell>
          <table:table-cell office:value-type="float" office:value="24856.5" calcext:value-type="float">
            <text:p>2485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9:24:53.700</text:p>
          </table:table-cell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office:value-type="float" office:value="2584.9" calcext:value-type="float">
            <text:p>2584.9</text:p>
          </table:table-cell>
          <table:table-cell office:value-type="float" office:value="2684.1" calcext:value-type="float">
            <text:p>2684.1</text:p>
          </table:table-cell>
          <table:table-cell office:value-type="float" office:value="-99.1999999999989" calcext:value-type="float">
            <text:p>-99.199999999998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26:06.700</text:p>
          </table:table-cell>
          <table:table-cell office:value-type="string" calcext:value-type="string">
            <text:p>2025-09-30 15:26:06.700</text:p>
          </table:table-cell>
          <table:table-cell office:value-type="string" calcext:value-type="string">
            <text:p>LONG</text:p>
          </table:table-cell>
          <table:table-cell office:value-type="float" office:value="24857" calcext:value-type="float">
            <text:p>24857</text:p>
          </table:table-cell>
          <table:table-cell office:value-type="float" office:value="24867" calcext:value-type="float">
            <text:p>24867</text:p>
          </table:table-cell>
          <table:table-cell office:value-type="float" office:value="24852" calcext:value-type="float">
            <text:p>2485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9:26:07.70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29.3" calcext:value-type="float">
            <text:p>2229.3</text:p>
          </table:table-cell>
          <table:table-cell office:value-type="float" office:value="1" calcext:value-type="float">
            <text:p>1</text:p>
          </table:table-cell>
          <table:table-cell office:value-type="float" office:value="2469.2" calcext:value-type="float">
            <text:p>2469.2</text:p>
          </table:table-cell>
          <table:table-cell office:value-type="float" office:value="2684.1" calcext:value-type="float">
            <text:p>2684.1</text:p>
          </table:table-cell>
          <table:table-cell office:value-type="float" office:value="-214.899999999999" calcext:value-type="float">
            <text:p>-214.8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27:47.200</text:p>
          </table:table-cell>
          <table:table-cell office:value-type="string" calcext:value-type="string">
            <text:p>2025-09-30 15:27:47.200</text:p>
          </table:table-cell>
          <table:table-cell office:value-type="string" calcext:value-type="string">
            <text:p>LONG</text:p>
          </table:table-cell>
          <table:table-cell office:value-type="float" office:value="24863.75" calcext:value-type="float">
            <text:p>24863.75</text:p>
          </table:table-cell>
          <table:table-cell office:value-type="float" office:value="24873.75" calcext:value-type="float">
            <text:p>24873.75</text:p>
          </table:table-cell>
          <table:table-cell office:value-type="float" office:value="24858.75" calcext:value-type="float">
            <text:p>2485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9:27:48.200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09-30 19:28:31.9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08.6" calcext:value-type="float">
            <text:p>2108.6</text:p>
          </table:table-cell>
          <table:table-cell office:value-type="float" office:value="2" calcext:value-type="float">
            <text:p>2</text:p>
          </table:table-cell>
          <table:table-cell office:value-type="float" office:value="2348.5" calcext:value-type="float">
            <text:p>2348.5</text:p>
          </table:table-cell>
          <table:table-cell office:value-type="float" office:value="2684.1" calcext:value-type="float">
            <text:p>2684.1</text:p>
          </table:table-cell>
          <table:table-cell office:value-type="float" office:value="-335.599999999999" calcext:value-type="float">
            <text:p>-335.59999999999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2025-09-30 19:29:24.400</text:p>
          </table:table-cell>
          <table:table-cell office:value-type="string" calcext:value-type="string">
            <text:p>2025-09-30 15:29:24.400</text:p>
          </table:table-cell>
          <table:table-cell office:value-type="string" calcext:value-type="string">
            <text:p>LONG</text:p>
          </table:table-cell>
          <table:table-cell office:value-type="float" office:value="24857.75" calcext:value-type="float">
            <text:p>24857.75</text:p>
          </table:table-cell>
          <table:table-cell office:value-type="float" office:value="24867.75" calcext:value-type="float">
            <text:p>24867.75</text:p>
          </table:table-cell>
          <table:table-cell office:value-type="float" office:value="24852.75" calcext:value-type="float">
            <text:p>2485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09-30 19:29:25.40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4763" calcext:value-type="float">
            <text:p>24763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987.9" calcext:value-type="float">
            <text:p>1987.9</text:p>
          </table:table-cell>
          <table:table-cell office:value-type="float" office:value="3" calcext:value-type="float">
            <text:p>3</text:p>
          </table:table-cell>
          <table:table-cell office:value-type="float" office:value="2227.8" calcext:value-type="float">
            <text:p>2227.8</text:p>
          </table:table-cell>
          <table:table-cell office:value-type="float" office:value="2684.1" calcext:value-type="float">
            <text:p>2684.1</text:p>
          </table:table-cell>
          <table:table-cell office:value-type="float" office:value="-456.299999999998" calcext:value-type="float">
            <text:p>-456.29999999999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3:40:28.500</text:p>
          </table:table-cell>
          <table:table-cell office:value-type="string" calcext:value-type="string">
            <text:p>2025-10-02 09:40:28.500</text:p>
          </table:table-cell>
          <table:table-cell office:value-type="string" calcext:value-type="string">
            <text:p>LONG</text:p>
          </table:table-cell>
          <table:table-cell office:value-type="float" office:value="25076.5" calcext:value-type="float">
            <text:p>25076.5</text:p>
          </table:table-cell>
          <table:table-cell office:value-type="float" office:value="25086.5" calcext:value-type="float">
            <text:p>25086.5</text:p>
          </table:table-cell>
          <table:table-cell office:value-type="float" office:value="25071.5" calcext:value-type="float">
            <text:p>2507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3:40:30.00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3:59:33.200</text:p>
          </table:table-cell>
          <table:table-cell office:value-type="string" calcext:value-type="string">
            <text:p>2025-10-02 09:59:33.200</text:p>
          </table:table-cell>
          <table:table-cell office:value-type="string" calcext:value-type="string">
            <text:p>SHORT</text:p>
          </table:table-cell>
          <table:table-cell office:value-type="float" office:value="25059.5" calcext:value-type="float">
            <text:p>25059.5</text:p>
          </table:table-cell>
          <table:table-cell office:value-type="float" office:value="25049.5" calcext:value-type="float">
            <text:p>25049.5</text:p>
          </table:table-cell>
          <table:table-cell office:value-type="float" office:value="25064.5" calcext:value-type="float">
            <text:p>2506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3:59:34.200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4:00:28.2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68.6" calcext:value-type="float">
            <text:p>36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8.6" calcext:value-type="float">
            <text:p>36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04:11.700</text:p>
          </table:table-cell>
          <table:table-cell office:value-type="string" calcext:value-type="string">
            <text:p>2025-10-02 10:04:11.700</text:p>
          </table:table-cell>
          <table:table-cell office:value-type="string" calcext:value-type="string">
            <text:p>LONG</text:p>
          </table:table-cell>
          <table:table-cell office:value-type="float" office:value="25066" calcext:value-type="float">
            <text:p>25066</text:p>
          </table:table-cell>
          <table:table-cell office:value-type="float" office:value="25076" calcext:value-type="float">
            <text:p>25076</text:p>
          </table:table-cell>
          <table:table-cell office:value-type="float" office:value="25061" calcext:value-type="float">
            <text:p>2506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04:16.20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4:05:11.3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57.9" calcext:value-type="float">
            <text:p>55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7.9" calcext:value-type="float">
            <text:p>5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05:52.600</text:p>
          </table:table-cell>
          <table:table-cell office:value-type="string" calcext:value-type="string">
            <text:p>2025-10-02 10:05:52.600</text:p>
          </table:table-cell>
          <table:table-cell office:value-type="string" calcext:value-type="string">
            <text:p>SHORT</text:p>
          </table:table-cell>
          <table:table-cell office:value-type="float" office:value="25075.75" calcext:value-type="float">
            <text:p>25075.75</text:p>
          </table:table-cell>
          <table:table-cell office:value-type="float" office:value="25065.75" calcext:value-type="float">
            <text:p>25065.75</text:p>
          </table:table-cell>
          <table:table-cell office:value-type="float" office:value="25080.75" calcext:value-type="float">
            <text:p>2508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05:55.100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47.2" calcext:value-type="float">
            <text:p>447.2</text:p>
          </table:table-cell>
          <table:table-cell office:value-type="float" office:value="1" calcext:value-type="float">
            <text:p>1</text:p>
          </table:table-cell>
          <table:table-cell office:value-type="float" office:value="447.2" calcext:value-type="float">
            <text:p>447.2</text:p>
          </table:table-cell>
          <table:table-cell office:value-type="float" office:value="557.9" calcext:value-type="float">
            <text:p>557.9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06:20.200</text:p>
          </table:table-cell>
          <table:table-cell office:value-type="string" calcext:value-type="string">
            <text:p>2025-10-02 10:06:20.200</text:p>
          </table:table-cell>
          <table:table-cell office:value-type="string" calcext:value-type="string">
            <text:p>SHORT</text:p>
          </table:table-cell>
          <table:table-cell office:value-type="float" office:value="25074.75" calcext:value-type="float">
            <text:p>25074.75</text:p>
          </table:table-cell>
          <table:table-cell office:value-type="float" office:value="25064.75" calcext:value-type="float">
            <text:p>25064.75</text:p>
          </table:table-cell>
          <table:table-cell office:value-type="float" office:value="25079.75" calcext:value-type="float">
            <text:p>2507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06:25.000</text:p>
          </table:table-cell>
          <table:table-cell office:value-type="float" office:value="89" calcext:value-type="float">
            <text:p>89</text:p>
          </table:table-cell>
          <table:table-cell office:value-type="float" office:value="-41" calcext:value-type="float">
            <text:p>-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4:06:46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636.5" calcext:value-type="float">
            <text:p>63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6.5" calcext:value-type="float">
            <text:p>6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08:47.000</text:p>
          </table:table-cell>
          <table:table-cell office:value-type="string" calcext:value-type="string">
            <text:p>2025-10-02 10:08:47.000</text:p>
          </table:table-cell>
          <table:table-cell office:value-type="string" calcext:value-type="string">
            <text:p>SHORT</text:p>
          </table:table-cell>
          <table:table-cell office:value-type="float" office:value="25072.25" calcext:value-type="float">
            <text:p>25072.25</text:p>
          </table:table-cell>
          <table:table-cell office:value-type="float" office:value="25062.25" calcext:value-type="float">
            <text:p>25062.25</text:p>
          </table:table-cell>
          <table:table-cell office:value-type="float" office:value="25077.25" calcext:value-type="float">
            <text:p>2507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08:51.200</text:p>
          </table:table-cell>
          <table:table-cell office:value-type="float" office:value="83" calcext:value-type="float">
            <text:p>8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4:09:06.1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25.8" calcext:value-type="float">
            <text:p>525.8</text:p>
          </table:table-cell>
          <table:table-cell office:value-type="float" office:value="1" calcext:value-type="float">
            <text:p>1</text:p>
          </table:table-cell>
          <table:table-cell office:value-type="float" office:value="525.8" calcext:value-type="float">
            <text:p>525.8</text:p>
          </table:table-cell>
          <table:table-cell office:value-type="float" office:value="636.5" calcext:value-type="float">
            <text:p>636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14:44.800</text:p>
          </table:table-cell>
          <table:table-cell office:value-type="string" calcext:value-type="string">
            <text:p>2025-10-02 10:14:44.800</text:p>
          </table:table-cell>
          <table:table-cell office:value-type="string" calcext:value-type="string">
            <text:p>SHORT</text:p>
          </table:table-cell>
          <table:table-cell office:value-type="float" office:value="25061.75" calcext:value-type="float">
            <text:p>25061.75</text:p>
          </table:table-cell>
          <table:table-cell office:value-type="float" office:value="25051.75" calcext:value-type="float">
            <text:p>25051.75</text:p>
          </table:table-cell>
          <table:table-cell office:value-type="float" office:value="25066.75" calcext:value-type="float">
            <text:p>2506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14:46.400</text:p>
          </table:table-cell>
          <table:table-cell office:value-type="float" office:value="179" calcext:value-type="float">
            <text:p>179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4:15:39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15.1" calcext:value-type="float">
            <text:p>415.1</text:p>
          </table:table-cell>
          <table:table-cell office:value-type="float" office:value="2" calcext:value-type="float">
            <text:p>2</text:p>
          </table:table-cell>
          <table:table-cell office:value-type="float" office:value="415.1" calcext:value-type="float">
            <text:p>415.1</text:p>
          </table:table-cell>
          <table:table-cell office:value-type="float" office:value="636.5" calcext:value-type="float">
            <text:p>636.5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20:56.200</text:p>
          </table:table-cell>
          <table:table-cell office:value-type="string" calcext:value-type="string">
            <text:p>2025-10-02 10:20:56.200</text:p>
          </table:table-cell>
          <table:table-cell office:value-type="string" calcext:value-type="string">
            <text:p>SHORT</text:p>
          </table:table-cell>
          <table:table-cell office:value-type="float" office:value="25052.75" calcext:value-type="float">
            <text:p>25052.75</text:p>
          </table:table-cell>
          <table:table-cell office:value-type="float" office:value="25042.75" calcext:value-type="float">
            <text:p>25042.75</text:p>
          </table:table-cell>
          <table:table-cell office:value-type="float" office:value="25057.75" calcext:value-type="float">
            <text:p>2505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20:59.100</text:p>
          </table:table-cell>
          <table:table-cell office:value-type="float" office:value="258" calcext:value-type="float">
            <text:p>258</text:p>
          </table:table-cell>
          <table:table-cell office:value-type="float" office:value="-140" calcext:value-type="float">
            <text:p>-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604.4" calcext:value-type="float">
            <text:p>604.4</text:p>
          </table:table-cell>
          <table:table-cell office:value-type="float" office:value="0" calcext:value-type="float">
            <text:p>0</text:p>
          </table:table-cell>
          <table:table-cell office:value-type="float" office:value="604.4" calcext:value-type="float">
            <text:p>604.4</text:p>
          </table:table-cell>
          <table:table-cell office:value-type="float" office:value="636.5" calcext:value-type="float">
            <text:p>636.5</text:p>
          </table:table-cell>
          <table:table-cell office:value-type="float" office:value="-32.1" calcext:value-type="float">
            <text:p>-32.1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22:25.000</text:p>
          </table:table-cell>
          <table:table-cell office:value-type="string" calcext:value-type="string">
            <text:p>2025-10-02 10:22:25.000</text:p>
          </table:table-cell>
          <table:table-cell office:value-type="string" calcext:value-type="string">
            <text:p>SHORT</text:p>
          </table:table-cell>
          <table:table-cell office:value-type="float" office:value="25056.25" calcext:value-type="float">
            <text:p>25056.25</text:p>
          </table:table-cell>
          <table:table-cell office:value-type="float" office:value="25046.25" calcext:value-type="float">
            <text:p>25046.25</text:p>
          </table:table-cell>
          <table:table-cell office:value-type="float" office:value="25061.25" calcext:value-type="float">
            <text:p>2506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22:26.800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793.7" calcext:value-type="float">
            <text:p>79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3.7" calcext:value-type="float">
            <text:p>79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29:59.200</text:p>
          </table:table-cell>
          <table:table-cell office:value-type="string" calcext:value-type="string">
            <text:p>2025-10-02 10:29:59.200</text:p>
          </table:table-cell>
          <table:table-cell office:value-type="string" calcext:value-type="string">
            <text:p>LONG</text:p>
          </table:table-cell>
          <table:table-cell office:value-type="float" office:value="25076" calcext:value-type="float">
            <text:p>25076</text:p>
          </table:table-cell>
          <table:table-cell office:value-type="float" office:value="25086" calcext:value-type="float">
            <text:p>25086</text:p>
          </table:table-cell>
          <table:table-cell office:value-type="float" office:value="25071" calcext:value-type="float">
            <text:p>2507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4:30:00.2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4:30:33.7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32:37.900</text:p>
          </table:table-cell>
          <table:table-cell office:value-type="string" calcext:value-type="string">
            <text:p>2025-10-02 10:32:37.900</text:p>
          </table:table-cell>
          <table:table-cell office:value-type="string" calcext:value-type="string">
            <text:p>SHORT</text:p>
          </table:table-cell>
          <table:table-cell office:value-type="float" office:value="25073.5" calcext:value-type="float">
            <text:p>25073.5</text:p>
          </table:table-cell>
          <table:table-cell office:value-type="float" office:value="25063.5" calcext:value-type="float">
            <text:p>25063.5</text:p>
          </table:table-cell>
          <table:table-cell office:value-type="float" office:value="25078.5" calcext:value-type="float">
            <text:p>2507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4:32:38.900</text:p>
          </table:table-cell>
          <table:table-cell office:value-type="float" office:value="85" calcext:value-type="float">
            <text:p>85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4:33:43.2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62.3" calcext:value-type="float">
            <text:p>1162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2.3" calcext:value-type="float">
            <text:p>116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46:04.200</text:p>
          </table:table-cell>
          <table:table-cell office:value-type="string" calcext:value-type="string">
            <text:p>2025-10-02 10:46:04.200</text:p>
          </table:table-cell>
          <table:table-cell office:value-type="string" calcext:value-type="string">
            <text:p>LONG</text:p>
          </table:table-cell>
          <table:table-cell office:value-type="float" office:value="25053.5" calcext:value-type="float">
            <text:p>25053.5</text:p>
          </table:table-cell>
          <table:table-cell office:value-type="float" office:value="25063.5" calcext:value-type="float">
            <text:p>25063.5</text:p>
          </table:table-cell>
          <table:table-cell office:value-type="float" office:value="25048.5" calcext:value-type="float">
            <text:p>2504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4:46:05.20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46.6" calcext:value-type="float">
            <text:p>134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6.6" calcext:value-type="float">
            <text:p>134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48:36.600</text:p>
          </table:table-cell>
          <table:table-cell office:value-type="string" calcext:value-type="string">
            <text:p>2025-10-02 10:48:36.600</text:p>
          </table:table-cell>
          <table:table-cell office:value-type="string" calcext:value-type="string">
            <text:p>LONG</text:p>
          </table:table-cell>
          <table:table-cell office:value-type="float" office:value="25050" calcext:value-type="float">
            <text:p>25050</text:p>
          </table:table-cell>
          <table:table-cell office:value-type="float" office:value="25060" calcext:value-type="float">
            <text:p>25060</text:p>
          </table:table-cell>
          <table:table-cell office:value-type="float" office:value="25045" calcext:value-type="float">
            <text:p>2504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48:38.400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35.9" calcext:value-type="float">
            <text:p>153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5.9" calcext:value-type="float">
            <text:p>15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48:37.500</text:p>
          </table:table-cell>
          <table:table-cell office:value-type="string" calcext:value-type="string">
            <text:p>2025-10-02 10:48:37.500</text:p>
          </table:table-cell>
          <table:table-cell office:value-type="string" calcext:value-type="string">
            <text:p>LONG</text:p>
          </table:table-cell>
          <table:table-cell office:value-type="float" office:value="25050.75" calcext:value-type="float">
            <text:p>25050.75</text:p>
          </table:table-cell>
          <table:table-cell office:value-type="float" office:value="25060.75" calcext:value-type="float">
            <text:p>25060.75</text:p>
          </table:table-cell>
          <table:table-cell office:value-type="float" office:value="25045.75" calcext:value-type="float">
            <text:p>2504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4:48:40.700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25.2" calcext:value-type="float">
            <text:p>1725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.2" calcext:value-type="float">
            <text:p>17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4:53:50.200</text:p>
          </table:table-cell>
          <table:table-cell office:value-type="string" calcext:value-type="string">
            <text:p>2025-10-02 10:53:50.200</text:p>
          </table:table-cell>
          <table:table-cell office:value-type="string" calcext:value-type="string">
            <text:p>LONG</text:p>
          </table:table-cell>
          <table:table-cell office:value-type="float" office:value="25035.5" calcext:value-type="float">
            <text:p>25035.5</text:p>
          </table:table-cell>
          <table:table-cell office:value-type="float" office:value="25045.5" calcext:value-type="float">
            <text:p>25045.5</text:p>
          </table:table-cell>
          <table:table-cell office:value-type="float" office:value="25030.5" calcext:value-type="float">
            <text:p>2503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4:53:51.200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04.5" calcext:value-type="float">
            <text:p>190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04.5" calcext:value-type="float">
            <text:p>19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06:56.300</text:p>
          </table:table-cell>
          <table:table-cell office:value-type="string" calcext:value-type="string">
            <text:p>2025-10-02 11:06:56.300</text:p>
          </table:table-cell>
          <table:table-cell office:value-type="string" calcext:value-type="string">
            <text:p>LONG</text:p>
          </table:table-cell>
          <table:table-cell office:value-type="float" office:value="25019.5" calcext:value-type="float">
            <text:p>25019.5</text:p>
          </table:table-cell>
          <table:table-cell office:value-type="float" office:value="25029.5" calcext:value-type="float">
            <text:p>25029.5</text:p>
          </table:table-cell>
          <table:table-cell office:value-type="float" office:value="25014.5" calcext:value-type="float">
            <text:p>2501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06:57.000</text:p>
          </table:table-cell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93.8" calcext:value-type="float">
            <text:p>1793.8</text:p>
          </table:table-cell>
          <table:table-cell office:value-type="float" office:value="1" calcext:value-type="float">
            <text:p>1</text:p>
          </table:table-cell>
          <table:table-cell office:value-type="float" office:value="1793.8" calcext:value-type="float">
            <text:p>1793.8</text:p>
          </table:table-cell>
          <table:table-cell office:value-type="float" office:value="1904.5" calcext:value-type="float">
            <text:p>1904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11:48.000</text:p>
          </table:table-cell>
          <table:table-cell office:value-type="string" calcext:value-type="string">
            <text:p>2025-10-02 11:11:48.000</text:p>
          </table:table-cell>
          <table:table-cell office:value-type="string" calcext:value-type="string">
            <text:p>SHORT</text:p>
          </table:table-cell>
          <table:table-cell office:value-type="float" office:value="25035.25" calcext:value-type="float">
            <text:p>25035.25</text:p>
          </table:table-cell>
          <table:table-cell office:value-type="float" office:value="25025.25" calcext:value-type="float">
            <text:p>25025.25</text:p>
          </table:table-cell>
          <table:table-cell office:value-type="float" office:value="25040.25" calcext:value-type="float">
            <text:p>2504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5:11:49.000</text:p>
          </table:table-cell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5:11:52.6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73.1" calcext:value-type="float">
            <text:p>1673.1</text:p>
          </table:table-cell>
          <table:table-cell office:value-type="float" office:value="2" calcext:value-type="float">
            <text:p>2</text:p>
          </table:table-cell>
          <table:table-cell office:value-type="float" office:value="1673.1" calcext:value-type="float">
            <text:p>1673.1</text:p>
          </table:table-cell>
          <table:table-cell office:value-type="float" office:value="1904.5" calcext:value-type="float">
            <text:p>1904.5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18:46.800</text:p>
          </table:table-cell>
          <table:table-cell office:value-type="string" calcext:value-type="string">
            <text:p>2025-10-02 11:18:46.800</text:p>
          </table:table-cell>
          <table:table-cell office:value-type="string" calcext:value-type="string">
            <text:p>SHORT</text:p>
          </table:table-cell>
          <table:table-cell office:value-type="float" office:value="25032.5" calcext:value-type="float">
            <text:p>25032.5</text:p>
          </table:table-cell>
          <table:table-cell office:value-type="float" office:value="25022.5" calcext:value-type="float">
            <text:p>25022.5</text:p>
          </table:table-cell>
          <table:table-cell office:value-type="float" office:value="25037.5" calcext:value-type="float">
            <text:p>2503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18:47.200</text:p>
          </table:table-cell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62.4" calcext:value-type="float">
            <text:p>1862.4</text:p>
          </table:table-cell>
          <table:table-cell office:value-type="float" office:value="0" calcext:value-type="float">
            <text:p>0</text:p>
          </table:table-cell>
          <table:table-cell office:value-type="float" office:value="1862.4" calcext:value-type="float">
            <text:p>1862.4</text:p>
          </table:table-cell>
          <table:table-cell office:value-type="float" office:value="1904.5" calcext:value-type="float">
            <text:p>1904.5</text:p>
          </table:table-cell>
          <table:table-cell office:value-type="float" office:value="-42.1000000000001" calcext:value-type="float">
            <text:p>-42.1000000000001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20:34.800</text:p>
          </table:table-cell>
          <table:table-cell office:value-type="string" calcext:value-type="string">
            <text:p>2025-10-02 11:20:34.800</text:p>
          </table:table-cell>
          <table:table-cell office:value-type="string" calcext:value-type="string">
            <text:p>SHORT</text:p>
          </table:table-cell>
          <table:table-cell office:value-type="float" office:value="25023.5" calcext:value-type="float">
            <text:p>25023.5</text:p>
          </table:table-cell>
          <table:table-cell office:value-type="float" office:value="25013.5" calcext:value-type="float">
            <text:p>25013.5</text:p>
          </table:table-cell>
          <table:table-cell office:value-type="float" office:value="25028.5" calcext:value-type="float">
            <text:p>2502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5:20:35.800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41.7" calcext:value-type="float">
            <text:p>2041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1.7" calcext:value-type="float">
            <text:p>204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22:41.000</text:p>
          </table:table-cell>
          <table:table-cell office:value-type="string" calcext:value-type="string">
            <text:p>2025-10-02 11:22:41.000</text:p>
          </table:table-cell>
          <table:table-cell office:value-type="string" calcext:value-type="string">
            <text:p>SHORT</text:p>
          </table:table-cell>
          <table:table-cell office:value-type="float" office:value="25036" calcext:value-type="float">
            <text:p>25036</text:p>
          </table:table-cell>
          <table:table-cell office:value-type="float" office:value="25026" calcext:value-type="float">
            <text:p>25026</text:p>
          </table:table-cell>
          <table:table-cell office:value-type="float" office:value="25041" calcext:value-type="float">
            <text:p>2504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22:41.100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24:45.300</text:p>
          </table:table-cell>
          <table:table-cell office:value-type="string" calcext:value-type="string">
            <text:p>2025-10-02 11:24:45.300</text:p>
          </table:table-cell>
          <table:table-cell office:value-type="string" calcext:value-type="string">
            <text:p>SHORT</text:p>
          </table:table-cell>
          <table:table-cell office:value-type="float" office:value="25050" calcext:value-type="float">
            <text:p>25050</text:p>
          </table:table-cell>
          <table:table-cell office:value-type="float" office:value="25040" calcext:value-type="float">
            <text:p>25040</text:p>
          </table:table-cell>
          <table:table-cell office:value-type="float" office:value="25055" calcext:value-type="float">
            <text:p>2505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24:45.700</text:p>
          </table:table-cell>
          <table:table-cell office:value-type="float" office:value="144" calcext:value-type="float">
            <text:p>14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120.3" calcext:value-type="float">
            <text:p>2120.3</text:p>
          </table:table-cell>
          <table:table-cell office:value-type="float" office:value="1" calcext:value-type="float">
            <text:p>1</text:p>
          </table:table-cell>
          <table:table-cell office:value-type="float" office:value="2120.3" calcext:value-type="float">
            <text:p>2120.3</text:p>
          </table:table-cell>
          <table:table-cell office:value-type="float" office:value="2231" calcext:value-type="float">
            <text:p>223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25:11.500</text:p>
          </table:table-cell>
          <table:table-cell office:value-type="string" calcext:value-type="string">
            <text:p>2025-10-02 11:25:11.500</text:p>
          </table:table-cell>
          <table:table-cell office:value-type="string" calcext:value-type="string">
            <text:p>LONG</text:p>
          </table:table-cell>
          <table:table-cell office:value-type="float" office:value="25040.5" calcext:value-type="float">
            <text:p>25040.5</text:p>
          </table:table-cell>
          <table:table-cell office:value-type="float" office:value="25050.5" calcext:value-type="float">
            <text:p>25050.5</text:p>
          </table:table-cell>
          <table:table-cell office:value-type="float" office:value="25035.5" calcext:value-type="float">
            <text:p>2503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25:13.00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5:26:04.8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09.6" calcext:value-type="float">
            <text:p>2009.6</text:p>
          </table:table-cell>
          <table:table-cell office:value-type="float" office:value="2" calcext:value-type="float">
            <text:p>2</text:p>
          </table:table-cell>
          <table:table-cell office:value-type="float" office:value="2009.6" calcext:value-type="float">
            <text:p>2009.6</text:p>
          </table:table-cell>
          <table:table-cell office:value-type="float" office:value="2231" calcext:value-type="float">
            <text:p>223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26:48.500</text:p>
          </table:table-cell>
          <table:table-cell office:value-type="string" calcext:value-type="string">
            <text:p>2025-10-02 11:26:48.500</text:p>
          </table:table-cell>
          <table:table-cell office:value-type="string" calcext:value-type="string">
            <text:p>SHORT</text:p>
          </table:table-cell>
          <table:table-cell office:value-type="float" office:value="25041.25" calcext:value-type="float">
            <text:p>25041.25</text:p>
          </table:table-cell>
          <table:table-cell office:value-type="float" office:value="25031.25" calcext:value-type="float">
            <text:p>25031.25</text:p>
          </table:table-cell>
          <table:table-cell office:value-type="float" office:value="25046.25" calcext:value-type="float">
            <text:p>2504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5:26:49.500</text:p>
          </table:table-cell>
          <table:table-cell office:value-type="float" office:value="130" calcext:value-type="float">
            <text:p>13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5:27:14.4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88.9" calcext:value-type="float">
            <text:p>1888.9</text:p>
          </table:table-cell>
          <table:table-cell office:value-type="float" office:value="3" calcext:value-type="float">
            <text:p>3</text:p>
          </table:table-cell>
          <table:table-cell office:value-type="float" office:value="1888.9" calcext:value-type="float">
            <text:p>1888.9</text:p>
          </table:table-cell>
          <table:table-cell office:value-type="float" office:value="2231" calcext:value-type="float">
            <text:p>2231</text:p>
          </table:table-cell>
          <table:table-cell office:value-type="float" office:value="-342.1" calcext:value-type="float">
            <text:p>-342.1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50:27.900</text:p>
          </table:table-cell>
          <table:table-cell office:value-type="string" calcext:value-type="string">
            <text:p>2025-10-02 11:50:27.900</text:p>
          </table:table-cell>
          <table:table-cell office:value-type="string" calcext:value-type="string">
            <text:p>SHORT</text:p>
          </table:table-cell>
          <table:table-cell office:value-type="float" office:value="25037.75" calcext:value-type="float">
            <text:p>25037.75</text:p>
          </table:table-cell>
          <table:table-cell office:value-type="float" office:value="25027.75" calcext:value-type="float">
            <text:p>25027.75</text:p>
          </table:table-cell>
          <table:table-cell office:value-type="float" office:value="25042.75" calcext:value-type="float">
            <text:p>2504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5:50:28.900</text:p>
          </table:table-cell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46.8" calcext:value-type="float">
            <text:p>1846.8</text:p>
          </table:table-cell>
          <table:table-cell office:value-type="float" office:value="0" calcext:value-type="float">
            <text:p>0</text:p>
          </table:table-cell>
          <table:table-cell office:value-type="float" office:value="2073.2" calcext:value-type="float">
            <text:p>2073.2</text:p>
          </table:table-cell>
          <table:table-cell office:value-type="float" office:value="2231" calcext:value-type="float">
            <text:p>2231</text:p>
          </table:table-cell>
          <table:table-cell office:value-type="float" office:value="-157.8" calcext:value-type="float">
            <text:p>-157.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50:40.800</text:p>
          </table:table-cell>
          <table:table-cell office:value-type="string" calcext:value-type="string">
            <text:p>2025-10-02 11:50:40.800</text:p>
          </table:table-cell>
          <table:table-cell office:value-type="string" calcext:value-type="string">
            <text:p>SHORT</text:p>
          </table:table-cell>
          <table:table-cell office:value-type="float" office:value="25042.25" calcext:value-type="float">
            <text:p>25042.25</text:p>
          </table:table-cell>
          <table:table-cell office:value-type="float" office:value="25032.25" calcext:value-type="float">
            <text:p>25032.25</text:p>
          </table:table-cell>
          <table:table-cell office:value-type="float" office:value="25047.25" calcext:value-type="float">
            <text:p>2504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50:41.60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36.1" calcext:value-type="float">
            <text:p>2036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2.5" calcext:value-type="float">
            <text:p>226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51:38.500</text:p>
          </table:table-cell>
          <table:table-cell office:value-type="string" calcext:value-type="string">
            <text:p>2025-10-02 11:51:38.500</text:p>
          </table:table-cell>
          <table:table-cell office:value-type="string" calcext:value-type="string">
            <text:p>SHORT</text:p>
          </table:table-cell>
          <table:table-cell office:value-type="float" office:value="25044" calcext:value-type="float">
            <text:p>25044</text:p>
          </table:table-cell>
          <table:table-cell office:value-type="float" office:value="25034" calcext:value-type="float">
            <text:p>25034</text:p>
          </table:table-cell>
          <table:table-cell office:value-type="float" office:value="25049" calcext:value-type="float">
            <text:p>2504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5:51:39.500</text:p>
          </table:table-cell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15.4" calcext:value-type="float">
            <text:p>2215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1.8" calcext:value-type="float">
            <text:p>244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5:54:48.000</text:p>
          </table:table-cell>
          <table:table-cell office:value-type="string" calcext:value-type="string">
            <text:p>2025-10-02 11:54:48.000</text:p>
          </table:table-cell>
          <table:table-cell office:value-type="string" calcext:value-type="string">
            <text:p>LONG</text:p>
          </table:table-cell>
          <table:table-cell office:value-type="float" office:value="25059.5" calcext:value-type="float">
            <text:p>25059.5</text:p>
          </table:table-cell>
          <table:table-cell office:value-type="float" office:value="25069.5" calcext:value-type="float">
            <text:p>25069.5</text:p>
          </table:table-cell>
          <table:table-cell office:value-type="float" office:value="25054.5" calcext:value-type="float">
            <text:p>2505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5:54:48.80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104.7" calcext:value-type="float">
            <text:p>2104.7</text:p>
          </table:table-cell>
          <table:table-cell office:value-type="float" office:value="1" calcext:value-type="float">
            <text:p>1</text:p>
          </table:table-cell>
          <table:table-cell office:value-type="float" office:value="2331.1" calcext:value-type="float">
            <text:p>2331.1</text:p>
          </table:table-cell>
          <table:table-cell office:value-type="float" office:value="2441.8" calcext:value-type="float">
            <text:p>2441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05:10.400</text:p>
          </table:table-cell>
          <table:table-cell office:value-type="string" calcext:value-type="string">
            <text:p>2025-10-02 12:05:10.400</text:p>
          </table:table-cell>
          <table:table-cell office:value-type="string" calcext:value-type="string">
            <text:p>SHORT</text:p>
          </table:table-cell>
          <table:table-cell office:value-type="float" office:value="25056.25" calcext:value-type="float">
            <text:p>25056.25</text:p>
          </table:table-cell>
          <table:table-cell office:value-type="float" office:value="25046.25" calcext:value-type="float">
            <text:p>25046.25</text:p>
          </table:table-cell>
          <table:table-cell office:value-type="float" office:value="25061.25" calcext:value-type="float">
            <text:p>2506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05:10.600</text:p>
          </table:table-cell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6:05:22.5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20.4" calcext:value-type="float">
            <text:p>25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11:52.400</text:p>
          </table:table-cell>
          <table:table-cell office:value-type="string" calcext:value-type="string">
            <text:p>2025-10-02 12:11:52.400</text:p>
          </table:table-cell>
          <table:table-cell office:value-type="string" calcext:value-type="string">
            <text:p>SHORT</text:p>
          </table:table-cell>
          <table:table-cell office:value-type="float" office:value="25052.75" calcext:value-type="float">
            <text:p>25052.75</text:p>
          </table:table-cell>
          <table:table-cell office:value-type="float" office:value="25042.75" calcext:value-type="float">
            <text:p>25042.75</text:p>
          </table:table-cell>
          <table:table-cell office:value-type="float" office:value="25057.75" calcext:value-type="float">
            <text:p>2505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11:53.100</text:p>
          </table:table-cell>
          <table:table-cell office:value-type="float" office:value="80" calcext:value-type="float">
            <text:p>8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83.3" calcext:value-type="float">
            <text:p>248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09.7" calcext:value-type="float">
            <text:p>270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12:12.400</text:p>
          </table:table-cell>
          <table:table-cell office:value-type="string" calcext:value-type="string">
            <text:p>2025-10-02 12:12:12.400</text:p>
          </table:table-cell>
          <table:table-cell office:value-type="string" calcext:value-type="string">
            <text:p>SHORT</text:p>
          </table:table-cell>
          <table:table-cell office:value-type="float" office:value="25058.75" calcext:value-type="float">
            <text:p>25058.75</text:p>
          </table:table-cell>
          <table:table-cell office:value-type="float" office:value="25048.75" calcext:value-type="float">
            <text:p>25048.75</text:p>
          </table:table-cell>
          <table:table-cell office:value-type="float" office:value="25063.75" calcext:value-type="float">
            <text:p>2506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12:13.400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6:16:41.6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62.6" calcext:value-type="float">
            <text:p>2362.6</text:p>
          </table:table-cell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 office:value-type="float" office:value="2709.7" calcext:value-type="float">
            <text:p>2709.7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16:46.900</text:p>
          </table:table-cell>
          <table:table-cell office:value-type="string" calcext:value-type="string">
            <text:p>2025-10-02 12:16:46.900</text:p>
          </table:table-cell>
          <table:table-cell office:value-type="string" calcext:value-type="string">
            <text:p>LONG</text:p>
          </table:table-cell>
          <table:table-cell office:value-type="float" office:value="25064.75" calcext:value-type="float">
            <text:p>25064.75</text:p>
          </table:table-cell>
          <table:table-cell office:value-type="float" office:value="25074.75" calcext:value-type="float">
            <text:p>25074.75</text:p>
          </table:table-cell>
          <table:table-cell office:value-type="float" office:value="25059.75" calcext:value-type="float">
            <text:p>2505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16:49.80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51.9" calcext:value-type="float">
            <text:p>2551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8.3" calcext:value-type="float">
            <text:p>277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16:50.300</text:p>
          </table:table-cell>
          <table:table-cell office:value-type="string" calcext:value-type="string">
            <text:p>2025-10-02 12:16:50.300</text:p>
          </table:table-cell>
          <table:table-cell office:value-type="string" calcext:value-type="string">
            <text:p>SHORT</text:p>
          </table:table-cell>
          <table:table-cell office:value-type="float" office:value="25066" calcext:value-type="float">
            <text:p>25066</text:p>
          </table:table-cell>
          <table:table-cell office:value-type="float" office:value="25056" calcext:value-type="float">
            <text:p>25056</text:p>
          </table:table-cell>
          <table:table-cell office:value-type="float" office:value="25071" calcext:value-type="float">
            <text:p>2507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16:51.300</text:p>
          </table:table-cell>
          <table:table-cell office:value-type="float" office:value="85" calcext:value-type="float">
            <text:p>8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36.2" calcext:value-type="float">
            <text:p>2436.2</text:p>
          </table:table-cell>
          <table:table-cell office:value-type="float" office:value="1" calcext:value-type="float">
            <text:p>1</text:p>
          </table:table-cell>
          <table:table-cell office:value-type="float" office:value="2662.6" calcext:value-type="float">
            <text:p>2662.6</text:p>
          </table:table-cell>
          <table:table-cell office:value-type="float" office:value="2778.3" calcext:value-type="float">
            <text:p>2778.3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28:26.000</text:p>
          </table:table-cell>
          <table:table-cell office:value-type="string" calcext:value-type="string">
            <text:p>2025-10-02 12:28:26.000</text:p>
          </table:table-cell>
          <table:table-cell office:value-type="string" calcext:value-type="string">
            <text:p>LONG</text:p>
          </table:table-cell>
          <table:table-cell office:value-type="float" office:value="25064" calcext:value-type="float">
            <text:p>25064</text:p>
          </table:table-cell>
          <table:table-cell office:value-type="float" office:value="25074" calcext:value-type="float">
            <text:p>25074</text:p>
          </table:table-cell>
          <table:table-cell office:value-type="float" office:value="25059" calcext:value-type="float">
            <text:p>2505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28:27.00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20.5" calcext:value-type="float">
            <text:p>262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6.9" calcext:value-type="float">
            <text:p>284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31:43.200</text:p>
          </table:table-cell>
          <table:table-cell office:value-type="string" calcext:value-type="string">
            <text:p>2025-10-02 12:31:43.200</text:p>
          </table:table-cell>
          <table:table-cell office:value-type="string" calcext:value-type="string">
            <text:p>SHORT</text:p>
          </table:table-cell>
          <table:table-cell office:value-type="float" office:value="25063" calcext:value-type="float">
            <text:p>25063</text:p>
          </table:table-cell>
          <table:table-cell office:value-type="float" office:value="25053" calcext:value-type="float">
            <text:p>25053</text:p>
          </table:table-cell>
          <table:table-cell office:value-type="float" office:value="25068" calcext:value-type="float">
            <text:p>2506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31:44.200</text:p>
          </table:table-cell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6:35:52.6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04.8" calcext:value-type="float">
            <text:p>2504.8</text:p>
          </table:table-cell>
          <table:table-cell office:value-type="float" office:value="1" calcext:value-type="float">
            <text:p>1</text:p>
          </table:table-cell>
          <table:table-cell office:value-type="float" office:value="2731.2" calcext:value-type="float">
            <text:p>2731.2</text:p>
          </table:table-cell>
          <table:table-cell office:value-type="float" office:value="2846.9" calcext:value-type="float">
            <text:p>2846.9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36:54.600</text:p>
          </table:table-cell>
          <table:table-cell office:value-type="string" calcext:value-type="string">
            <text:p>2025-10-02 12:36:54.600</text:p>
          </table:table-cell>
          <table:table-cell office:value-type="string" calcext:value-type="string">
            <text:p>SHORT</text:p>
          </table:table-cell>
          <table:table-cell office:value-type="float" office:value="25061.5" calcext:value-type="float">
            <text:p>25061.5</text:p>
          </table:table-cell>
          <table:table-cell office:value-type="float" office:value="25051.5" calcext:value-type="float">
            <text:p>25051.5</text:p>
          </table:table-cell>
          <table:table-cell office:value-type="float" office:value="25066.5" calcext:value-type="float">
            <text:p>2506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36:55.600</text:p>
          </table:table-cell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84.1" calcext:value-type="float">
            <text:p>2384.1</text:p>
          </table:table-cell>
          <table:table-cell office:value-type="float" office:value="2" calcext:value-type="float">
            <text:p>2</text:p>
          </table:table-cell>
          <table:table-cell office:value-type="float" office:value="2610.5" calcext:value-type="float">
            <text:p>2610.5</text:p>
          </table:table-cell>
          <table:table-cell office:value-type="float" office:value="2846.9" calcext:value-type="float">
            <text:p>2846.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39:30.100</text:p>
          </table:table-cell>
          <table:table-cell office:value-type="string" calcext:value-type="string">
            <text:p>2025-10-02 12:39:30.100</text:p>
          </table:table-cell>
          <table:table-cell office:value-type="string" calcext:value-type="string">
            <text:p>SHORT</text:p>
          </table:table-cell>
          <table:table-cell office:value-type="float" office:value="25063.25" calcext:value-type="float">
            <text:p>25063.25</text:p>
          </table:table-cell>
          <table:table-cell office:value-type="float" office:value="25053.25" calcext:value-type="float">
            <text:p>25053.25</text:p>
          </table:table-cell>
          <table:table-cell office:value-type="float" office:value="25068.25" calcext:value-type="float">
            <text:p>2506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39:30.600</text:p>
          </table:table-cell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73.4" calcext:value-type="float">
            <text:p>2273.4</text:p>
          </table:table-cell>
          <table:table-cell office:value-type="float" office:value="3" calcext:value-type="float">
            <text:p>3</text:p>
          </table:table-cell>
          <table:table-cell office:value-type="float" office:value="2499.8" calcext:value-type="float">
            <text:p>2499.8</text:p>
          </table:table-cell>
          <table:table-cell office:value-type="float" office:value="2846.9" calcext:value-type="float">
            <text:p>2846.9</text:p>
          </table:table-cell>
          <table:table-cell office:value-type="float" office:value="-347.099999999999" calcext:value-type="float">
            <text:p>-347.09999999999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41:53.000</text:p>
          </table:table-cell>
          <table:table-cell office:value-type="string" calcext:value-type="string">
            <text:p>2025-10-02 12:41:53.000</text:p>
          </table:table-cell>
          <table:table-cell office:value-type="string" calcext:value-type="string">
            <text:p>SHORT</text:p>
          </table:table-cell>
          <table:table-cell office:value-type="float" office:value="25042" calcext:value-type="float">
            <text:p>25042</text:p>
          </table:table-cell>
          <table:table-cell office:value-type="float" office:value="25032" calcext:value-type="float">
            <text:p>25032</text:p>
          </table:table-cell>
          <table:table-cell office:value-type="float" office:value="25047" calcext:value-type="float">
            <text:p>2504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41:56.200</text:p>
          </table:table-cell>
          <table:table-cell office:value-type="float" office:value="79" calcext:value-type="float">
            <text:p>79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62.7" calcext:value-type="float">
            <text:p>2462.7</text:p>
          </table:table-cell>
          <table:table-cell office:value-type="float" office:value="0" calcext:value-type="float">
            <text:p>0</text:p>
          </table:table-cell>
          <table:table-cell office:value-type="float" office:value="2689.1" calcext:value-type="float">
            <text:p>2689.1</text:p>
          </table:table-cell>
          <table:table-cell office:value-type="float" office:value="2846.9" calcext:value-type="float">
            <text:p>2846.9</text:p>
          </table:table-cell>
          <table:table-cell office:value-type="float" office:value="-157.799999999999" calcext:value-type="float">
            <text:p>-157.79999999999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45:54.900</text:p>
          </table:table-cell>
          <table:table-cell office:value-type="string" calcext:value-type="string">
            <text:p>2025-10-02 12:45:54.900</text:p>
          </table:table-cell>
          <table:table-cell office:value-type="string" calcext:value-type="string">
            <text:p>LONG</text:p>
          </table:table-cell>
          <table:table-cell office:value-type="float" office:value="25058" calcext:value-type="float">
            <text:p>25058</text:p>
          </table:table-cell>
          <table:table-cell office:value-type="float" office:value="25068" calcext:value-type="float">
            <text:p>25068</text:p>
          </table:table-cell>
          <table:table-cell office:value-type="float" office:value="25053" calcext:value-type="float">
            <text:p>2505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45:55.90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6:47:12.8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2573.4" calcext:value-type="float">
            <text:p>2573.4</text:p>
          </table:table-cell>
          <table:table-cell office:value-type="float" office:value="2846.9" calcext:value-type="float">
            <text:p>2846.9</text:p>
          </table:table-cell>
          <table:table-cell office:value-type="float" office:value="-273.499999999999" calcext:value-type="float">
            <text:p>-273.49999999999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52:44.400</text:p>
          </table:table-cell>
          <table:table-cell office:value-type="string" calcext:value-type="string">
            <text:p>2025-10-02 12:52:44.400</text:p>
          </table:table-cell>
          <table:table-cell office:value-type="string" calcext:value-type="string">
            <text:p>SHORT</text:p>
          </table:table-cell>
          <table:table-cell office:value-type="float" office:value="25070" calcext:value-type="float">
            <text:p>25070</text:p>
          </table:table-cell>
          <table:table-cell office:value-type="float" office:value="25060" calcext:value-type="float">
            <text:p>25060</text:p>
          </table:table-cell>
          <table:table-cell office:value-type="float" office:value="25075" calcext:value-type="float">
            <text:p>250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52:44.700</text:p>
          </table:table-cell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36.3" calcext:value-type="float">
            <text:p>2536.3</text:p>
          </table:table-cell>
          <table:table-cell office:value-type="float" office:value="0" calcext:value-type="float">
            <text:p>0</text:p>
          </table:table-cell>
          <table:table-cell office:value-type="float" office:value="2762.7" calcext:value-type="float">
            <text:p>2762.7</text:p>
          </table:table-cell>
          <table:table-cell office:value-type="float" office:value="2846.9" calcext:value-type="float">
            <text:p>2846.9</text:p>
          </table:table-cell>
          <table:table-cell office:value-type="float" office:value="-84.1999999999989" calcext:value-type="float">
            <text:p>-84.199999999998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54:33.500</text:p>
          </table:table-cell>
          <table:table-cell office:value-type="string" calcext:value-type="string">
            <text:p>2025-10-02 12:54:33.500</text:p>
          </table:table-cell>
          <table:table-cell office:value-type="string" calcext:value-type="string">
            <text:p>SHORT</text:p>
          </table:table-cell>
          <table:table-cell office:value-type="float" office:value="25077" calcext:value-type="float">
            <text:p>25077</text:p>
          </table:table-cell>
          <table:table-cell office:value-type="float" office:value="25067" calcext:value-type="float">
            <text:p>25067</text:p>
          </table:table-cell>
          <table:table-cell office:value-type="float" office:value="25082" calcext:value-type="float">
            <text:p>2508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6:54:34.500</text:p>
          </table:table-cell>
          <table:table-cell office:value-type="float" office:value="101" calcext:value-type="float">
            <text:p>101</text:p>
          </table:table-cell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415.6" calcext:value-type="float">
            <text:p>2415.6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2846.9" calcext:value-type="float">
            <text:p>2846.9</text:p>
          </table:table-cell>
          <table:table-cell office:value-type="float" office:value="-204.899999999999" calcext:value-type="float">
            <text:p>-204.89999999999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54:45.500</text:p>
          </table:table-cell>
          <table:table-cell office:value-type="string" calcext:value-type="string">
            <text:p>2025-10-02 12:54:45.500</text:p>
          </table:table-cell>
          <table:table-cell office:value-type="string" calcext:value-type="string">
            <text:p>LONG</text:p>
          </table:table-cell>
          <table:table-cell office:value-type="float" office:value="25076.25" calcext:value-type="float">
            <text:p>25076.25</text:p>
          </table:table-cell>
          <table:table-cell office:value-type="float" office:value="25086.25" calcext:value-type="float">
            <text:p>25086.25</text:p>
          </table:table-cell>
          <table:table-cell office:value-type="float" office:value="25071.25" calcext:value-type="float">
            <text:p>2507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54:45.8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04.9" calcext:value-type="float">
            <text:p>2604.9</text:p>
          </table:table-cell>
          <table:table-cell office:value-type="float" office:value="0" calcext:value-type="float">
            <text:p>0</text:p>
          </table:table-cell>
          <table:table-cell office:value-type="float" office:value="2831.3" calcext:value-type="float">
            <text:p>2831.3</text:p>
          </table:table-cell>
          <table:table-cell office:value-type="float" office:value="2846.9" calcext:value-type="float">
            <text:p>2846.9</text:p>
          </table:table-cell>
          <table:table-cell office:value-type="float" office:value="-15.5999999999985" calcext:value-type="float">
            <text:p>-15.5999999999985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56:55.100</text:p>
          </table:table-cell>
          <table:table-cell office:value-type="string" calcext:value-type="string">
            <text:p>2025-10-02 12:56:55.100</text:p>
          </table:table-cell>
          <table:table-cell office:value-type="string" calcext:value-type="string">
            <text:p>SHORT</text:p>
          </table:table-cell>
          <table:table-cell office:value-type="float" office:value="25072" calcext:value-type="float">
            <text:p>25072</text:p>
          </table:table-cell>
          <table:table-cell office:value-type="float" office:value="25062" calcext:value-type="float">
            <text:p>25062</text:p>
          </table:table-cell>
          <table:table-cell office:value-type="float" office:value="25077" calcext:value-type="float">
            <text:p>2507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56:56.600</text:p>
          </table:table-cell>
          <table:table-cell office:value-type="float" office:value="181" calcext:value-type="float">
            <text:p>18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6:58:12.3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94.2" calcext:value-type="float">
            <text:p>2494.2</text:p>
          </table:table-cell>
          <table:table-cell office:value-type="float" office:value="1" calcext:value-type="float">
            <text:p>1</text:p>
          </table:table-cell>
          <table:table-cell office:value-type="float" office:value="2720.6" calcext:value-type="float">
            <text:p>2720.6</text:p>
          </table:table-cell>
          <table:table-cell office:value-type="float" office:value="2846.9" calcext:value-type="float">
            <text:p>2846.9</text:p>
          </table:table-cell>
          <table:table-cell office:value-type="float" office:value="-126.299999999998" calcext:value-type="float">
            <text:p>-126.29999999999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6:58:28.700</text:p>
          </table:table-cell>
          <table:table-cell office:value-type="string" calcext:value-type="string">
            <text:p>2025-10-02 12:58:28.700</text:p>
          </table:table-cell>
          <table:table-cell office:value-type="string" calcext:value-type="string">
            <text:p>SHORT</text:p>
          </table:table-cell>
          <table:table-cell office:value-type="float" office:value="25075.5" calcext:value-type="float">
            <text:p>25075.5</text:p>
          </table:table-cell>
          <table:table-cell office:value-type="float" office:value="25065.5" calcext:value-type="float">
            <text:p>25065.5</text:p>
          </table:table-cell>
          <table:table-cell office:value-type="float" office:value="25080.5" calcext:value-type="float">
            <text:p>2508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6:58:31.400</text:p>
          </table:table-cell>
          <table:table-cell office:value-type="float" office:value="95" calcext:value-type="float">
            <text:p>95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83.5" calcext:value-type="float">
            <text:p>2383.5</text:p>
          </table:table-cell>
          <table:table-cell office:value-type="float" office:value="2" calcext:value-type="float">
            <text:p>2</text:p>
          </table:table-cell>
          <table:table-cell office:value-type="float" office:value="2609.9" calcext:value-type="float">
            <text:p>2609.9</text:p>
          </table:table-cell>
          <table:table-cell office:value-type="float" office:value="2846.9" calcext:value-type="float">
            <text:p>2846.9</text:p>
          </table:table-cell>
          <table:table-cell office:value-type="float" office:value="-236.999999999998" calcext:value-type="float">
            <text:p>-236.99999999999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23:08.700</text:p>
          </table:table-cell>
          <table:table-cell office:value-type="string" calcext:value-type="string">
            <text:p>2025-10-02 13:23:08.700</text:p>
          </table:table-cell>
          <table:table-cell office:value-type="string" calcext:value-type="string">
            <text:p>SHORT</text:p>
          </table:table-cell>
          <table:table-cell office:value-type="float" office:value="25083.75" calcext:value-type="float">
            <text:p>25083.75</text:p>
          </table:table-cell>
          <table:table-cell office:value-type="float" office:value="25073.75" calcext:value-type="float">
            <text:p>25073.75</text:p>
          </table:table-cell>
          <table:table-cell office:value-type="float" office:value="25088.75" calcext:value-type="float">
            <text:p>2508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7:23:09.70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562.8" calcext:value-type="float">
            <text:p>2562.8</text:p>
          </table:table-cell>
          <table:table-cell office:value-type="float" office:value="0" calcext:value-type="float">
            <text:p>0</text:p>
          </table:table-cell>
          <table:table-cell office:value-type="float" office:value="2789.2" calcext:value-type="float">
            <text:p>2789.2</text:p>
          </table:table-cell>
          <table:table-cell office:value-type="float" office:value="2846.9" calcext:value-type="float">
            <text:p>2846.9</text:p>
          </table:table-cell>
          <table:table-cell office:value-type="float" office:value="-57.699999999998" calcext:value-type="float">
            <text:p>-57.69999999999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23:27.400</text:p>
          </table:table-cell>
          <table:table-cell office:value-type="string" calcext:value-type="string">
            <text:p>2025-10-02 13:23:27.400</text:p>
          </table:table-cell>
          <table:table-cell office:value-type="string" calcext:value-type="string">
            <text:p>SHORT</text:p>
          </table:table-cell>
          <table:table-cell office:value-type="float" office:value="25083.75" calcext:value-type="float">
            <text:p>25083.75</text:p>
          </table:table-cell>
          <table:table-cell office:value-type="float" office:value="25073.75" calcext:value-type="float">
            <text:p>25073.75</text:p>
          </table:table-cell>
          <table:table-cell office:value-type="float" office:value="25088.75" calcext:value-type="float">
            <text:p>2508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23:31.80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752.1" calcext:value-type="float">
            <text:p>275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78.5" calcext:value-type="float">
            <text:p>297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25:38.200</text:p>
          </table:table-cell>
          <table:table-cell office:value-type="string" calcext:value-type="string">
            <text:p>2025-10-02 13:25:38.200</text:p>
          </table:table-cell>
          <table:table-cell office:value-type="string" calcext:value-type="string">
            <text:p>SHORT</text:p>
          </table:table-cell>
          <table:table-cell office:value-type="float" office:value="25090.75" calcext:value-type="float">
            <text:p>25090.75</text:p>
          </table:table-cell>
          <table:table-cell office:value-type="float" office:value="25080.75" calcext:value-type="float">
            <text:p>25080.75</text:p>
          </table:table-cell>
          <table:table-cell office:value-type="float" office:value="25095.75" calcext:value-type="float">
            <text:p>2509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25:38.800</text:p>
          </table:table-cell>
          <table:table-cell office:value-type="float" office:value="99" calcext:value-type="float">
            <text:p>99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7:28:05.3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641.4" calcext:value-type="float">
            <text:p>2641.4</text:p>
          </table:table-cell>
          <table:table-cell office:value-type="float" office:value="1" calcext:value-type="float">
            <text:p>1</text:p>
          </table:table-cell>
          <table:table-cell office:value-type="float" office:value="2867.8" calcext:value-type="float">
            <text:p>2867.8</text:p>
          </table:table-cell>
          <table:table-cell office:value-type="float" office:value="2978.5" calcext:value-type="float">
            <text:p>2978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32:16.100</text:p>
          </table:table-cell>
          <table:table-cell office:value-type="string" calcext:value-type="string">
            <text:p>2025-10-02 13:32:16.100</text:p>
          </table:table-cell>
          <table:table-cell office:value-type="string" calcext:value-type="string">
            <text:p>SHORT</text:p>
          </table:table-cell>
          <table:table-cell office:value-type="float" office:value="25092.25" calcext:value-type="float">
            <text:p>25092.25</text:p>
          </table:table-cell>
          <table:table-cell office:value-type="float" office:value="25082.25" calcext:value-type="float">
            <text:p>25082.25</text:p>
          </table:table-cell>
          <table:table-cell office:value-type="float" office:value="25097.25" calcext:value-type="float">
            <text:p>2509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7:32:17.100</text:p>
          </table:table-cell>
          <table:table-cell office:value-type="float" office:value="348" calcext:value-type="float">
            <text:p>34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810.7" calcext:value-type="float">
            <text:p>281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37.1" calcext:value-type="float">
            <text:p>303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34:36.700</text:p>
          </table:table-cell>
          <table:table-cell office:value-type="string" calcext:value-type="string">
            <text:p>2025-10-02 13:34:36.700</text:p>
          </table:table-cell>
          <table:table-cell office:value-type="string" calcext:value-type="string">
            <text:p>SHORT</text:p>
          </table:table-cell>
          <table:table-cell office:value-type="float" office:value="25093.25" calcext:value-type="float">
            <text:p>25093.25</text:p>
          </table:table-cell>
          <table:table-cell office:value-type="float" office:value="25083.25" calcext:value-type="float">
            <text:p>25083.25</text:p>
          </table:table-cell>
          <table:table-cell office:value-type="float" office:value="25098.25" calcext:value-type="float">
            <text:p>2509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7:34:37.700</text:p>
          </table:table-cell>
          <table:table-cell office:value-type="float" office:value="134" calcext:value-type="float">
            <text:p>13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2 17:37:12.1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6.4" calcext:value-type="float">
            <text:p>32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42:48.700</text:p>
          </table:table-cell>
          <table:table-cell office:value-type="string" calcext:value-type="string">
            <text:p>2025-10-02 13:42:48.700</text:p>
          </table:table-cell>
          <table:table-cell office:value-type="string" calcext:value-type="string">
            <text:p>SHORT</text:p>
          </table:table-cell>
          <table:table-cell office:value-type="float" office:value="25106.75" calcext:value-type="float">
            <text:p>25106.75</text:p>
          </table:table-cell>
          <table:table-cell office:value-type="float" office:value="25096.75" calcext:value-type="float">
            <text:p>25096.75</text:p>
          </table:table-cell>
          <table:table-cell office:value-type="float" office:value="25111.75" calcext:value-type="float">
            <text:p>2511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42:48.90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879.3" calcext:value-type="float">
            <text:p>2879.3</text:p>
          </table:table-cell>
          <table:table-cell office:value-type="float" office:value="1" calcext:value-type="float">
            <text:p>1</text:p>
          </table:table-cell>
          <table:table-cell office:value-type="float" office:value="3105.7" calcext:value-type="float">
            <text:p>3105.7</text:p>
          </table:table-cell>
          <table:table-cell office:value-type="float" office:value="3216.4" calcext:value-type="float">
            <text:p>3216.4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44:59.800</text:p>
          </table:table-cell>
          <table:table-cell office:value-type="string" calcext:value-type="string">
            <text:p>2025-10-02 13:44:59.800</text:p>
          </table:table-cell>
          <table:table-cell office:value-type="string" calcext:value-type="string">
            <text:p>LONG</text:p>
          </table:table-cell>
          <table:table-cell office:value-type="float" office:value="25098" calcext:value-type="float">
            <text:p>25098</text:p>
          </table:table-cell>
          <table:table-cell office:value-type="float" office:value="25108" calcext:value-type="float">
            <text:p>25108</text:p>
          </table:table-cell>
          <table:table-cell office:value-type="float" office:value="25093" calcext:value-type="float">
            <text:p>2509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44:59.900</text:p>
          </table:table-cell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68.6" calcext:value-type="float">
            <text:p>306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46:19.600</text:p>
          </table:table-cell>
          <table:table-cell office:value-type="string" calcext:value-type="string">
            <text:p>2025-10-02 13:46:19.600</text:p>
          </table:table-cell>
          <table:table-cell office:value-type="string" calcext:value-type="string">
            <text:p>LONG</text:p>
          </table:table-cell>
          <table:table-cell office:value-type="float" office:value="25095.5" calcext:value-type="float">
            <text:p>25095.5</text:p>
          </table:table-cell>
          <table:table-cell office:value-type="float" office:value="25105.5" calcext:value-type="float">
            <text:p>25105.5</text:p>
          </table:table-cell>
          <table:table-cell office:value-type="float" office:value="25090.5" calcext:value-type="float">
            <text:p>2509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7:46:20.600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47.9" calcext:value-type="float">
            <text:p>324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74.3" calcext:value-type="float">
            <text:p>347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3:54.800</text:p>
          </table:table-cell>
          <table:table-cell office:value-type="string" calcext:value-type="string">
            <text:p>2025-10-02 13:53:54.800</text:p>
          </table:table-cell>
          <table:table-cell office:value-type="string" calcext:value-type="string">
            <text:p>LONG</text:p>
          </table:table-cell>
          <table:table-cell office:value-type="float" office:value="25094" calcext:value-type="float">
            <text:p>25094</text:p>
          </table:table-cell>
          <table:table-cell office:value-type="float" office:value="25104" calcext:value-type="float">
            <text:p>25104</text:p>
          </table:table-cell>
          <table:table-cell office:value-type="float" office:value="25089" calcext:value-type="float">
            <text:p>2508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3:55.60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3437.2" calcext:value-type="float">
            <text:p>343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63.60000000001" calcext:value-type="float">
            <text:p>3663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5:36.700</text:p>
          </table:table-cell>
          <table:table-cell office:value-type="string" calcext:value-type="string">
            <text:p>2025-10-02 13:55:36.700</text:p>
          </table:table-cell>
          <table:table-cell office:value-type="string" calcext:value-type="string">
            <text:p>LONG</text:p>
          </table:table-cell>
          <table:table-cell office:value-type="float" office:value="25083.5" calcext:value-type="float">
            <text:p>25083.5</text:p>
          </table:table-cell>
          <table:table-cell office:value-type="float" office:value="25093.5" calcext:value-type="float">
            <text:p>25093.5</text:p>
          </table:table-cell>
          <table:table-cell office:value-type="float" office:value="25078.5" calcext:value-type="float">
            <text:p>2507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5:39.500</text:p>
          </table:table-cell>
          <table:table-cell office:value-type="float" office:value="1066" calcext:value-type="float">
            <text:p>106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3326.5" calcext:value-type="float">
            <text:p>3326.5</text:p>
          </table:table-cell>
          <table:table-cell office:value-type="float" office:value="1" calcext:value-type="float">
            <text:p>1</text:p>
          </table:table-cell>
          <table:table-cell office:value-type="float" office:value="3552.90000000001" calcext:value-type="float">
            <text:p>3552.90000000001</text:p>
          </table:table-cell>
          <table:table-cell office:value-type="float" office:value="3663.60000000001" calcext:value-type="float">
            <text:p>3663.6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5:47.700</text:p>
          </table:table-cell>
          <table:table-cell office:value-type="string" calcext:value-type="string">
            <text:p>2025-10-02 13:55:47.700</text:p>
          </table:table-cell>
          <table:table-cell office:value-type="string" calcext:value-type="string">
            <text:p>SHORT</text:p>
          </table:table-cell>
          <table:table-cell office:value-type="float" office:value="25088.25" calcext:value-type="float">
            <text:p>25088.25</text:p>
          </table:table-cell>
          <table:table-cell office:value-type="float" office:value="25078.25" calcext:value-type="float">
            <text:p>25078.25</text:p>
          </table:table-cell>
          <table:table-cell office:value-type="float" office:value="25093.25" calcext:value-type="float">
            <text:p>2509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5:49.200</text:p>
          </table:table-cell>
          <table:table-cell office:value-type="float" office:value="197" calcext:value-type="float">
            <text:p>197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3515.8" calcext:value-type="float">
            <text:p>3515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42.20000000001" calcext:value-type="float">
            <text:p>3742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5:48.000</text:p>
          </table:table-cell>
          <table:table-cell office:value-type="string" calcext:value-type="string">
            <text:p>2025-10-02 13:55:48.000</text:p>
          </table:table-cell>
          <table:table-cell office:value-type="string" calcext:value-type="string">
            <text:p>SHORT</text:p>
          </table:table-cell>
          <table:table-cell office:value-type="float" office:value="25088.25" calcext:value-type="float">
            <text:p>25088.25</text:p>
          </table:table-cell>
          <table:table-cell office:value-type="float" office:value="25078.25" calcext:value-type="float">
            <text:p>25078.25</text:p>
          </table:table-cell>
          <table:table-cell office:value-type="float" office:value="25093.25" calcext:value-type="float">
            <text:p>2509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5:49.500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3705.10000000001" calcext:value-type="float">
            <text:p>3705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1.50000000001" calcext:value-type="float">
            <text:p>3931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5:49.700</text:p>
          </table:table-cell>
          <table:table-cell office:value-type="string" calcext:value-type="string">
            <text:p>2025-10-02 13:55:49.700</text:p>
          </table:table-cell>
          <table:table-cell office:value-type="string" calcext:value-type="string">
            <text:p>SHORT</text:p>
          </table:table-cell>
          <table:table-cell office:value-type="float" office:value="25088.25" calcext:value-type="float">
            <text:p>25088.25</text:p>
          </table:table-cell>
          <table:table-cell office:value-type="float" office:value="25078.25" calcext:value-type="float">
            <text:p>25078.25</text:p>
          </table:table-cell>
          <table:table-cell office:value-type="float" office:value="25093.25" calcext:value-type="float">
            <text:p>2509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5:52.000</text:p>
          </table:table-cell>
          <table:table-cell office:value-type="float" office:value="343" calcext:value-type="float">
            <text:p>34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3894.40000000001" calcext:value-type="float">
            <text:p>3894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20.80000000001" calcext:value-type="float">
            <text:p>4120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5:51.900</text:p>
          </table:table-cell>
          <table:table-cell office:value-type="string" calcext:value-type="string">
            <text:p>2025-10-02 13:55:51.900</text:p>
          </table:table-cell>
          <table:table-cell office:value-type="string" calcext:value-type="string">
            <text:p>SHORT</text:p>
          </table:table-cell>
          <table:table-cell office:value-type="float" office:value="25088.5" calcext:value-type="float">
            <text:p>25088.5</text:p>
          </table:table-cell>
          <table:table-cell office:value-type="float" office:value="25078.5" calcext:value-type="float">
            <text:p>25078.5</text:p>
          </table:table-cell>
          <table:table-cell office:value-type="float" office:value="25093.5" calcext:value-type="float">
            <text:p>2509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5:54.800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4083.70000000001" calcext:value-type="float">
            <text:p>4083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10.10000000001" calcext:value-type="float">
            <text:p>4310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5:52.100</text:p>
          </table:table-cell>
          <table:table-cell office:value-type="string" calcext:value-type="string">
            <text:p>2025-10-02 13:55:52.100</text:p>
          </table:table-cell>
          <table:table-cell office:value-type="string" calcext:value-type="string">
            <text:p>SHORT</text:p>
          </table:table-cell>
          <table:table-cell office:value-type="float" office:value="25088.25" calcext:value-type="float">
            <text:p>25088.25</text:p>
          </table:table-cell>
          <table:table-cell office:value-type="float" office:value="25078.25" calcext:value-type="float">
            <text:p>25078.25</text:p>
          </table:table-cell>
          <table:table-cell office:value-type="float" office:value="25093.25" calcext:value-type="float">
            <text:p>2509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5:54.80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4273.00000000001" calcext:value-type="float">
            <text:p>4273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99.40000000001" calcext:value-type="float">
            <text:p>4499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7:26.000</text:p>
          </table:table-cell>
          <table:table-cell office:value-type="string" calcext:value-type="string">
            <text:p>2025-10-02 13:57:26.000</text:p>
          </table:table-cell>
          <table:table-cell office:value-type="string" calcext:value-type="string">
            <text:p>SHORT</text:p>
          </table:table-cell>
          <table:table-cell office:value-type="float" office:value="25088.5" calcext:value-type="float">
            <text:p>25088.5</text:p>
          </table:table-cell>
          <table:table-cell office:value-type="float" office:value="25078.5" calcext:value-type="float">
            <text:p>25078.5</text:p>
          </table:table-cell>
          <table:table-cell office:value-type="float" office:value="25093.5" calcext:value-type="float">
            <text:p>2509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7:57:29.90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4462.30000000001" calcext:value-type="float">
            <text:p>4462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88.70000000001" calcext:value-type="float">
            <text:p>4688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7:59:28.700</text:p>
          </table:table-cell>
          <table:table-cell office:value-type="string" calcext:value-type="string">
            <text:p>2025-10-02 13:59:28.700</text:p>
          </table:table-cell>
          <table:table-cell office:value-type="string" calcext:value-type="string">
            <text:p>SHORT</text:p>
          </table:table-cell>
          <table:table-cell office:value-type="float" office:value="25087.75" calcext:value-type="float">
            <text:p>25087.75</text:p>
          </table:table-cell>
          <table:table-cell office:value-type="float" office:value="25077.75" calcext:value-type="float">
            <text:p>25077.75</text:p>
          </table:table-cell>
          <table:table-cell office:value-type="float" office:value="25092.75" calcext:value-type="float">
            <text:p>2509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7:59:29.700</text:p>
          </table:table-cell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4641.60000000001" calcext:value-type="float">
            <text:p>4641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68.00000000001" calcext:value-type="float">
            <text:p>4868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00:56.500</text:p>
          </table:table-cell>
          <table:table-cell office:value-type="string" calcext:value-type="string">
            <text:p>2025-10-02 14:00:56.500</text:p>
          </table:table-cell>
          <table:table-cell office:value-type="string" calcext:value-type="string">
            <text:p>SHORT</text:p>
          </table:table-cell>
          <table:table-cell office:value-type="float" office:value="25088.75" calcext:value-type="float">
            <text:p>25088.75</text:p>
          </table:table-cell>
          <table:table-cell office:value-type="float" office:value="25078.75" calcext:value-type="float">
            <text:p>25078.75</text:p>
          </table:table-cell>
          <table:table-cell office:value-type="float" office:value="25093.75" calcext:value-type="float">
            <text:p>2509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00:57.500</text:p>
          </table:table-cell>
          <table:table-cell office:value-type="float" office:value="88" calcext:value-type="float">
            <text:p>8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4825.90000000001" calcext:value-type="float">
            <text:p>4825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52.30000000001" calcext:value-type="float">
            <text:p>5052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08:10.400</text:p>
          </table:table-cell>
          <table:table-cell office:value-type="string" calcext:value-type="string">
            <text:p>2025-10-02 14:08:10.400</text:p>
          </table:table-cell>
          <table:table-cell office:value-type="string" calcext:value-type="string">
            <text:p>SHORT</text:p>
          </table:table-cell>
          <table:table-cell office:value-type="float" office:value="25090" calcext:value-type="float">
            <text:p>25090</text:p>
          </table:table-cell>
          <table:table-cell office:value-type="float" office:value="25080" calcext:value-type="float">
            <text:p>25080</text:p>
          </table:table-cell>
          <table:table-cell office:value-type="float" office:value="25095" calcext:value-type="float">
            <text:p>2509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08:11.400</text:p>
          </table:table-cell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5010.20000000001" calcext:value-type="float">
            <text:p>5010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6.60000000001" calcext:value-type="float">
            <text:p>5236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14:15.900</text:p>
          </table:table-cell>
          <table:table-cell office:value-type="string" calcext:value-type="string">
            <text:p>2025-10-02 14:14:15.900</text:p>
          </table:table-cell>
          <table:table-cell office:value-type="string" calcext:value-type="string">
            <text:p>SHORT</text:p>
          </table:table-cell>
          <table:table-cell office:value-type="float" office:value="25102.75" calcext:value-type="float">
            <text:p>25102.75</text:p>
          </table:table-cell>
          <table:table-cell office:value-type="float" office:value="25092.75" calcext:value-type="float">
            <text:p>25092.75</text:p>
          </table:table-cell>
          <table:table-cell office:value-type="float" office:value="25107.75" calcext:value-type="float">
            <text:p>2510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14:19.000</text:p>
          </table:table-cell>
          <table:table-cell office:value-type="float" office:value="75" calcext:value-type="float">
            <text:p>75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199.50000000001" calcext:value-type="float">
            <text:p>5199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25.90000000001" calcext:value-type="float">
            <text:p>5425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15:44.000</text:p>
          </table:table-cell>
          <table:table-cell office:value-type="string" calcext:value-type="string">
            <text:p>2025-10-02 14:15:44.000</text:p>
          </table:table-cell>
          <table:table-cell office:value-type="string" calcext:value-type="string">
            <text:p>SHORT</text:p>
          </table:table-cell>
          <table:table-cell office:value-type="float" office:value="25105.5" calcext:value-type="float">
            <text:p>25105.5</text:p>
          </table:table-cell>
          <table:table-cell office:value-type="float" office:value="25095.5" calcext:value-type="float">
            <text:p>25095.5</text:p>
          </table:table-cell>
          <table:table-cell office:value-type="float" office:value="25110.5" calcext:value-type="float">
            <text:p>251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15:45.0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388.80000000001" calcext:value-type="float">
            <text:p>5388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5.20000000001" calcext:value-type="float">
            <text:p>5615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17:29.100</text:p>
          </table:table-cell>
          <table:table-cell office:value-type="string" calcext:value-type="string">
            <text:p>2025-10-02 14:17:29.100</text:p>
          </table:table-cell>
          <table:table-cell office:value-type="string" calcext:value-type="string">
            <text:p>LONG</text:p>
          </table:table-cell>
          <table:table-cell office:value-type="float" office:value="25098.75" calcext:value-type="float">
            <text:p>25098.75</text:p>
          </table:table-cell>
          <table:table-cell office:value-type="float" office:value="25108.75" calcext:value-type="float">
            <text:p>25108.75</text:p>
          </table:table-cell>
          <table:table-cell office:value-type="float" office:value="25093.75" calcext:value-type="float">
            <text:p>2509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17:30.10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273.10000000001" calcext:value-type="float">
            <text:p>5273.10000000001</text:p>
          </table:table-cell>
          <table:table-cell office:value-type="float" office:value="1" calcext:value-type="float">
            <text:p>1</text:p>
          </table:table-cell>
          <table:table-cell office:value-type="float" office:value="5499.50000000001" calcext:value-type="float">
            <text:p>5499.50000000001</text:p>
          </table:table-cell>
          <table:table-cell office:value-type="float" office:value="5615.20000000001" calcext:value-type="float">
            <text:p>5615.2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22:19.700</text:p>
          </table:table-cell>
          <table:table-cell office:value-type="string" calcext:value-type="string">
            <text:p>2025-10-02 14:22:19.700</text:p>
          </table:table-cell>
          <table:table-cell office:value-type="string" calcext:value-type="string">
            <text:p>SHORT</text:p>
          </table:table-cell>
          <table:table-cell office:value-type="float" office:value="25110.5" calcext:value-type="float">
            <text:p>25110.5</text:p>
          </table:table-cell>
          <table:table-cell office:value-type="float" office:value="25100.5" calcext:value-type="float">
            <text:p>25100.5</text:p>
          </table:table-cell>
          <table:table-cell office:value-type="float" office:value="25115.5" calcext:value-type="float">
            <text:p>2511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22:20.700</text:p>
          </table:table-cell>
          <table:table-cell office:value-type="float" office:value="73" calcext:value-type="float">
            <text:p>73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157.40000000001" calcext:value-type="float">
            <text:p>5157.40000000001</text:p>
          </table:table-cell>
          <table:table-cell office:value-type="float" office:value="2" calcext:value-type="float">
            <text:p>2</text:p>
          </table:table-cell>
          <table:table-cell office:value-type="float" office:value="5383.80000000001" calcext:value-type="float">
            <text:p>5383.80000000001</text:p>
          </table:table-cell>
          <table:table-cell office:value-type="float" office:value="5615.20000000001" calcext:value-type="float">
            <text:p>5615.20000000001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26:14.800</text:p>
          </table:table-cell>
          <table:table-cell office:value-type="string" calcext:value-type="string">
            <text:p>2025-10-02 14:26:14.800</text:p>
          </table:table-cell>
          <table:table-cell office:value-type="string" calcext:value-type="string">
            <text:p>SHORT</text:p>
          </table:table-cell>
          <table:table-cell office:value-type="float" office:value="25112.5" calcext:value-type="float">
            <text:p>25112.5</text:p>
          </table:table-cell>
          <table:table-cell office:value-type="float" office:value="25102.5" calcext:value-type="float">
            <text:p>25102.5</text:p>
          </table:table-cell>
          <table:table-cell office:value-type="float" office:value="25117.5" calcext:value-type="float">
            <text:p>2511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26:18.300</text:p>
          </table:table-cell>
          <table:table-cell office:value-type="float" office:value="466" calcext:value-type="float">
            <text:p>46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046.70000000001" calcext:value-type="float">
            <text:p>5046.70000000001</text:p>
          </table:table-cell>
          <table:table-cell office:value-type="float" office:value="3" calcext:value-type="float">
            <text:p>3</text:p>
          </table:table-cell>
          <table:table-cell office:value-type="float" office:value="5273.10000000001" calcext:value-type="float">
            <text:p>5273.10000000001</text:p>
          </table:table-cell>
          <table:table-cell office:value-type="float" office:value="5615.20000000001" calcext:value-type="float">
            <text:p>5615.20000000001</text:p>
          </table:table-cell>
          <table:table-cell office:value-type="float" office:value="-342.099999999999" calcext:value-type="float">
            <text:p>-342.09999999999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27:54.500</text:p>
          </table:table-cell>
          <table:table-cell office:value-type="string" calcext:value-type="string">
            <text:p>2025-10-02 14:27:54.500</text:p>
          </table:table-cell>
          <table:table-cell office:value-type="string" calcext:value-type="string">
            <text:p>LONG</text:p>
          </table:table-cell>
          <table:table-cell office:value-type="float" office:value="25106.25" calcext:value-type="float">
            <text:p>25106.25</text:p>
          </table:table-cell>
          <table:table-cell office:value-type="float" office:value="25116.25" calcext:value-type="float">
            <text:p>25116.25</text:p>
          </table:table-cell>
          <table:table-cell office:value-type="float" office:value="25101.25" calcext:value-type="float">
            <text:p>2510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27:55.500</text:p>
          </table:table-cell>
          <table:table-cell office:value-type="float" office:value="1303" calcext:value-type="float">
            <text:p>13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59.3" calcext:value-type="float">
            <text:p>15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206.00000000001" calcext:value-type="float">
            <text:p>5206.00000000001</text:p>
          </table:table-cell>
          <table:table-cell office:value-type="float" office:value="0" calcext:value-type="float">
            <text:p>0</text:p>
          </table:table-cell>
          <table:table-cell office:value-type="float" office:value="5432.40000000001" calcext:value-type="float">
            <text:p>5432.40000000001</text:p>
          </table:table-cell>
          <table:table-cell office:value-type="float" office:value="5615.20000000001" calcext:value-type="float">
            <text:p>5615.20000000001</text:p>
          </table:table-cell>
          <table:table-cell office:value-type="float" office:value="-182.799999999999" calcext:value-type="float">
            <text:p>-182.799999999999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31:19.300</text:p>
          </table:table-cell>
          <table:table-cell office:value-type="string" calcext:value-type="string">
            <text:p>2025-10-02 14:31:19.300</text:p>
          </table:table-cell>
          <table:table-cell office:value-type="string" calcext:value-type="string">
            <text:p>LONG</text:p>
          </table:table-cell>
          <table:table-cell office:value-type="float" office:value="25106.75" calcext:value-type="float">
            <text:p>25106.75</text:p>
          </table:table-cell>
          <table:table-cell office:value-type="float" office:value="25116.75" calcext:value-type="float">
            <text:p>25116.75</text:p>
          </table:table-cell>
          <table:table-cell office:value-type="float" office:value="25101.75" calcext:value-type="float">
            <text:p>2510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31:19.90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395.30000000001" calcext:value-type="float">
            <text:p>5395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21.70000000001" calcext:value-type="float">
            <text:p>5621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37:28.500</text:p>
          </table:table-cell>
          <table:table-cell office:value-type="string" calcext:value-type="string">
            <text:p>2025-10-02 14:37:28.500</text:p>
          </table:table-cell>
          <table:table-cell office:value-type="string" calcext:value-type="string">
            <text:p>LONG</text:p>
          </table:table-cell>
          <table:table-cell office:value-type="float" office:value="25102.25" calcext:value-type="float">
            <text:p>25102.25</text:p>
          </table:table-cell>
          <table:table-cell office:value-type="float" office:value="25112.25" calcext:value-type="float">
            <text:p>25112.25</text:p>
          </table:table-cell>
          <table:table-cell office:value-type="float" office:value="25097.25" calcext:value-type="float">
            <text:p>2509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37:29.5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279.60000000001" calcext:value-type="float">
            <text:p>5279.60000000001</text:p>
          </table:table-cell>
          <table:table-cell office:value-type="float" office:value="1" calcext:value-type="float">
            <text:p>1</text:p>
          </table:table-cell>
          <table:table-cell office:value-type="float" office:value="5506.00000000001" calcext:value-type="float">
            <text:p>5506.00000000001</text:p>
          </table:table-cell>
          <table:table-cell office:value-type="float" office:value="5621.70000000001" calcext:value-type="float">
            <text:p>5621.7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38:23.700</text:p>
          </table:table-cell>
          <table:table-cell office:value-type="string" calcext:value-type="string">
            <text:p>2025-10-02 14:38:23.700</text:p>
          </table:table-cell>
          <table:table-cell office:value-type="string" calcext:value-type="string">
            <text:p>SHORT</text:p>
          </table:table-cell>
          <table:table-cell office:value-type="float" office:value="25102" calcext:value-type="float">
            <text:p>25102</text:p>
          </table:table-cell>
          <table:table-cell office:value-type="float" office:value="25092" calcext:value-type="float">
            <text:p>25092</text:p>
          </table:table-cell>
          <table:table-cell office:value-type="float" office:value="25107" calcext:value-type="float">
            <text:p>2510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38:24.700</text:p>
          </table:table-cell>
          <table:table-cell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463.90000000001" calcext:value-type="float">
            <text:p>5463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90.30000000001" calcext:value-type="float">
            <text:p>5690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42:46.400</text:p>
          </table:table-cell>
          <table:table-cell office:value-type="string" calcext:value-type="string">
            <text:p>2025-10-02 14:42:46.400</text:p>
          </table:table-cell>
          <table:table-cell office:value-type="string" calcext:value-type="string">
            <text:p>SHORT</text:p>
          </table:table-cell>
          <table:table-cell office:value-type="float" office:value="25108.75" calcext:value-type="float">
            <text:p>25108.75</text:p>
          </table:table-cell>
          <table:table-cell office:value-type="float" office:value="25098.75" calcext:value-type="float">
            <text:p>25098.75</text:p>
          </table:table-cell>
          <table:table-cell office:value-type="float" office:value="25113.75" calcext:value-type="float">
            <text:p>25113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42:46.700</text:p>
          </table:table-cell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353.20000000001" calcext:value-type="float">
            <text:p>5353.20000000001</text:p>
          </table:table-cell>
          <table:table-cell office:value-type="float" office:value="1" calcext:value-type="float">
            <text:p>1</text:p>
          </table:table-cell>
          <table:table-cell office:value-type="float" office:value="5579.60000000001" calcext:value-type="float">
            <text:p>5579.60000000001</text:p>
          </table:table-cell>
          <table:table-cell office:value-type="float" office:value="5690.30000000001" calcext:value-type="float">
            <text:p>5690.3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42:48.400</text:p>
          </table:table-cell>
          <table:table-cell office:value-type="string" calcext:value-type="string">
            <text:p>2025-10-02 14:42:48.400</text:p>
          </table:table-cell>
          <table:table-cell office:value-type="string" calcext:value-type="string">
            <text:p>LONG</text:p>
          </table:table-cell>
          <table:table-cell office:value-type="float" office:value="25109.5" calcext:value-type="float">
            <text:p>25109.5</text:p>
          </table:table-cell>
          <table:table-cell office:value-type="float" office:value="25119.5" calcext:value-type="float">
            <text:p>25119.5</text:p>
          </table:table-cell>
          <table:table-cell office:value-type="float" office:value="25104.5" calcext:value-type="float">
            <text:p>2510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42:49.4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537.50000000001" calcext:value-type="float">
            <text:p>5537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63.90000000001" calcext:value-type="float">
            <text:p>5763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43:21.700</text:p>
          </table:table-cell>
          <table:table-cell office:value-type="string" calcext:value-type="string">
            <text:p>2025-10-02 14:43:21.700</text:p>
          </table:table-cell>
          <table:table-cell office:value-type="string" calcext:value-type="string">
            <text:p>LONG</text:p>
          </table:table-cell>
          <table:table-cell office:value-type="float" office:value="25105" calcext:value-type="float">
            <text:p>25105</text:p>
          </table:table-cell>
          <table:table-cell office:value-type="float" office:value="25115" calcext:value-type="float">
            <text:p>25115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43:21.80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726.80000000001" calcext:value-type="float">
            <text:p>5726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53.20000000001" calcext:value-type="float">
            <text:p>5953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48:13.600</text:p>
          </table:table-cell>
          <table:table-cell office:value-type="string" calcext:value-type="string">
            <text:p>2025-10-02 14:48:13.600</text:p>
          </table:table-cell>
          <table:table-cell office:value-type="string" calcext:value-type="string">
            <text:p>LONG</text:p>
          </table:table-cell>
          <table:table-cell office:value-type="float" office:value="25106.5" calcext:value-type="float">
            <text:p>25106.5</text:p>
          </table:table-cell>
          <table:table-cell office:value-type="float" office:value="25116.5" calcext:value-type="float">
            <text:p>25116.5</text:p>
          </table:table-cell>
          <table:table-cell office:value-type="float" office:value="25101.5" calcext:value-type="float">
            <text:p>2510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48:15.70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8:51:37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616.10000000001" calcext:value-type="float">
            <text:p>5616.10000000001</text:p>
          </table:table-cell>
          <table:table-cell office:value-type="float" office:value="1" calcext:value-type="float">
            <text:p>1</text:p>
          </table:table-cell>
          <table:table-cell office:value-type="float" office:value="5842.50000000001" calcext:value-type="float">
            <text:p>5842.50000000001</text:p>
          </table:table-cell>
          <table:table-cell office:value-type="float" office:value="5953.20000000001" calcext:value-type="float">
            <text:p>5953.2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53:32.000</text:p>
          </table:table-cell>
          <table:table-cell office:value-type="string" calcext:value-type="string">
            <text:p>2025-10-02 14:53:32.000</text:p>
          </table:table-cell>
          <table:table-cell office:value-type="string" calcext:value-type="string">
            <text:p>LONG</text:p>
          </table:table-cell>
          <table:table-cell office:value-type="float" office:value="25107.75" calcext:value-type="float">
            <text:p>25107.75</text:p>
          </table:table-cell>
          <table:table-cell office:value-type="float" office:value="25117.75" calcext:value-type="float">
            <text:p>25117.75</text:p>
          </table:table-cell>
          <table:table-cell office:value-type="float" office:value="25102.75" calcext:value-type="float">
            <text:p>2510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53:34.100</text:p>
          </table:table-cell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505.40000000001" calcext:value-type="float">
            <text:p>5505.4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31.80000000001" calcext:value-type="float">
            <text:p>5731.80000000001</text:p>
          </table:table-cell>
          <table:table-cell office:value-type="float" office:value="5953.20000000001" calcext:value-type="float">
            <text:p>5953.2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57:14.800</text:p>
          </table:table-cell>
          <table:table-cell office:value-type="string" calcext:value-type="string">
            <text:p>2025-10-02 14:57:14.800</text:p>
          </table:table-cell>
          <table:table-cell office:value-type="string" calcext:value-type="string">
            <text:p>SHORT</text:p>
          </table:table-cell>
          <table:table-cell office:value-type="float" office:value="25113.75" calcext:value-type="float">
            <text:p>25113.75</text:p>
          </table:table-cell>
          <table:table-cell office:value-type="float" office:value="25103.75" calcext:value-type="float">
            <text:p>25103.75</text:p>
          </table:table-cell>
          <table:table-cell office:value-type="float" office:value="25118.75" calcext:value-type="float">
            <text:p>2511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57:16.100</text:p>
          </table:table-cell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694.70000000001" calcext:value-type="float">
            <text:p>5694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5921.10000000001" calcext:value-type="float">
            <text:p>5921.10000000001</text:p>
          </table:table-cell>
          <table:table-cell office:value-type="float" office:value="5953.20000000001" calcext:value-type="float">
            <text:p>5953.20000000001</text:p>
          </table:table-cell>
          <table:table-cell office:value-type="float" office:value="-32.0999999999995" calcext:value-type="float">
            <text:p>-32.0999999999995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57:22.000</text:p>
          </table:table-cell>
          <table:table-cell office:value-type="string" calcext:value-type="string">
            <text:p>2025-10-02 14:57:22.000</text:p>
          </table:table-cell>
          <table:table-cell office:value-type="string" calcext:value-type="string">
            <text:p>LONG</text:p>
          </table:table-cell>
          <table:table-cell office:value-type="float" office:value="25116.25" calcext:value-type="float">
            <text:p>25116.25</text:p>
          </table:table-cell>
          <table:table-cell office:value-type="float" office:value="25126.25" calcext:value-type="float">
            <text:p>25126.25</text:p>
          </table:table-cell>
          <table:table-cell office:value-type="float" office:value="25111.25" calcext:value-type="float">
            <text:p>2511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57:22.40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884.00000000001" calcext:value-type="float">
            <text:p>5884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10.40000000001" calcext:value-type="float">
            <text:p>6110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57:23.400</text:p>
          </table:table-cell>
          <table:table-cell office:value-type="string" calcext:value-type="string">
            <text:p>2025-10-02 14:57:23.400</text:p>
          </table:table-cell>
          <table:table-cell office:value-type="string" calcext:value-type="string">
            <text:p>LONG</text:p>
          </table:table-cell>
          <table:table-cell office:value-type="float" office:value="25116.25" calcext:value-type="float">
            <text:p>25116.25</text:p>
          </table:table-cell>
          <table:table-cell office:value-type="float" office:value="25126.25" calcext:value-type="float">
            <text:p>25126.25</text:p>
          </table:table-cell>
          <table:table-cell office:value-type="float" office:value="25111.25" calcext:value-type="float">
            <text:p>2511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8:57:25.20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073.30000000001" calcext:value-type="float">
            <text:p>6073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99.70000000001" calcext:value-type="float">
            <text:p>6299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8:58:29.600</text:p>
          </table:table-cell>
          <table:table-cell office:value-type="string" calcext:value-type="string">
            <text:p>2025-10-02 14:58:29.600</text:p>
          </table:table-cell>
          <table:table-cell office:value-type="string" calcext:value-type="string">
            <text:p>SHORT</text:p>
          </table:table-cell>
          <table:table-cell office:value-type="float" office:value="25110.5" calcext:value-type="float">
            <text:p>25110.5</text:p>
          </table:table-cell>
          <table:table-cell office:value-type="float" office:value="25100.5" calcext:value-type="float">
            <text:p>25100.5</text:p>
          </table:table-cell>
          <table:table-cell office:value-type="float" office:value="25115.5" calcext:value-type="float">
            <text:p>2511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8:58:30.600</text:p>
          </table:table-cell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257.60000000001" calcext:value-type="float">
            <text:p>6257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84.00000000001" calcext:value-type="float">
            <text:p>6484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02:14.500</text:p>
          </table:table-cell>
          <table:table-cell office:value-type="string" calcext:value-type="string">
            <text:p>2025-10-02 15:02:14.500</text:p>
          </table:table-cell>
          <table:table-cell office:value-type="string" calcext:value-type="string">
            <text:p>LONG</text:p>
          </table:table-cell>
          <table:table-cell office:value-type="float" office:value="25114.5" calcext:value-type="float">
            <text:p>25114.5</text:p>
          </table:table-cell>
          <table:table-cell office:value-type="float" office:value="25124.5" calcext:value-type="float">
            <text:p>25124.5</text:p>
          </table:table-cell>
          <table:table-cell office:value-type="float" office:value="25109.5" calcext:value-type="float">
            <text:p>2510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9:02:16.2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146.90000000001" calcext:value-type="float">
            <text:p>6146.90000000001</text:p>
          </table:table-cell>
          <table:table-cell office:value-type="float" office:value="1" calcext:value-type="float">
            <text:p>1</text:p>
          </table:table-cell>
          <table:table-cell office:value-type="float" office:value="6373.30000000001" calcext:value-type="float">
            <text:p>6373.30000000001</text:p>
          </table:table-cell>
          <table:table-cell office:value-type="float" office:value="6484.00000000001" calcext:value-type="float">
            <text:p>6484.0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05:31.400</text:p>
          </table:table-cell>
          <table:table-cell office:value-type="string" calcext:value-type="string">
            <text:p>2025-10-02 15:05:31.400</text:p>
          </table:table-cell>
          <table:table-cell office:value-type="string" calcext:value-type="string">
            <text:p>LONG</text:p>
          </table:table-cell>
          <table:table-cell office:value-type="float" office:value="25121.5" calcext:value-type="float">
            <text:p>25121.5</text:p>
          </table:table-cell>
          <table:table-cell office:value-type="float" office:value="25131.5" calcext:value-type="float">
            <text:p>25131.5</text:p>
          </table:table-cell>
          <table:table-cell office:value-type="float" office:value="25116.5" calcext:value-type="float">
            <text:p>2511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9:05:33.60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336.20000000001" calcext:value-type="float">
            <text:p>6336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62.60000000001" calcext:value-type="float">
            <text:p>6562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06:17.200</text:p>
          </table:table-cell>
          <table:table-cell office:value-type="string" calcext:value-type="string">
            <text:p>2025-10-02 15:06:17.200</text:p>
          </table:table-cell>
          <table:table-cell office:value-type="string" calcext:value-type="string">
            <text:p>LONG</text:p>
          </table:table-cell>
          <table:table-cell office:value-type="float" office:value="25122.25" calcext:value-type="float">
            <text:p>25122.25</text:p>
          </table:table-cell>
          <table:table-cell office:value-type="float" office:value="25132.25" calcext:value-type="float">
            <text:p>25132.25</text:p>
          </table:table-cell>
          <table:table-cell office:value-type="float" office:value="25117.25" calcext:value-type="float">
            <text:p>2511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06:18.2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520.50000000001" calcext:value-type="float">
            <text:p>6520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46.90000000001" calcext:value-type="float">
            <text:p>6746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08:21.900</text:p>
          </table:table-cell>
          <table:table-cell office:value-type="string" calcext:value-type="string">
            <text:p>2025-10-02 15:08:21.900</text:p>
          </table:table-cell>
          <table:table-cell office:value-type="string" calcext:value-type="string">
            <text:p>SHORT</text:p>
          </table:table-cell>
          <table:table-cell office:value-type="float" office:value="25116.25" calcext:value-type="float">
            <text:p>25116.25</text:p>
          </table:table-cell>
          <table:table-cell office:value-type="float" office:value="25106.25" calcext:value-type="float">
            <text:p>25106.25</text:p>
          </table:table-cell>
          <table:table-cell office:value-type="float" office:value="25121.25" calcext:value-type="float">
            <text:p>2512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08:22.900</text:p>
          </table:table-cell>
          <table:table-cell office:value-type="float" office:value="103" calcext:value-type="float">
            <text:p>103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399.80000000001" calcext:value-type="float">
            <text:p>6399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6626.20000000001" calcext:value-type="float">
            <text:p>6626.20000000001</text:p>
          </table:table-cell>
          <table:table-cell office:value-type="float" office:value="6746.90000000001" calcext:value-type="float">
            <text:p>6746.9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08:26.200</text:p>
          </table:table-cell>
          <table:table-cell office:value-type="string" calcext:value-type="string">
            <text:p>2025-10-02 15:08:26.200</text:p>
          </table:table-cell>
          <table:table-cell office:value-type="string" calcext:value-type="string">
            <text:p>SHORT</text:p>
          </table:table-cell>
          <table:table-cell office:value-type="float" office:value="25115.75" calcext:value-type="float">
            <text:p>25115.75</text:p>
          </table:table-cell>
          <table:table-cell office:value-type="float" office:value="25105.75" calcext:value-type="float">
            <text:p>25105.75</text:p>
          </table:table-cell>
          <table:table-cell office:value-type="float" office:value="25120.75" calcext:value-type="float">
            <text:p>2512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08:27.200</text:p>
          </table:table-cell>
          <table:table-cell office:value-type="float" office:value="107" calcext:value-type="float">
            <text:p>107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279.10000000001" calcext:value-type="float">
            <text:p>6279.10000000001</text:p>
          </table:table-cell>
          <table:table-cell office:value-type="float" office:value="2" calcext:value-type="float">
            <text:p>2</text:p>
          </table:table-cell>
          <table:table-cell office:value-type="float" office:value="6505.50000000001" calcext:value-type="float">
            <text:p>6505.50000000001</text:p>
          </table:table-cell>
          <table:table-cell office:value-type="float" office:value="6746.90000000001" calcext:value-type="float">
            <text:p>6746.90000000001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11:09.200</text:p>
          </table:table-cell>
          <table:table-cell office:value-type="string" calcext:value-type="string">
            <text:p>2025-10-02 15:11:09.200</text:p>
          </table:table-cell>
          <table:table-cell office:value-type="string" calcext:value-type="string">
            <text:p>SHORT</text:p>
          </table:table-cell>
          <table:table-cell office:value-type="float" office:value="25114.25" calcext:value-type="float">
            <text:p>25114.25</text:p>
          </table:table-cell>
          <table:table-cell office:value-type="float" office:value="25104.25" calcext:value-type="float">
            <text:p>25104.25</text:p>
          </table:table-cell>
          <table:table-cell office:value-type="float" office:value="25119.25" calcext:value-type="float">
            <text:p>2511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9:11:09.50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468.40000000001" calcext:value-type="float">
            <text:p>6468.40000000001</text:p>
          </table:table-cell>
          <table:table-cell office:value-type="float" office:value="0" calcext:value-type="float">
            <text:p>0</text:p>
          </table:table-cell>
          <table:table-cell office:value-type="float" office:value="6694.80000000001" calcext:value-type="float">
            <text:p>6694.80000000001</text:p>
          </table:table-cell>
          <table:table-cell office:value-type="float" office:value="6746.90000000001" calcext:value-type="float">
            <text:p>6746.90000000001</text:p>
          </table:table-cell>
          <table:table-cell office:value-type="float" office:value="-52.0999999999995" calcext:value-type="float">
            <text:p>-52.0999999999995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16:36.600</text:p>
          </table:table-cell>
          <table:table-cell office:value-type="string" calcext:value-type="string">
            <text:p>2025-10-02 15:16:36.600</text:p>
          </table:table-cell>
          <table:table-cell office:value-type="string" calcext:value-type="string">
            <text:p>SHORT</text:p>
          </table:table-cell>
          <table:table-cell office:value-type="float" office:value="25113.5" calcext:value-type="float">
            <text:p>25113.5</text:p>
          </table:table-cell>
          <table:table-cell office:value-type="float" office:value="25103.5" calcext:value-type="float">
            <text:p>25103.5</text:p>
          </table:table-cell>
          <table:table-cell office:value-type="float" office:value="25118.5" calcext:value-type="float">
            <text:p>2511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16:37.600</text:p>
          </table:table-cell>
          <table:table-cell office:value-type="float" office:value="96" calcext:value-type="float">
            <text:p>9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652.70000000001" calcext:value-type="float">
            <text:p>6652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79.10000000001" calcext:value-type="float">
            <text:p>6879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18:31.900</text:p>
          </table:table-cell>
          <table:table-cell office:value-type="string" calcext:value-type="string">
            <text:p>2025-10-02 15:18:31.900</text:p>
          </table:table-cell>
          <table:table-cell office:value-type="string" calcext:value-type="string">
            <text:p>SHORT</text:p>
          </table:table-cell>
          <table:table-cell office:value-type="float" office:value="25114.25" calcext:value-type="float">
            <text:p>25114.25</text:p>
          </table:table-cell>
          <table:table-cell office:value-type="float" office:value="25104.25" calcext:value-type="float">
            <text:p>25104.25</text:p>
          </table:table-cell>
          <table:table-cell office:value-type="float" office:value="25119.25" calcext:value-type="float">
            <text:p>25119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18:32.900</text:p>
          </table:table-cell>
          <table:table-cell office:value-type="float" office:value="83" calcext:value-type="float">
            <text:p>83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837.00000000001" calcext:value-type="float">
            <text:p>6837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63.40000000001" calcext:value-type="float">
            <text:p>7063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26:41.600</text:p>
          </table:table-cell>
          <table:table-cell office:value-type="string" calcext:value-type="string">
            <text:p>2025-10-02 15:26:41.600</text:p>
          </table:table-cell>
          <table:table-cell office:value-type="string" calcext:value-type="string">
            <text:p>SHORT</text:p>
          </table:table-cell>
          <table:table-cell office:value-type="float" office:value="25121.75" calcext:value-type="float">
            <text:p>25121.75</text:p>
          </table:table-cell>
          <table:table-cell office:value-type="float" office:value="25111.75" calcext:value-type="float">
            <text:p>25111.75</text:p>
          </table:table-cell>
          <table:table-cell office:value-type="float" office:value="25126.75" calcext:value-type="float">
            <text:p>2512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9:26:43.000</text:p>
          </table:table-cell>
          <table:table-cell office:value-type="float" office:value="927" calcext:value-type="float">
            <text:p>927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026.30000000001" calcext:value-type="float">
            <text:p>7026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52.70000000001" calcext:value-type="float">
            <text:p>7252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27:04.100</text:p>
          </table:table-cell>
          <table:table-cell office:value-type="string" calcext:value-type="string">
            <text:p>2025-10-02 15:27:04.100</text:p>
          </table:table-cell>
          <table:table-cell office:value-type="string" calcext:value-type="string">
            <text:p>SHORT</text:p>
          </table:table-cell>
          <table:table-cell office:value-type="float" office:value="25122" calcext:value-type="float">
            <text:p>25122</text:p>
          </table:table-cell>
          <table:table-cell office:value-type="float" office:value="25112" calcext:value-type="float">
            <text:p>25112</text:p>
          </table:table-cell>
          <table:table-cell office:value-type="float" office:value="25127" calcext:value-type="float">
            <text:p>2512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2 19:27:07.600</text:p>
          </table:table-cell>
          <table:table-cell office:value-type="float" office:value="198" calcext:value-type="float">
            <text:p>198</text:p>
          </table:table-cell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2 19:33:47.9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915.60000000001" calcext:value-type="float">
            <text:p>6915.60000000001</text:p>
          </table:table-cell>
          <table:table-cell office:value-type="float" office:value="1" calcext:value-type="float">
            <text:p>1</text:p>
          </table:table-cell>
          <table:table-cell office:value-type="float" office:value="7142.00000000001" calcext:value-type="float">
            <text:p>7142.00000000001</text:p>
          </table:table-cell>
          <table:table-cell office:value-type="float" office:value="7252.70000000001" calcext:value-type="float">
            <text:p>7252.7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35:06.600</text:p>
          </table:table-cell>
          <table:table-cell office:value-type="string" calcext:value-type="string">
            <text:p>2025-10-02 15:35:06.600</text:p>
          </table:table-cell>
          <table:table-cell office:value-type="string" calcext:value-type="string">
            <text:p>LONG</text:p>
          </table:table-cell>
          <table:table-cell office:value-type="float" office:value="25120.75" calcext:value-type="float">
            <text:p>25120.75</text:p>
          </table:table-cell>
          <table:table-cell office:value-type="float" office:value="25130.75" calcext:value-type="float">
            <text:p>25130.75</text:p>
          </table:table-cell>
          <table:table-cell office:value-type="float" office:value="25115.75" calcext:value-type="float">
            <text:p>2511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35:07.60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7099.90000000001" calcext:value-type="float">
            <text:p>7099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26.30000000001" calcext:value-type="float">
            <text:p>7326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2025-10-02 19:35:14.000</text:p>
          </table:table-cell>
          <table:table-cell office:value-type="string" calcext:value-type="string">
            <text:p>2025-10-02 15:35:14.000</text:p>
          </table:table-cell>
          <table:table-cell office:value-type="string" calcext:value-type="string">
            <text:p>LONG</text:p>
          </table:table-cell>
          <table:table-cell office:value-type="float" office:value="25120.5" calcext:value-type="float">
            <text:p>25120.5</text:p>
          </table:table-cell>
          <table:table-cell office:value-type="float" office:value="25130.5" calcext:value-type="float">
            <text:p>25130.5</text:p>
          </table:table-cell>
          <table:table-cell office:value-type="float" office:value="25115.5" calcext:value-type="float">
            <text:p>2511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2 19:35:15.00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094.25" calcext:value-type="float">
            <text:p>25094.25</text:p>
          </table:table-cell>
          <table:table-cell office:value-type="float" office:value="25076.5" calcext:value-type="float">
            <text:p>25076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7279.20000000001" calcext:value-type="float">
            <text:p>7279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05.60000000001" calcext:value-type="float">
            <text:p>7505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3:40:45.500</text:p>
          </table:table-cell>
          <table:table-cell office:value-type="string" calcext:value-type="string">
            <text:p>2025-10-03 09:40:45.500</text:p>
          </table:table-cell>
          <table:table-cell office:value-type="string" calcext:value-type="string">
            <text:p>LONG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69.25" calcext:value-type="float">
            <text:p>25169.25</text:p>
          </table:table-cell>
          <table:table-cell office:value-type="float" office:value="25154.25" calcext:value-type="float">
            <text:p>2515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3:40:46.80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3:43:07.500</text:p>
          </table:table-cell>
          <table:table-cell office:value-type="string" calcext:value-type="string">
            <text:p>2025-10-03 09:43:07.500</text:p>
          </table:table-cell>
          <table:table-cell office:value-type="string" calcext:value-type="string">
            <text:p>LONG</text:p>
          </table:table-cell>
          <table:table-cell office:value-type="float" office:value="25125" calcext:value-type="float">
            <text:p>25125</text:p>
          </table:table-cell>
          <table:table-cell office:value-type="float" office:value="25135" calcext:value-type="float">
            <text:p>25135</text:p>
          </table:table-cell>
          <table:table-cell office:value-type="float" office:value="25120" calcext:value-type="float">
            <text:p>2512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3:43:09.600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78.6" calcext:value-type="float">
            <text:p>78.6</text:p>
          </table:table-cell>
          <table:table-cell office:value-type="float" office:value="1" calcext:value-type="float">
            <text:p>1</text:p>
          </table:table-cell>
          <table:table-cell office:value-type="float" office:value="78.6" calcext:value-type="float">
            <text:p>78.6</text:p>
          </table:table-cell>
          <table:table-cell office:value-type="float" office:value="189.3" calcext:value-type="float">
            <text:p>189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3:44:44.500</text:p>
          </table:table-cell>
          <table:table-cell office:value-type="string" calcext:value-type="string">
            <text:p>2025-10-03 09:44:44.500</text:p>
          </table:table-cell>
          <table:table-cell office:value-type="string" calcext:value-type="string">
            <text:p>LONG</text:p>
          </table:table-cell>
          <table:table-cell office:value-type="float" office:value="25133.25" calcext:value-type="float">
            <text:p>25133.25</text:p>
          </table:table-cell>
          <table:table-cell office:value-type="float" office:value="25143.25" calcext:value-type="float">
            <text:p>25143.25</text:p>
          </table:table-cell>
          <table:table-cell office:value-type="float" office:value="25128.25" calcext:value-type="float">
            <text:p>2512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3:44:45.50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-42.1" calcext:value-type="float">
            <text:p>-42.1</text:p>
          </table:table-cell>
          <table:table-cell office:value-type="float" office:value="2" calcext:value-type="float">
            <text:p>2</text:p>
          </table:table-cell>
          <table:table-cell office:value-type="float" office:value="-42.1" calcext:value-type="float">
            <text:p>-42.1</text:p>
          </table:table-cell>
          <table:table-cell office:value-type="float" office:value="189.3" calcext:value-type="float">
            <text:p>189.3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3:45:38.200</text:p>
          </table:table-cell>
          <table:table-cell office:value-type="string" calcext:value-type="string">
            <text:p>2025-10-03 09:45:38.200</text:p>
          </table:table-cell>
          <table:table-cell office:value-type="string" calcext:value-type="string">
            <text:p>LONG</text:p>
          </table:table-cell>
          <table:table-cell office:value-type="float" office:value="25136" calcext:value-type="float">
            <text:p>25136</text:p>
          </table:table-cell>
          <table:table-cell office:value-type="float" office:value="25146" calcext:value-type="float">
            <text:p>25146</text:p>
          </table:table-cell>
          <table:table-cell office:value-type="float" office:value="25131" calcext:value-type="float">
            <text:p>2513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3:45:40.600</text:p>
          </table:table-cell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3:47:21.8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POST_OPEN</text:p>
          </table:table-cell>
          <table:table-cell office:value-type="float" office:value="147.2" calcext:value-type="float">
            <text:p>147.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.2</text:p>
          </table:table-cell>
          <table:table-cell office:value-type="float" office:value="189.3" calcext:value-type="float">
            <text:p>189.3</text:p>
          </table:table-cell>
          <table:table-cell office:value-type="float" office:value="-42.1" calcext:value-type="float">
            <text:p>-42.1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3:57:21.800</text:p>
          </table:table-cell>
          <table:table-cell office:value-type="string" calcext:value-type="string">
            <text:p>2025-10-03 09:57:21.800</text:p>
          </table:table-cell>
          <table:table-cell office:value-type="string" calcext:value-type="string">
            <text:p>SHORT</text:p>
          </table:table-cell>
          <table:table-cell office:value-type="float" office:value="25109.75" calcext:value-type="float">
            <text:p>25109.75</text:p>
          </table:table-cell>
          <table:table-cell office:value-type="float" office:value="25099.75" calcext:value-type="float">
            <text:p>25099.75</text:p>
          </table:table-cell>
          <table:table-cell office:value-type="float" office:value="25114.75" calcext:value-type="float">
            <text:p>2511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3:57:22.800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3:57:31.500</text:p>
          </table:table-cell>
          <table:table-cell office:value-type="float" office:value="-130.7" calcext:value-type="float">
            <text:p>-13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189.3" calcext:value-type="float">
            <text:p>189.3</text:p>
          </table:table-cell>
          <table:table-cell office:value-type="float" office:value="-172.8" calcext:value-type="float">
            <text:p>-172.8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3:59:56.500</text:p>
          </table:table-cell>
          <table:table-cell office:value-type="string" calcext:value-type="string">
            <text:p>2025-10-03 09:59:56.500</text:p>
          </table:table-cell>
          <table:table-cell office:value-type="string" calcext:value-type="string">
            <text:p>LONG</text:p>
          </table:table-cell>
          <table:table-cell office:value-type="float" office:value="25106.75" calcext:value-type="float">
            <text:p>25106.75</text:p>
          </table:table-cell>
          <table:table-cell office:value-type="float" office:value="25116.75" calcext:value-type="float">
            <text:p>25116.75</text:p>
          </table:table-cell>
          <table:table-cell office:value-type="float" office:value="25101.75" calcext:value-type="float">
            <text:p>2510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3:59:58.900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5.8" calcext:value-type="float">
            <text:p>20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00:55.900</text:p>
          </table:table-cell>
          <table:table-cell office:value-type="string" calcext:value-type="string">
            <text:p>2025-10-03 10:00:55.900</text:p>
          </table:table-cell>
          <table:table-cell office:value-type="string" calcext:value-type="string">
            <text:p>LONG</text:p>
          </table:table-cell>
          <table:table-cell office:value-type="float" office:value="25091" calcext:value-type="float">
            <text:p>25091</text:p>
          </table:table-cell>
          <table:table-cell office:value-type="float" office:value="25101" calcext:value-type="float">
            <text:p>25101</text:p>
          </table:table-cell>
          <table:table-cell office:value-type="float" office:value="25086" calcext:value-type="float">
            <text:p>2508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00:57.300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284.4" calcext:value-type="float">
            <text:p>28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5.1" calcext:value-type="float">
            <text:p>39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04:39.100</text:p>
          </table:table-cell>
          <table:table-cell office:value-type="string" calcext:value-type="string">
            <text:p>2025-10-03 10:04:39.100</text:p>
          </table:table-cell>
          <table:table-cell office:value-type="string" calcext:value-type="string">
            <text:p>LONG</text:p>
          </table:table-cell>
          <table:table-cell office:value-type="float" office:value="25086" calcext:value-type="float">
            <text:p>25086</text:p>
          </table:table-cell>
          <table:table-cell office:value-type="float" office:value="25096" calcext:value-type="float">
            <text:p>25096</text:p>
          </table:table-cell>
          <table:table-cell office:value-type="float" office:value="25081" calcext:value-type="float">
            <text:p>2508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04:44.000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73.7" calcext:value-type="float">
            <text:p>47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4.4" calcext:value-type="float">
            <text:p>58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07:12.000</text:p>
          </table:table-cell>
          <table:table-cell office:value-type="string" calcext:value-type="string">
            <text:p>2025-10-03 10:07:12.000</text:p>
          </table:table-cell>
          <table:table-cell office:value-type="string" calcext:value-type="string">
            <text:p>LONG</text:p>
          </table:table-cell>
          <table:table-cell office:value-type="float" office:value="25086" calcext:value-type="float">
            <text:p>25086</text:p>
          </table:table-cell>
          <table:table-cell office:value-type="float" office:value="25096" calcext:value-type="float">
            <text:p>25096</text:p>
          </table:table-cell>
          <table:table-cell office:value-type="float" office:value="25081" calcext:value-type="float">
            <text:p>2508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07:14.10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4:07:30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473.7" calcext:value-type="float">
            <text:p>473.7</text:p>
          </table:table-cell>
          <table:table-cell office:value-type="float" office:value="584.4" calcext:value-type="float">
            <text:p>584.4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16:48.900</text:p>
          </table:table-cell>
          <table:table-cell office:value-type="string" calcext:value-type="string">
            <text:p>2025-10-03 10:16:48.900</text:p>
          </table:table-cell>
          <table:table-cell office:value-type="string" calcext:value-type="string">
            <text:p>SHORT</text:p>
          </table:table-cell>
          <table:table-cell office:value-type="float" office:value="25099.25" calcext:value-type="float">
            <text:p>25099.25</text:p>
          </table:table-cell>
          <table:table-cell office:value-type="float" office:value="25089.25" calcext:value-type="float">
            <text:p>25089.25</text:p>
          </table:table-cell>
          <table:table-cell office:value-type="float" office:value="25104.25" calcext:value-type="float">
            <text:p>2510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16:49.000</text:p>
          </table:table-cell>
          <table:table-cell office:value-type="float" office:value="513" calcext:value-type="float">
            <text:p>51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252.3" calcext:value-type="float">
            <text:p>252.3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584.4" calcext:value-type="float">
            <text:p>584.4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30:15.500</text:p>
          </table:table-cell>
          <table:table-cell office:value-type="string" calcext:value-type="string">
            <text:p>2025-10-03 10:30:15.500</text:p>
          </table:table-cell>
          <table:table-cell office:value-type="string" calcext:value-type="string">
            <text:p>SHORT</text:p>
          </table:table-cell>
          <table:table-cell office:value-type="float" office:value="25087.75" calcext:value-type="float">
            <text:p>25087.75</text:p>
          </table:table-cell>
          <table:table-cell office:value-type="float" office:value="25077.75" calcext:value-type="float">
            <text:p>25077.75</text:p>
          </table:table-cell>
          <table:table-cell office:value-type="float" office:value="25092.75" calcext:value-type="float">
            <text:p>2509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4:30:16.500</text:p>
          </table:table-cell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21.6" calcext:value-type="float">
            <text:p>421.6</text:p>
          </table:table-cell>
          <table:table-cell office:value-type="float" office:value="0" calcext:value-type="float">
            <text:p>0</text:p>
          </table:table-cell>
          <table:table-cell office:value-type="float" office:value="532.3" calcext:value-type="float">
            <text:p>532.3</text:p>
          </table:table-cell>
          <table:table-cell office:value-type="float" office:value="584.4" calcext:value-type="float">
            <text:p>584.4</text:p>
          </table:table-cell>
          <table:table-cell office:value-type="float" office:value="-52.0999999999999" calcext:value-type="float">
            <text:p>-52.09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39:20.900</text:p>
          </table:table-cell>
          <table:table-cell office:value-type="string" calcext:value-type="string">
            <text:p>2025-10-03 10:39:20.900</text:p>
          </table:table-cell>
          <table:table-cell office:value-type="string" calcext:value-type="string">
            <text:p>SHORT</text:p>
          </table:table-cell>
          <table:table-cell office:value-type="float" office:value="25110.5" calcext:value-type="float">
            <text:p>25110.5</text:p>
          </table:table-cell>
          <table:table-cell office:value-type="float" office:value="25100.5" calcext:value-type="float">
            <text:p>25100.5</text:p>
          </table:table-cell>
          <table:table-cell office:value-type="float" office:value="25115.5" calcext:value-type="float">
            <text:p>2511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39:21.700</text:p>
          </table:table-cell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4:40:14.9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10.9" calcext:value-type="float">
            <text:p>310.9</text:p>
          </table:table-cell>
          <table:table-cell office:value-type="float" office:value="1" calcext:value-type="float">
            <text:p>1</text:p>
          </table:table-cell>
          <table:table-cell office:value-type="float" office:value="421.6" calcext:value-type="float">
            <text:p>421.6</text:p>
          </table:table-cell>
          <table:table-cell office:value-type="float" office:value="584.4" calcext:value-type="float">
            <text:p>584.4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46:45.700</text:p>
          </table:table-cell>
          <table:table-cell office:value-type="string" calcext:value-type="string">
            <text:p>2025-10-03 10:46:45.700</text:p>
          </table:table-cell>
          <table:table-cell office:value-type="string" calcext:value-type="string">
            <text:p>SHORT</text:p>
          </table:table-cell>
          <table:table-cell office:value-type="float" office:value="25114.75" calcext:value-type="float">
            <text:p>25114.75</text:p>
          </table:table-cell>
          <table:table-cell office:value-type="float" office:value="25104.75" calcext:value-type="float">
            <text:p>25104.75</text:p>
          </table:table-cell>
          <table:table-cell office:value-type="float" office:value="25119.75" calcext:value-type="float">
            <text:p>2511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4:46:46.700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4:48:29.1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90.2" calcext:value-type="float">
            <text:p>49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.9" calcext:value-type="float">
            <text:p>60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49:37.800</text:p>
          </table:table-cell>
          <table:table-cell office:value-type="string" calcext:value-type="string">
            <text:p>2025-10-03 10:49:37.800</text:p>
          </table:table-cell>
          <table:table-cell office:value-type="string" calcext:value-type="string">
            <text:p>SHORT</text:p>
          </table:table-cell>
          <table:table-cell office:value-type="float" office:value="25103.25" calcext:value-type="float">
            <text:p>25103.25</text:p>
          </table:table-cell>
          <table:table-cell office:value-type="float" office:value="25093.25" calcext:value-type="float">
            <text:p>25093.25</text:p>
          </table:table-cell>
          <table:table-cell office:value-type="float" office:value="25108.25" calcext:value-type="float">
            <text:p>2510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49:40.800</text:p>
          </table:table-cell>
          <table:table-cell office:value-type="float" office:value="123" calcext:value-type="float">
            <text:p>123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4:50:31.5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79.5" calcext:value-type="float">
            <text:p>67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0.2" calcext:value-type="float">
            <text:p>79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52:12.600</text:p>
          </table:table-cell>
          <table:table-cell office:value-type="string" calcext:value-type="string">
            <text:p>2025-10-03 10:52:12.600</text:p>
          </table:table-cell>
          <table:table-cell office:value-type="string" calcext:value-type="string">
            <text:p>SHORT</text:p>
          </table:table-cell>
          <table:table-cell office:value-type="float" office:value="25108.5" calcext:value-type="float">
            <text:p>25108.5</text:p>
          </table:table-cell>
          <table:table-cell office:value-type="float" office:value="25098.5" calcext:value-type="float">
            <text:p>25098.5</text:p>
          </table:table-cell>
          <table:table-cell office:value-type="float" office:value="25113.5" calcext:value-type="float">
            <text:p>2511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4:52:13.60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63.8" calcext:value-type="float">
            <text:p>86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4.5" calcext:value-type="float">
            <text:p>97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54:54.600</text:p>
          </table:table-cell>
          <table:table-cell office:value-type="string" calcext:value-type="string">
            <text:p>2025-10-03 10:54:54.600</text:p>
          </table:table-cell>
          <table:table-cell office:value-type="string" calcext:value-type="string">
            <text:p>LONG</text:p>
          </table:table-cell>
          <table:table-cell office:value-type="float" office:value="25120.75" calcext:value-type="float">
            <text:p>25120.75</text:p>
          </table:table-cell>
          <table:table-cell office:value-type="float" office:value="25130.75" calcext:value-type="float">
            <text:p>25130.75</text:p>
          </table:table-cell>
          <table:table-cell office:value-type="float" office:value="25115.75" calcext:value-type="float">
            <text:p>2511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54:54.80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53.1" calcext:value-type="float">
            <text:p>1053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.8" calcext:value-type="float">
            <text:p>116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55:24.800</text:p>
          </table:table-cell>
          <table:table-cell office:value-type="string" calcext:value-type="string">
            <text:p>2025-10-03 10:55:24.800</text:p>
          </table:table-cell>
          <table:table-cell office:value-type="string" calcext:value-type="string">
            <text:p>SHORT</text:p>
          </table:table-cell>
          <table:table-cell office:value-type="float" office:value="25117.25" calcext:value-type="float">
            <text:p>25117.25</text:p>
          </table:table-cell>
          <table:table-cell office:value-type="float" office:value="25107.25" calcext:value-type="float">
            <text:p>25107.25</text:p>
          </table:table-cell>
          <table:table-cell office:value-type="float" office:value="25122.25" calcext:value-type="float">
            <text:p>2512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4:55:25.300</text:p>
          </table:table-cell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4:55:56.1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42.4" calcext:value-type="float">
            <text:p>942.4</text:p>
          </table:table-cell>
          <table:table-cell office:value-type="float" office:value="1" calcext:value-type="float">
            <text:p>1</text:p>
          </table:table-cell>
          <table:table-cell office:value-type="float" office:value="1053.1" calcext:value-type="float">
            <text:p>1053.1</text:p>
          </table:table-cell>
          <table:table-cell office:value-type="float" office:value="1163.8" calcext:value-type="float">
            <text:p>1163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56:24.000</text:p>
          </table:table-cell>
          <table:table-cell office:value-type="string" calcext:value-type="string">
            <text:p>2025-10-03 10:56:24.000</text:p>
          </table:table-cell>
          <table:table-cell office:value-type="string" calcext:value-type="string">
            <text:p>SHORT</text:p>
          </table:table-cell>
          <table:table-cell office:value-type="float" office:value="25115" calcext:value-type="float">
            <text:p>25115</text:p>
          </table:table-cell>
          <table:table-cell office:value-type="float" office:value="25105" calcext:value-type="float">
            <text:p>25105</text:p>
          </table:table-cell>
          <table:table-cell office:value-type="float" office:value="25120" calcext:value-type="float">
            <text:p>2512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4:56:25.000</text:p>
          </table:table-cell>
          <table:table-cell office:value-type="float" office:value="96" calcext:value-type="float">
            <text:p>9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4:56:50.5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26.7" calcext:value-type="float">
            <text:p>826.7</text:p>
          </table:table-cell>
          <table:table-cell office:value-type="float" office:value="2" calcext:value-type="float">
            <text:p>2</text:p>
          </table:table-cell>
          <table:table-cell office:value-type="float" office:value="937.4" calcext:value-type="float">
            <text:p>937.4</text:p>
          </table:table-cell>
          <table:table-cell office:value-type="float" office:value="1163.8" calcext:value-type="float">
            <text:p>1163.8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4:57:56.600</text:p>
          </table:table-cell>
          <table:table-cell office:value-type="string" calcext:value-type="string">
            <text:p>2025-10-03 10:57:56.600</text:p>
          </table:table-cell>
          <table:table-cell office:value-type="string" calcext:value-type="string">
            <text:p>SHORT</text:p>
          </table:table-cell>
          <table:table-cell office:value-type="float" office:value="25117.25" calcext:value-type="float">
            <text:p>25117.25</text:p>
          </table:table-cell>
          <table:table-cell office:value-type="float" office:value="25107.25" calcext:value-type="float">
            <text:p>25107.25</text:p>
          </table:table-cell>
          <table:table-cell office:value-type="float" office:value="25122.25" calcext:value-type="float">
            <text:p>2512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4:57:57.600</text:p>
          </table:table-cell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5:01:45.3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1121.7" calcext:value-type="float">
            <text:p>1121.7</text:p>
          </table:table-cell>
          <table:table-cell office:value-type="float" office:value="1163.8" calcext:value-type="float">
            <text:p>1163.8</text:p>
          </table:table-cell>
          <table:table-cell office:value-type="float" office:value="-42.1000000000001" calcext:value-type="float">
            <text:p>-42.1000000000001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01:50.800</text:p>
          </table:table-cell>
          <table:table-cell office:value-type="string" calcext:value-type="string">
            <text:p>2025-10-03 11:01:50.800</text:p>
          </table:table-cell>
          <table:table-cell office:value-type="string" calcext:value-type="string">
            <text:p>SHORT</text:p>
          </table:table-cell>
          <table:table-cell office:value-type="float" office:value="25107.5" calcext:value-type="float">
            <text:p>25107.5</text:p>
          </table:table-cell>
          <table:table-cell office:value-type="float" office:value="25097.5" calcext:value-type="float">
            <text:p>25097.5</text:p>
          </table:table-cell>
          <table:table-cell office:value-type="float" office:value="25112.5" calcext:value-type="float">
            <text:p>2511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01:51.100</text:p>
          </table:table-cell>
          <table:table-cell office:value-type="float" office:value="175" calcext:value-type="float">
            <text:p>175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00.3" calcext:value-type="float">
            <text:p>120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06:29.900</text:p>
          </table:table-cell>
          <table:table-cell office:value-type="string" calcext:value-type="string">
            <text:p>2025-10-03 11:06:29.900</text:p>
          </table:table-cell>
          <table:table-cell office:value-type="string" calcext:value-type="string">
            <text:p>SHORT</text:p>
          </table:table-cell>
          <table:table-cell office:value-type="float" office:value="25116" calcext:value-type="float">
            <text:p>25116</text:p>
          </table:table-cell>
          <table:table-cell office:value-type="float" office:value="25106" calcext:value-type="float">
            <text:p>25106</text:p>
          </table:table-cell>
          <table:table-cell office:value-type="float" office:value="25121" calcext:value-type="float">
            <text:p>2512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5:06:30.900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5:07:07.1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79.6" calcext:value-type="float">
            <text:p>1079.6</text:p>
          </table:table-cell>
          <table:table-cell office:value-type="float" office:value="1" calcext:value-type="float">
            <text:p>1</text:p>
          </table:table-cell>
          <table:table-cell office:value-type="float" office:value="1190.3" calcext:value-type="float">
            <text:p>1190.3</text:p>
          </table:table-cell>
          <table:table-cell office:value-type="float" office:value="1311" calcext:value-type="float">
            <text:p>131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08:12.900</text:p>
          </table:table-cell>
          <table:table-cell office:value-type="string" calcext:value-type="string">
            <text:p>2025-10-03 11:08:12.900</text:p>
          </table:table-cell>
          <table:table-cell office:value-type="string" calcext:value-type="string">
            <text:p>SHORT</text:p>
          </table:table-cell>
          <table:table-cell office:value-type="float" office:value="25117.75" calcext:value-type="float">
            <text:p>25117.75</text:p>
          </table:table-cell>
          <table:table-cell office:value-type="float" office:value="25107.75" calcext:value-type="float">
            <text:p>25107.75</text:p>
          </table:table-cell>
          <table:table-cell office:value-type="float" office:value="25122.75" calcext:value-type="float">
            <text:p>2512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08:16.20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5:09:34.4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68.9" calcext:value-type="float">
            <text:p>1268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9.6" calcext:value-type="float">
            <text:p>137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0:32.700</text:p>
          </table:table-cell>
          <table:table-cell office:value-type="string" calcext:value-type="string">
            <text:p>2025-10-03 11:10:32.700</text:p>
          </table:table-cell>
          <table:table-cell office:value-type="string" calcext:value-type="string">
            <text:p>SHORT</text:p>
          </table:table-cell>
          <table:table-cell office:value-type="float" office:value="25103.5" calcext:value-type="float">
            <text:p>25103.5</text:p>
          </table:table-cell>
          <table:table-cell office:value-type="float" office:value="25093.5" calcext:value-type="float">
            <text:p>25093.5</text:p>
          </table:table-cell>
          <table:table-cell office:value-type="float" office:value="25108.5" calcext:value-type="float">
            <text:p>2510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5:10:33.700</text:p>
          </table:table-cell>
          <table:table-cell office:value-type="float" office:value="75" calcext:value-type="float">
            <text:p>75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53.2" calcext:value-type="float">
            <text:p>145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3.9" calcext:value-type="float">
            <text:p>156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1:03.900</text:p>
          </table:table-cell>
          <table:table-cell office:value-type="string" calcext:value-type="string">
            <text:p>2025-10-03 11:11:03.900</text:p>
          </table:table-cell>
          <table:table-cell office:value-type="string" calcext:value-type="string">
            <text:p>LONG</text:p>
          </table:table-cell>
          <table:table-cell office:value-type="float" office:value="25107.25" calcext:value-type="float">
            <text:p>25107.25</text:p>
          </table:table-cell>
          <table:table-cell office:value-type="float" office:value="25117.25" calcext:value-type="float">
            <text:p>25117.25</text:p>
          </table:table-cell>
          <table:table-cell office:value-type="float" office:value="25102.25" calcext:value-type="float">
            <text:p>2510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5:11:04.900</text:p>
          </table:table-cell>
          <table:table-cell office:value-type="float" office:value="1180" calcext:value-type="float">
            <text:p>118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40.7" calcext:value-type="float">
            <text:p>-14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12.5" calcext:value-type="float">
            <text:p>1312.5</text:p>
          </table:table-cell>
          <table:table-cell office:value-type="float" office:value="1" calcext:value-type="float">
            <text:p>1</text:p>
          </table:table-cell>
          <table:table-cell office:value-type="float" office:value="1423.2" calcext:value-type="float">
            <text:p>1423.2</text:p>
          </table:table-cell>
          <table:table-cell office:value-type="float" office:value="1563.9" calcext:value-type="float">
            <text:p>1563.9</text:p>
          </table:table-cell>
          <table:table-cell office:value-type="float" office:value="-140.7" calcext:value-type="float">
            <text:p>-14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1:07.800</text:p>
          </table:table-cell>
          <table:table-cell office:value-type="string" calcext:value-type="string">
            <text:p>2025-10-03 11:11:07.800</text:p>
          </table:table-cell>
          <table:table-cell office:value-type="string" calcext:value-type="string">
            <text:p>SHORT</text:p>
          </table:table-cell>
          <table:table-cell office:value-type="float" office:value="25110" calcext:value-type="float">
            <text:p>25110</text:p>
          </table:table-cell>
          <table:table-cell office:value-type="float" office:value="25100" calcext:value-type="float">
            <text:p>25100</text:p>
          </table:table-cell>
          <table:table-cell office:value-type="float" office:value="25115" calcext:value-type="float">
            <text:p>2511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5:11:08.80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91.8" calcext:value-type="float">
            <text:p>149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2.5" calcext:value-type="float">
            <text:p>160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3:20.700</text:p>
          </table:table-cell>
          <table:table-cell office:value-type="string" calcext:value-type="string">
            <text:p>2025-10-03 11:13:20.700</text:p>
          </table:table-cell>
          <table:table-cell office:value-type="string" calcext:value-type="string">
            <text:p>SHORT</text:p>
          </table:table-cell>
          <table:table-cell office:value-type="float" office:value="25122.5" calcext:value-type="float">
            <text:p>25122.5</text:p>
          </table:table-cell>
          <table:table-cell office:value-type="float" office:value="25112.5" calcext:value-type="float">
            <text:p>25112.5</text:p>
          </table:table-cell>
          <table:table-cell office:value-type="float" office:value="25127.5" calcext:value-type="float">
            <text:p>2512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13:22.800</text:p>
          </table:table-cell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81.1" calcext:value-type="float">
            <text:p>168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1.8" calcext:value-type="float">
            <text:p>179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3:44.500</text:p>
          </table:table-cell>
          <table:table-cell office:value-type="string" calcext:value-type="string">
            <text:p>2025-10-03 11:13:44.500</text:p>
          </table:table-cell>
          <table:table-cell office:value-type="string" calcext:value-type="string">
            <text:p>LONG</text:p>
          </table:table-cell>
          <table:table-cell office:value-type="float" office:value="25120.25" calcext:value-type="float">
            <text:p>25120.25</text:p>
          </table:table-cell>
          <table:table-cell office:value-type="float" office:value="25130.25" calcext:value-type="float">
            <text:p>25130.25</text:p>
          </table:table-cell>
          <table:table-cell office:value-type="float" office:value="25115.25" calcext:value-type="float">
            <text:p>2511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13:47.9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70.4" calcext:value-type="float">
            <text:p>1570.4</text:p>
          </table:table-cell>
          <table:table-cell office:value-type="float" office:value="1" calcext:value-type="float">
            <text:p>1</text:p>
          </table:table-cell>
          <table:table-cell office:value-type="float" office:value="1681.1" calcext:value-type="float">
            <text:p>1681.1</text:p>
          </table:table-cell>
          <table:table-cell office:value-type="float" office:value="1791.8" calcext:value-type="float">
            <text:p>1791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7:09.900</text:p>
          </table:table-cell>
          <table:table-cell office:value-type="string" calcext:value-type="string">
            <text:p>2025-10-03 11:17:09.900</text:p>
          </table:table-cell>
          <table:table-cell office:value-type="string" calcext:value-type="string">
            <text:p>SHORT</text:p>
          </table:table-cell>
          <table:table-cell office:value-type="float" office:value="25128.75" calcext:value-type="float">
            <text:p>25128.75</text:p>
          </table:table-cell>
          <table:table-cell office:value-type="float" office:value="25118.75" calcext:value-type="float">
            <text:p>25118.75</text:p>
          </table:table-cell>
          <table:table-cell office:value-type="float" office:value="25133.75" calcext:value-type="float">
            <text:p>2513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5:17:10.900</text:p>
          </table:table-cell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754.7" calcext:value-type="float">
            <text:p>175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5.4" calcext:value-type="float">
            <text:p>186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7:29.600</text:p>
          </table:table-cell>
          <table:table-cell office:value-type="string" calcext:value-type="string">
            <text:p>2025-10-03 11:17:29.600</text:p>
          </table:table-cell>
          <table:table-cell office:value-type="string" calcext:value-type="string">
            <text:p>LONG</text:p>
          </table:table-cell>
          <table:table-cell office:value-type="float" office:value="25130.25" calcext:value-type="float">
            <text:p>25130.25</text:p>
          </table:table-cell>
          <table:table-cell office:value-type="float" office:value="25140.25" calcext:value-type="float">
            <text:p>25140.25</text:p>
          </table:table-cell>
          <table:table-cell office:value-type="float" office:value="25125.25" calcext:value-type="float">
            <text:p>2512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17:30.100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5:18:28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1754.7" calcext:value-type="float">
            <text:p>1754.7</text:p>
          </table:table-cell>
          <table:table-cell office:value-type="float" office:value="1865.4" calcext:value-type="float">
            <text:p>1865.4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19:11.500</text:p>
          </table:table-cell>
          <table:table-cell office:value-type="string" calcext:value-type="string">
            <text:p>2025-10-03 11:19:11.500</text:p>
          </table:table-cell>
          <table:table-cell office:value-type="string" calcext:value-type="string">
            <text:p>SHORT</text:p>
          </table:table-cell>
          <table:table-cell office:value-type="float" office:value="25130.5" calcext:value-type="float">
            <text:p>25130.5</text:p>
          </table:table-cell>
          <table:table-cell office:value-type="float" office:value="25120.5" calcext:value-type="float">
            <text:p>25120.5</text:p>
          </table:table-cell>
          <table:table-cell office:value-type="float" office:value="25135.5" calcext:value-type="float">
            <text:p>2513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5:19:12.500</text:p>
          </table:table-cell>
          <table:table-cell office:value-type="float" office:value="76" calcext:value-type="float">
            <text:p>76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828.3" calcext:value-type="float">
            <text:p>182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21:42.100</text:p>
          </table:table-cell>
          <table:table-cell office:value-type="string" calcext:value-type="string">
            <text:p>2025-10-03 11:21:42.100</text:p>
          </table:table-cell>
          <table:table-cell office:value-type="string" calcext:value-type="string">
            <text:p>LONG</text:p>
          </table:table-cell>
          <table:table-cell office:value-type="float" office:value="25132.5" calcext:value-type="float">
            <text:p>25132.5</text:p>
          </table:table-cell>
          <table:table-cell office:value-type="float" office:value="25142.5" calcext:value-type="float">
            <text:p>25142.5</text:p>
          </table:table-cell>
          <table:table-cell office:value-type="float" office:value="25127.5" calcext:value-type="float">
            <text:p>2512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21:43.200</text:p>
          </table:table-cell>
          <table:table-cell office:value-type="float" office:value="186" calcext:value-type="float">
            <text:p>18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5:24:58.7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017.6" calcext:value-type="float">
            <text:p>2017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8.3" calcext:value-type="float">
            <text:p>21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25:23.600</text:p>
          </table:table-cell>
          <table:table-cell office:value-type="string" calcext:value-type="string">
            <text:p>2025-10-03 11:25:23.600</text:p>
          </table:table-cell>
          <table:table-cell office:value-type="string" calcext:value-type="string">
            <text:p>SHORT</text:p>
          </table:table-cell>
          <table:table-cell office:value-type="float" office:value="25141.25" calcext:value-type="float">
            <text:p>25141.25</text:p>
          </table:table-cell>
          <table:table-cell office:value-type="float" office:value="25131.25" calcext:value-type="float">
            <text:p>25131.25</text:p>
          </table:table-cell>
          <table:table-cell office:value-type="float" office:value="25146.25" calcext:value-type="float">
            <text:p>2514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25:27.200</text:p>
          </table:table-cell>
          <table:table-cell office:value-type="float" office:value="137" calcext:value-type="float">
            <text:p>137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906.9" calcext:value-type="float">
            <text:p>1906.9</text:p>
          </table:table-cell>
          <table:table-cell office:value-type="float" office:value="1" calcext:value-type="float">
            <text:p>1</text:p>
          </table:table-cell>
          <table:table-cell office:value-type="float" office:value="2017.6" calcext:value-type="float">
            <text:p>2017.6</text:p>
          </table:table-cell>
          <table:table-cell office:value-type="float" office:value="2128.3" calcext:value-type="float">
            <text:p>2128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27:50.600</text:p>
          </table:table-cell>
          <table:table-cell office:value-type="string" calcext:value-type="string">
            <text:p>2025-10-03 11:27:50.600</text:p>
          </table:table-cell>
          <table:table-cell office:value-type="string" calcext:value-type="string">
            <text:p>LONG</text:p>
          </table:table-cell>
          <table:table-cell office:value-type="float" office:value="25135.75" calcext:value-type="float">
            <text:p>25135.75</text:p>
          </table:table-cell>
          <table:table-cell office:value-type="float" office:value="25145.75" calcext:value-type="float">
            <text:p>25145.75</text:p>
          </table:table-cell>
          <table:table-cell office:value-type="float" office:value="25130.75" calcext:value-type="float">
            <text:p>2513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27:51.70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096.2" calcext:value-type="float">
            <text:p>2096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6.9" calcext:value-type="float">
            <text:p>220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28:52.000</text:p>
          </table:table-cell>
          <table:table-cell office:value-type="string" calcext:value-type="string">
            <text:p>2025-10-03 11:28:52.000</text:p>
          </table:table-cell>
          <table:table-cell office:value-type="string" calcext:value-type="string">
            <text:p>SHORT</text:p>
          </table:table-cell>
          <table:table-cell office:value-type="float" office:value="25129" calcext:value-type="float">
            <text:p>25129</text:p>
          </table:table-cell>
          <table:table-cell office:value-type="float" office:value="25119" calcext:value-type="float">
            <text:p>25119</text:p>
          </table:table-cell>
          <table:table-cell office:value-type="float" office:value="25134" calcext:value-type="float">
            <text:p>2513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28:53.20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285.5" calcext:value-type="float">
            <text:p>228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96.2" calcext:value-type="float">
            <text:p>239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31:32.500</text:p>
          </table:table-cell>
          <table:table-cell office:value-type="string" calcext:value-type="string">
            <text:p>2025-10-03 11:31:32.500</text:p>
          </table:table-cell>
          <table:table-cell office:value-type="string" calcext:value-type="string">
            <text:p>SHORT</text:p>
          </table:table-cell>
          <table:table-cell office:value-type="float" office:value="25133.75" calcext:value-type="float">
            <text:p>25133.75</text:p>
          </table:table-cell>
          <table:table-cell office:value-type="float" office:value="25123.75" calcext:value-type="float">
            <text:p>25123.75</text:p>
          </table:table-cell>
          <table:table-cell office:value-type="float" office:value="25138.75" calcext:value-type="float">
            <text:p>2513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31:32.800</text:p>
          </table:table-cell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174.8" calcext:value-type="float">
            <text:p>2174.8</text:p>
          </table:table-cell>
          <table:table-cell office:value-type="float" office:value="1" calcext:value-type="float">
            <text:p>1</text:p>
          </table:table-cell>
          <table:table-cell office:value-type="float" office:value="2285.5" calcext:value-type="float">
            <text:p>2285.5</text:p>
          </table:table-cell>
          <table:table-cell office:value-type="float" office:value="2396.2" calcext:value-type="float">
            <text:p>2396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32:11.500</text:p>
          </table:table-cell>
          <table:table-cell office:value-type="string" calcext:value-type="string">
            <text:p>2025-10-03 11:32:11.500</text:p>
          </table:table-cell>
          <table:table-cell office:value-type="string" calcext:value-type="string">
            <text:p>LONG</text:p>
          </table:table-cell>
          <table:table-cell office:value-type="float" office:value="25131.25" calcext:value-type="float">
            <text:p>25131.25</text:p>
          </table:table-cell>
          <table:table-cell office:value-type="float" office:value="25141.25" calcext:value-type="float">
            <text:p>25141.25</text:p>
          </table:table-cell>
          <table:table-cell office:value-type="float" office:value="25126.25" calcext:value-type="float">
            <text:p>2512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32:12.200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364.1" calcext:value-type="float">
            <text:p>236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74.8" calcext:value-type="float">
            <text:p>247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36:22.100</text:p>
          </table:table-cell>
          <table:table-cell office:value-type="string" calcext:value-type="string">
            <text:p>2025-10-03 11:36:22.100</text:p>
          </table:table-cell>
          <table:table-cell office:value-type="string" calcext:value-type="string">
            <text:p>SHORT</text:p>
          </table:table-cell>
          <table:table-cell office:value-type="float" office:value="25137.25" calcext:value-type="float">
            <text:p>25137.25</text:p>
          </table:table-cell>
          <table:table-cell office:value-type="float" office:value="25127.25" calcext:value-type="float">
            <text:p>25127.25</text:p>
          </table:table-cell>
          <table:table-cell office:value-type="float" office:value="25142.25" calcext:value-type="float">
            <text:p>2514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36:23.000</text:p>
          </table:table-cell>
          <table:table-cell office:value-type="float" office:value="107" calcext:value-type="float">
            <text:p>107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253.4" calcext:value-type="float">
            <text:p>2253.4</text:p>
          </table:table-cell>
          <table:table-cell office:value-type="float" office:value="1" calcext:value-type="float">
            <text:p>1</text:p>
          </table:table-cell>
          <table:table-cell office:value-type="float" office:value="2364.1" calcext:value-type="float">
            <text:p>2364.1</text:p>
          </table:table-cell>
          <table:table-cell office:value-type="float" office:value="2474.8" calcext:value-type="float">
            <text:p>2474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38:39.700</text:p>
          </table:table-cell>
          <table:table-cell office:value-type="string" calcext:value-type="string">
            <text:p>2025-10-03 11:38:39.700</text:p>
          </table:table-cell>
          <table:table-cell office:value-type="string" calcext:value-type="string">
            <text:p>SHORT</text:p>
          </table:table-cell>
          <table:table-cell office:value-type="float" office:value="25123.75" calcext:value-type="float">
            <text:p>25123.75</text:p>
          </table:table-cell>
          <table:table-cell office:value-type="float" office:value="25113.75" calcext:value-type="float">
            <text:p>25113.75</text:p>
          </table:table-cell>
          <table:table-cell office:value-type="float" office:value="25128.75" calcext:value-type="float">
            <text:p>2512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38:42.000</text:p>
          </table:table-cell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142.7" calcext:value-type="float">
            <text:p>2142.7</text:p>
          </table:table-cell>
          <table:table-cell office:value-type="float" office:value="2" calcext:value-type="float">
            <text:p>2</text:p>
          </table:table-cell>
          <table:table-cell office:value-type="float" office:value="2253.4" calcext:value-type="float">
            <text:p>2253.4</text:p>
          </table:table-cell>
          <table:table-cell office:value-type="float" office:value="2474.8" calcext:value-type="float">
            <text:p>2474.8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43:49.900</text:p>
          </table:table-cell>
          <table:table-cell office:value-type="string" calcext:value-type="string">
            <text:p>2025-10-03 11:43:49.900</text:p>
          </table:table-cell>
          <table:table-cell office:value-type="string" calcext:value-type="string">
            <text:p>LONG</text:p>
          </table:table-cell>
          <table:table-cell office:value-type="float" office:value="25116.25" calcext:value-type="float">
            <text:p>25116.25</text:p>
          </table:table-cell>
          <table:table-cell office:value-type="float" office:value="25126.25" calcext:value-type="float">
            <text:p>25126.25</text:p>
          </table:table-cell>
          <table:table-cell office:value-type="float" office:value="25111.25" calcext:value-type="float">
            <text:p>2511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43:52.300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</text:p>
          </table:table-cell>
          <table:table-cell office:value-type="float" office:value="2142.7" calcext:value-type="float">
            <text:p>2142.7</text:p>
          </table:table-cell>
          <table:table-cell office:value-type="float" office:value="2474.8" calcext:value-type="float">
            <text:p>2474.8</text:p>
          </table:table-cell>
          <table:table-cell office:value-type="float" office:value="-332.099999999999" calcext:value-type="float">
            <text:p>-332.0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49:05.800</text:p>
          </table:table-cell>
          <table:table-cell office:value-type="string" calcext:value-type="string">
            <text:p>2025-10-03 11:49:05.800</text:p>
          </table:table-cell>
          <table:table-cell office:value-type="string" calcext:value-type="string">
            <text:p>SHORT</text:p>
          </table:table-cell>
          <table:table-cell office:value-type="float" office:value="25124" calcext:value-type="float">
            <text:p>25124</text:p>
          </table:table-cell>
          <table:table-cell office:value-type="float" office:value="25114" calcext:value-type="float">
            <text:p>25114</text:p>
          </table:table-cell>
          <table:table-cell office:value-type="float" office:value="25129" calcext:value-type="float">
            <text:p>2512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49:09.400</text:p>
          </table:table-cell>
          <table:table-cell office:value-type="float" office:value="84" calcext:value-type="float">
            <text:p>84</text:p>
          </table:table-cell>
          <table:table-cell office:value-type="float" office:value="-35" calcext:value-type="float">
            <text:p>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21.3" calcext:value-type="float">
            <text:p>2221.3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2474.8" calcext:value-type="float">
            <text:p>2474.8</text:p>
          </table:table-cell>
          <table:table-cell office:value-type="float" office:value="-142.799999999999" calcext:value-type="float">
            <text:p>-142.7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53:13.800</text:p>
          </table:table-cell>
          <table:table-cell office:value-type="string" calcext:value-type="string">
            <text:p>2025-10-03 11:53:13.800</text:p>
          </table:table-cell>
          <table:table-cell office:value-type="string" calcext:value-type="string">
            <text:p>SHORT</text:p>
          </table:table-cell>
          <table:table-cell office:value-type="float" office:value="25131.5" calcext:value-type="float">
            <text:p>25131.5</text:p>
          </table:table-cell>
          <table:table-cell office:value-type="float" office:value="25121.5" calcext:value-type="float">
            <text:p>25121.5</text:p>
          </table:table-cell>
          <table:table-cell office:value-type="float" office:value="25136.5" calcext:value-type="float">
            <text:p>2513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53:16.70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410.6" calcext:value-type="float">
            <text:p>241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21.3" calcext:value-type="float">
            <text:p>25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5:57:10.900</text:p>
          </table:table-cell>
          <table:table-cell office:value-type="string" calcext:value-type="string">
            <text:p>2025-10-03 11:57:10.900</text:p>
          </table:table-cell>
          <table:table-cell office:value-type="string" calcext:value-type="string">
            <text:p>SHORT</text:p>
          </table:table-cell>
          <table:table-cell office:value-type="float" office:value="25151.5" calcext:value-type="float">
            <text:p>25151.5</text:p>
          </table:table-cell>
          <table:table-cell office:value-type="float" office:value="25141.5" calcext:value-type="float">
            <text:p>25141.5</text:p>
          </table:table-cell>
          <table:table-cell office:value-type="float" office:value="25156.5" calcext:value-type="float">
            <text:p>2515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5:57:11.000</text:p>
          </table:table-cell>
          <table:table-cell office:value-type="float" office:value="196" calcext:value-type="float">
            <text:p>19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299.9" calcext:value-type="float">
            <text:p>2299.9</text:p>
          </table:table-cell>
          <table:table-cell office:value-type="float" office:value="1" calcext:value-type="float">
            <text:p>1</text:p>
          </table:table-cell>
          <table:table-cell office:value-type="float" office:value="2410.6" calcext:value-type="float">
            <text:p>2410.6</text:p>
          </table:table-cell>
          <table:table-cell office:value-type="float" office:value="2521.3" calcext:value-type="float">
            <text:p>2521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06:41.900</text:p>
          </table:table-cell>
          <table:table-cell office:value-type="string" calcext:value-type="string">
            <text:p>2025-10-03 12:06:41.900</text:p>
          </table:table-cell>
          <table:table-cell office:value-type="string" calcext:value-type="string">
            <text:p>SHORT</text:p>
          </table:table-cell>
          <table:table-cell office:value-type="float" office:value="25153.5" calcext:value-type="float">
            <text:p>25153.5</text:p>
          </table:table-cell>
          <table:table-cell office:value-type="float" office:value="25143.5" calcext:value-type="float">
            <text:p>25143.5</text:p>
          </table:table-cell>
          <table:table-cell office:value-type="float" office:value="25158.5" calcext:value-type="float">
            <text:p>2515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6:06:42.900</text:p>
          </table:table-cell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179.2" calcext:value-type="float">
            <text:p>2179.2</text:p>
          </table:table-cell>
          <table:table-cell office:value-type="float" office:value="2" calcext:value-type="float">
            <text:p>2</text:p>
          </table:table-cell>
          <table:table-cell office:value-type="float" office:value="2289.9" calcext:value-type="float">
            <text:p>2289.9</text:p>
          </table:table-cell>
          <table:table-cell office:value-type="float" office:value="2521.3" calcext:value-type="float">
            <text:p>2521.3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07:59.900</text:p>
          </table:table-cell>
          <table:table-cell office:value-type="string" calcext:value-type="string">
            <text:p>2025-10-03 12:07:59.900</text:p>
          </table:table-cell>
          <table:table-cell office:value-type="string" calcext:value-type="string">
            <text:p>SHORT</text:p>
          </table:table-cell>
          <table:table-cell office:value-type="float" office:value="25150.5" calcext:value-type="float">
            <text:p>25150.5</text:p>
          </table:table-cell>
          <table:table-cell office:value-type="float" office:value="25140.5" calcext:value-type="float">
            <text:p>25140.5</text:p>
          </table:table-cell>
          <table:table-cell office:value-type="float" office:value="25155.5" calcext:value-type="float">
            <text:p>2515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6:08:00.900</text:p>
          </table:table-cell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063.5" calcext:value-type="float">
            <text:p>2063.5</text:p>
          </table:table-cell>
          <table:table-cell office:value-type="float" office:value="3" calcext:value-type="float">
            <text:p>3</text:p>
          </table:table-cell>
          <table:table-cell office:value-type="float" office:value="2174.2" calcext:value-type="float">
            <text:p>2174.2</text:p>
          </table:table-cell>
          <table:table-cell office:value-type="float" office:value="2521.3" calcext:value-type="float">
            <text:p>2521.3</text:p>
          </table:table-cell>
          <table:table-cell office:value-type="float" office:value="-347.099999999999" calcext:value-type="float">
            <text:p>-347.0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13:36.300</text:p>
          </table:table-cell>
          <table:table-cell office:value-type="string" calcext:value-type="string">
            <text:p>2025-10-03 12:13:36.300</text:p>
          </table:table-cell>
          <table:table-cell office:value-type="string" calcext:value-type="string">
            <text:p>SHORT</text:p>
          </table:table-cell>
          <table:table-cell office:value-type="float" office:value="25142.5" calcext:value-type="float">
            <text:p>25142.5</text:p>
          </table:table-cell>
          <table:table-cell office:value-type="float" office:value="25132.5" calcext:value-type="float">
            <text:p>25132.5</text:p>
          </table:table-cell>
          <table:table-cell office:value-type="float" office:value="25147.5" calcext:value-type="float">
            <text:p>2514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6:13:37.8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910.7" calcext:value-type="float">
            <text:p>1910.7</text:p>
          </table:table-cell>
          <table:table-cell office:value-type="float" office:value="0" calcext:value-type="float">
            <text:p>0</text:p>
          </table:table-cell>
          <table:table-cell office:value-type="float" office:value="2363.5" calcext:value-type="float">
            <text:p>2363.5</text:p>
          </table:table-cell>
          <table:table-cell office:value-type="float" office:value="2521.3" calcext:value-type="float">
            <text:p>2521.3</text:p>
          </table:table-cell>
          <table:table-cell office:value-type="float" office:value="-157.799999999999" calcext:value-type="float">
            <text:p>-157.7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13:36.500</text:p>
          </table:table-cell>
          <table:table-cell office:value-type="string" calcext:value-type="string">
            <text:p>2025-10-03 12:13:36.500</text:p>
          </table:table-cell>
          <table:table-cell office:value-type="string" calcext:value-type="string">
            <text:p>SHORT</text:p>
          </table:table-cell>
          <table:table-cell office:value-type="float" office:value="25142.5" calcext:value-type="float">
            <text:p>25142.5</text:p>
          </table:table-cell>
          <table:table-cell office:value-type="float" office:value="25132.5" calcext:value-type="float">
            <text:p>25132.5</text:p>
          </table:table-cell>
          <table:table-cell office:value-type="float" office:value="25147.5" calcext:value-type="float">
            <text:p>2514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6:13:38.900</text:p>
          </table:table-cell>
          <table:table-cell office:value-type="float" office:value="70" calcext:value-type="float">
            <text:p>7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2.8" calcext:value-type="float">
            <text:p>255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37:56.400</text:p>
          </table:table-cell>
          <table:table-cell office:value-type="string" calcext:value-type="string">
            <text:p>2025-10-03 12:37:56.400</text:p>
          </table:table-cell>
          <table:table-cell office:value-type="string" calcext:value-type="string">
            <text:p>SHORT</text:p>
          </table:table-cell>
          <table:table-cell office:value-type="float" office:value="25133.75" calcext:value-type="float">
            <text:p>25133.75</text:p>
          </table:table-cell>
          <table:table-cell office:value-type="float" office:value="25123.75" calcext:value-type="float">
            <text:p>25123.75</text:p>
          </table:table-cell>
          <table:table-cell office:value-type="float" office:value="25138.75" calcext:value-type="float">
            <text:p>2513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6:37:57.4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984.3" calcext:value-type="float">
            <text:p>1984.3</text:p>
          </table:table-cell>
          <table:table-cell office:value-type="float" office:value="1" calcext:value-type="float">
            <text:p>1</text:p>
          </table:table-cell>
          <table:table-cell office:value-type="float" office:value="2437.1" calcext:value-type="float">
            <text:p>2437.1</text:p>
          </table:table-cell>
          <table:table-cell office:value-type="float" office:value="2552.8" calcext:value-type="float">
            <text:p>2552.8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38:00.700</text:p>
          </table:table-cell>
          <table:table-cell office:value-type="string" calcext:value-type="string">
            <text:p>2025-10-03 12:38:00.700</text:p>
          </table:table-cell>
          <table:table-cell office:value-type="string" calcext:value-type="string">
            <text:p>LONG</text:p>
          </table:table-cell>
          <table:table-cell office:value-type="float" office:value="25134.5" calcext:value-type="float">
            <text:p>25134.5</text:p>
          </table:table-cell>
          <table:table-cell office:value-type="float" office:value="25144.5" calcext:value-type="float">
            <text:p>25144.5</text:p>
          </table:table-cell>
          <table:table-cell office:value-type="float" office:value="25129.5" calcext:value-type="float">
            <text:p>2512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6:38:00.8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173.6" calcext:value-type="float">
            <text:p>217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26.4" calcext:value-type="float">
            <text:p>26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42:20.500</text:p>
          </table:table-cell>
          <table:table-cell office:value-type="string" calcext:value-type="string">
            <text:p>2025-10-03 12:42:20.500</text:p>
          </table:table-cell>
          <table:table-cell office:value-type="string" calcext:value-type="string">
            <text:p>SHORT</text:p>
          </table:table-cell>
          <table:table-cell office:value-type="float" office:value="25124.75" calcext:value-type="float">
            <text:p>25124.75</text:p>
          </table:table-cell>
          <table:table-cell office:value-type="float" office:value="25114.75" calcext:value-type="float">
            <text:p>25114.75</text:p>
          </table:table-cell>
          <table:table-cell office:value-type="float" office:value="25129.75" calcext:value-type="float">
            <text:p>2512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6:42:21.50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52.9" calcext:value-type="float">
            <text:p>2052.9</text:p>
          </table:table-cell>
          <table:table-cell office:value-type="float" office:value="1" calcext:value-type="float">
            <text:p>1</text:p>
          </table:table-cell>
          <table:table-cell office:value-type="float" office:value="2505.7" calcext:value-type="float">
            <text:p>2505.7</text:p>
          </table:table-cell>
          <table:table-cell office:value-type="float" office:value="2626.4" calcext:value-type="float">
            <text:p>2626.4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46:56.100</text:p>
          </table:table-cell>
          <table:table-cell office:value-type="string" calcext:value-type="string">
            <text:p>2025-10-03 12:46:56.100</text:p>
          </table:table-cell>
          <table:table-cell office:value-type="string" calcext:value-type="string">
            <text:p>SHORT</text:p>
          </table:table-cell>
          <table:table-cell office:value-type="float" office:value="25118.75" calcext:value-type="float">
            <text:p>25118.75</text:p>
          </table:table-cell>
          <table:table-cell office:value-type="float" office:value="25108.75" calcext:value-type="float">
            <text:p>25108.75</text:p>
          </table:table-cell>
          <table:table-cell office:value-type="float" office:value="25123.75" calcext:value-type="float">
            <text:p>2512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6:46:57.100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6:48:22.3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37.2" calcext:value-type="float">
            <text:p>1937.2</text:p>
          </table:table-cell>
          <table:table-cell office:value-type="float" office:value="2" calcext:value-type="float">
            <text:p>2</text:p>
          </table:table-cell>
          <table:table-cell office:value-type="float" office:value="2390" calcext:value-type="float">
            <text:p>2390</text:p>
          </table:table-cell>
          <table:table-cell office:value-type="float" office:value="2626.4" calcext:value-type="float">
            <text:p>2626.4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6:53:20.500</text:p>
          </table:table-cell>
          <table:table-cell office:value-type="string" calcext:value-type="string">
            <text:p>2025-10-03 12:53:20.500</text:p>
          </table:table-cell>
          <table:table-cell office:value-type="string" calcext:value-type="string">
            <text:p>SHORT</text:p>
          </table:table-cell>
          <table:table-cell office:value-type="float" office:value="25119.5" calcext:value-type="float">
            <text:p>25119.5</text:p>
          </table:table-cell>
          <table:table-cell office:value-type="float" office:value="25109.5" calcext:value-type="float">
            <text:p>25109.5</text:p>
          </table:table-cell>
          <table:table-cell office:value-type="float" office:value="25124.5" calcext:value-type="float">
            <text:p>2512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6:53:21.500</text:p>
          </table:table-cell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6:55:17.9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16.5" calcext:value-type="float">
            <text:p>1816.5</text:p>
          </table:table-cell>
          <table:table-cell office:value-type="float" office:value="3" calcext:value-type="float">
            <text:p>3</text:p>
          </table:table-cell>
          <table:table-cell office:value-type="float" office:value="2269.3" calcext:value-type="float">
            <text:p>2269.3</text:p>
          </table:table-cell>
          <table:table-cell office:value-type="float" office:value="2626.4" calcext:value-type="float">
            <text:p>2626.4</text:p>
          </table:table-cell>
          <table:table-cell office:value-type="float" office:value="-357.099999999999" calcext:value-type="float">
            <text:p>-357.0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16:35.100</text:p>
          </table:table-cell>
          <table:table-cell office:value-type="string" calcext:value-type="string">
            <text:p>2025-10-03 13:16:35.100</text:p>
          </table:table-cell>
          <table:table-cell office:value-type="string" calcext:value-type="string">
            <text:p>LONG</text:p>
          </table:table-cell>
          <table:table-cell office:value-type="float" office:value="25076.5" calcext:value-type="float">
            <text:p>25076.5</text:p>
          </table:table-cell>
          <table:table-cell office:value-type="float" office:value="25086.5" calcext:value-type="float">
            <text:p>25086.5</text:p>
          </table:table-cell>
          <table:table-cell office:value-type="float" office:value="25071.5" calcext:value-type="float">
            <text:p>2507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7:16:36.2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95.1" calcext:value-type="float">
            <text:p>1895.1</text:p>
          </table:table-cell>
          <table:table-cell office:value-type="float" office:value="0" calcext:value-type="float">
            <text:p>0</text:p>
          </table:table-cell>
          <table:table-cell office:value-type="float" office:value="2458.6" calcext:value-type="float">
            <text:p>2458.6</text:p>
          </table:table-cell>
          <table:table-cell office:value-type="float" office:value="2626.4" calcext:value-type="float">
            <text:p>2626.4</text:p>
          </table:table-cell>
          <table:table-cell office:value-type="float" office:value="-167.799999999999" calcext:value-type="float">
            <text:p>-167.7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17:16.700</text:p>
          </table:table-cell>
          <table:table-cell office:value-type="string" calcext:value-type="string">
            <text:p>2025-10-03 13:17:16.700</text:p>
          </table:table-cell>
          <table:table-cell office:value-type="string" calcext:value-type="string">
            <text:p>SHORT</text:p>
          </table:table-cell>
          <table:table-cell office:value-type="float" office:value="25076" calcext:value-type="float">
            <text:p>25076</text:p>
          </table:table-cell>
          <table:table-cell office:value-type="float" office:value="25066" calcext:value-type="float">
            <text:p>25066</text:p>
          </table:table-cell>
          <table:table-cell office:value-type="float" office:value="25081" calcext:value-type="float">
            <text:p>2508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7:17:17.700</text:p>
          </table:table-cell>
          <table:table-cell office:value-type="float" office:value="106" calcext:value-type="float">
            <text:p>106</text:p>
          </table:table-cell>
          <table:table-cell office:value-type="float" office:value="-39" calcext:value-type="float">
            <text:p>-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84.4" calcext:value-type="float">
            <text:p>1784.4</text:p>
          </table:table-cell>
          <table:table-cell office:value-type="float" office:value="1" calcext:value-type="float">
            <text:p>1</text:p>
          </table:table-cell>
          <table:table-cell office:value-type="float" office:value="2347.9" calcext:value-type="float">
            <text:p>2347.9</text:p>
          </table:table-cell>
          <table:table-cell office:value-type="float" office:value="2626.4" calcext:value-type="float">
            <text:p>2626.4</text:p>
          </table:table-cell>
          <table:table-cell office:value-type="float" office:value="-278.499999999999" calcext:value-type="float">
            <text:p>-278.4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20:54.600</text:p>
          </table:table-cell>
          <table:table-cell office:value-type="string" calcext:value-type="string">
            <text:p>2025-10-03 13:20:54.600</text:p>
          </table:table-cell>
          <table:table-cell office:value-type="string" calcext:value-type="string">
            <text:p>LONG</text:p>
          </table:table-cell>
          <table:table-cell office:value-type="float" office:value="25043.5" calcext:value-type="float">
            <text:p>25043.5</text:p>
          </table:table-cell>
          <table:table-cell office:value-type="float" office:value="25053.5" calcext:value-type="float">
            <text:p>25053.5</text:p>
          </table:table-cell>
          <table:table-cell office:value-type="float" office:value="25038.5" calcext:value-type="float">
            <text:p>2503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7:20:55.300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73.7" calcext:value-type="float">
            <text:p>1973.7</text:p>
          </table:table-cell>
          <table:table-cell office:value-type="float" office:value="0" calcext:value-type="float">
            <text:p>0</text:p>
          </table:table-cell>
          <table:table-cell office:value-type="float" office:value="2537.2" calcext:value-type="float">
            <text:p>2537.2</text:p>
          </table:table-cell>
          <table:table-cell office:value-type="float" office:value="2626.4" calcext:value-type="float">
            <text:p>2626.4</text:p>
          </table:table-cell>
          <table:table-cell office:value-type="float" office:value="-89.1999999999989" calcext:value-type="float">
            <text:p>-89.199999999998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21:50.900</text:p>
          </table:table-cell>
          <table:table-cell office:value-type="string" calcext:value-type="string">
            <text:p>2025-10-03 13:21:50.900</text:p>
          </table:table-cell>
          <table:table-cell office:value-type="string" calcext:value-type="string">
            <text:p>LONG</text:p>
          </table:table-cell>
          <table:table-cell office:value-type="float" office:value="25033" calcext:value-type="float">
            <text:p>25033</text:p>
          </table:table-cell>
          <table:table-cell office:value-type="float" office:value="25043" calcext:value-type="float">
            <text:p>25043</text:p>
          </table:table-cell>
          <table:table-cell office:value-type="float" office:value="25028" calcext:value-type="float">
            <text:p>2502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7:21:51.90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7:22:26.6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1.5" calcext:value-type="float">
            <text:p>272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25:31.800</text:p>
          </table:table-cell>
          <table:table-cell office:value-type="string" calcext:value-type="string">
            <text:p>2025-10-03 13:25:31.800</text:p>
          </table:table-cell>
          <table:table-cell office:value-type="string" calcext:value-type="string">
            <text:p>SHORT</text:p>
          </table:table-cell>
          <table:table-cell office:value-type="float" office:value="25040.5" calcext:value-type="float">
            <text:p>25040.5</text:p>
          </table:table-cell>
          <table:table-cell office:value-type="float" office:value="25030.5" calcext:value-type="float">
            <text:p>25030.5</text:p>
          </table:table-cell>
          <table:table-cell office:value-type="float" office:value="25045.5" calcext:value-type="float">
            <text:p>2504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7:25:32.800</text:p>
          </table:table-cell>
          <table:table-cell office:value-type="float" office:value="103" calcext:value-type="float">
            <text:p>103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7:25:39.8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37.3" calcext:value-type="float">
            <text:p>2337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00.8" calcext:value-type="float">
            <text:p>290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31:11.200</text:p>
          </table:table-cell>
          <table:table-cell office:value-type="string" calcext:value-type="string">
            <text:p>2025-10-03 13:31:11.200</text:p>
          </table:table-cell>
          <table:table-cell office:value-type="string" calcext:value-type="string">
            <text:p>SHORT</text:p>
          </table:table-cell>
          <table:table-cell office:value-type="float" office:value="25029.75" calcext:value-type="float">
            <text:p>25029.75</text:p>
          </table:table-cell>
          <table:table-cell office:value-type="float" office:value="25019.75" calcext:value-type="float">
            <text:p>25019.75</text:p>
          </table:table-cell>
          <table:table-cell office:value-type="float" office:value="25034.75" calcext:value-type="float">
            <text:p>2503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7:31:12.200</text:p>
          </table:table-cell>
          <table:table-cell office:value-type="float" office:value="136" calcext:value-type="float">
            <text:p>136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16.6" calcext:value-type="float">
            <text:p>251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80.1" calcext:value-type="float">
            <text:p>308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31:33.000</text:p>
          </table:table-cell>
          <table:table-cell office:value-type="string" calcext:value-type="string">
            <text:p>2025-10-03 13:31:33.000</text:p>
          </table:table-cell>
          <table:table-cell office:value-type="string" calcext:value-type="string">
            <text:p>LONG</text:p>
          </table:table-cell>
          <table:table-cell office:value-type="float" office:value="25027" calcext:value-type="float">
            <text:p>25027</text:p>
          </table:table-cell>
          <table:table-cell office:value-type="float" office:value="25037" calcext:value-type="float">
            <text:p>25037</text:p>
          </table:table-cell>
          <table:table-cell office:value-type="float" office:value="25022" calcext:value-type="float">
            <text:p>2502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7:31:34.600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7:31:45.1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705.9" calcext:value-type="float">
            <text:p>270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9.4" calcext:value-type="float">
            <text:p>326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32:09.600</text:p>
          </table:table-cell>
          <table:table-cell office:value-type="string" calcext:value-type="string">
            <text:p>2025-10-03 13:32:09.600</text:p>
          </table:table-cell>
          <table:table-cell office:value-type="string" calcext:value-type="string">
            <text:p>SHORT</text:p>
          </table:table-cell>
          <table:table-cell office:value-type="float" office:value="25035.5" calcext:value-type="float">
            <text:p>25035.5</text:p>
          </table:table-cell>
          <table:table-cell office:value-type="float" office:value="25025.5" calcext:value-type="float">
            <text:p>25025.5</text:p>
          </table:table-cell>
          <table:table-cell office:value-type="float" office:value="25040.5" calcext:value-type="float">
            <text:p>2504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7:32:10.6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7:32:26.7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85.2" calcext:value-type="float">
            <text:p>2585.2</text:p>
          </table:table-cell>
          <table:table-cell office:value-type="float" office:value="1" calcext:value-type="float">
            <text:p>1</text:p>
          </table:table-cell>
          <table:table-cell office:value-type="float" office:value="3148.7" calcext:value-type="float">
            <text:p>3148.7</text:p>
          </table:table-cell>
          <table:table-cell office:value-type="float" office:value="3269.4" calcext:value-type="float">
            <text:p>3269.4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33:01.500</text:p>
          </table:table-cell>
          <table:table-cell office:value-type="string" calcext:value-type="string">
            <text:p>2025-10-03 13:33:01.500</text:p>
          </table:table-cell>
          <table:table-cell office:value-type="string" calcext:value-type="string">
            <text:p>SHORT</text:p>
          </table:table-cell>
          <table:table-cell office:value-type="float" office:value="25052.5" calcext:value-type="float">
            <text:p>25052.5</text:p>
          </table:table-cell>
          <table:table-cell office:value-type="float" office:value="25042.5" calcext:value-type="float">
            <text:p>25042.5</text:p>
          </table:table-cell>
          <table:table-cell office:value-type="float" office:value="25057.5" calcext:value-type="float">
            <text:p>2505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7:33:02.600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7:33:31.7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74.5" calcext:value-type="float">
            <text:p>2474.5</text:p>
          </table:table-cell>
          <table:table-cell office:value-type="float" office:value="2" calcext:value-type="float">
            <text:p>2</text:p>
          </table:table-cell>
          <table:table-cell office:value-type="float" office:value="3038" calcext:value-type="float">
            <text:p>3038</text:p>
          </table:table-cell>
          <table:table-cell office:value-type="float" office:value="3269.4" calcext:value-type="float">
            <text:p>3269.4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7:35:05.100</text:p>
          </table:table-cell>
          <table:table-cell office:value-type="string" calcext:value-type="string">
            <text:p>2025-10-03 13:35:05.100</text:p>
          </table:table-cell>
          <table:table-cell office:value-type="string" calcext:value-type="string">
            <text:p>SHORT</text:p>
          </table:table-cell>
          <table:table-cell office:value-type="float" office:value="25044.75" calcext:value-type="float">
            <text:p>25044.75</text:p>
          </table:table-cell>
          <table:table-cell office:value-type="float" office:value="25034.75" calcext:value-type="float">
            <text:p>25034.75</text:p>
          </table:table-cell>
          <table:table-cell office:value-type="float" office:value="25049.75" calcext:value-type="float">
            <text:p>2504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7:35:05.600</text:p>
          </table:table-cell>
          <table:table-cell office:value-type="float" office:value="95" calcext:value-type="float">
            <text:p>95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63.8" calcext:value-type="float">
            <text:p>2363.8</text:p>
          </table:table-cell>
          <table:table-cell office:value-type="float" office:value="3" calcext:value-type="float">
            <text:p>3</text:p>
          </table:table-cell>
          <table:table-cell office:value-type="float" office:value="2927.3" calcext:value-type="float">
            <text:p>2927.3</text:p>
          </table:table-cell>
          <table:table-cell office:value-type="float" office:value="3269.4" calcext:value-type="float">
            <text:p>3269.4</text:p>
          </table:table-cell>
          <table:table-cell office:value-type="float" office:value="-342.099999999999" calcext:value-type="float">
            <text:p>-342.0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8:26:25.200</text:p>
          </table:table-cell>
          <table:table-cell office:value-type="string" calcext:value-type="string">
            <text:p>2025-10-03 14:26:25.200</text:p>
          </table:table-cell>
          <table:table-cell office:value-type="string" calcext:value-type="string">
            <text:p>LONG</text:p>
          </table:table-cell>
          <table:table-cell office:value-type="float" office:value="25031.75" calcext:value-type="float">
            <text:p>25031.75</text:p>
          </table:table-cell>
          <table:table-cell office:value-type="float" office:value="25041.75" calcext:value-type="float">
            <text:p>25041.75</text:p>
          </table:table-cell>
          <table:table-cell office:value-type="float" office:value="25026.75" calcext:value-type="float">
            <text:p>2502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8:26:26.20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8:27:02.7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53.9" calcext:value-type="float">
            <text:p>1853.9</text:p>
          </table:table-cell>
          <table:table-cell office:value-type="float" office:value="0" calcext:value-type="float">
            <text:p>0</text:p>
          </table:table-cell>
          <table:table-cell office:value-type="float" office:value="3111.60000000001" calcext:value-type="float">
            <text:p>3111.60000000001</text:p>
          </table:table-cell>
          <table:table-cell office:value-type="float" office:value="3269.4" calcext:value-type="float">
            <text:p>3269.4</text:p>
          </table:table-cell>
          <table:table-cell office:value-type="float" office:value="-157.799999999999" calcext:value-type="float">
            <text:p>-157.7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8:47:55.800</text:p>
          </table:table-cell>
          <table:table-cell office:value-type="string" calcext:value-type="string">
            <text:p>2025-10-03 14:47:55.800</text:p>
          </table:table-cell>
          <table:table-cell office:value-type="string" calcext:value-type="string">
            <text:p>SHORT</text:p>
          </table:table-cell>
          <table:table-cell office:value-type="float" office:value="25006.25" calcext:value-type="float">
            <text:p>25006.25</text:p>
          </table:table-cell>
          <table:table-cell office:value-type="float" office:value="24996.25" calcext:value-type="float">
            <text:p>24996.25</text:p>
          </table:table-cell>
          <table:table-cell office:value-type="float" office:value="25011.25" calcext:value-type="float">
            <text:p>2501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8:47:56.800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3 18:49:17.5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38.2" calcext:value-type="float">
            <text:p>203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5.90000000001" calcext:value-type="float">
            <text:p>3295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8:49:46.700</text:p>
          </table:table-cell>
          <table:table-cell office:value-type="string" calcext:value-type="string">
            <text:p>2025-10-03 14:49:46.700</text:p>
          </table:table-cell>
          <table:table-cell office:value-type="string" calcext:value-type="string">
            <text:p>SHORT</text:p>
          </table:table-cell>
          <table:table-cell office:value-type="float" office:value="24988.5" calcext:value-type="float">
            <text:p>24988.5</text:p>
          </table:table-cell>
          <table:table-cell office:value-type="float" office:value="24978.5" calcext:value-type="float">
            <text:p>24978.5</text:p>
          </table:table-cell>
          <table:table-cell office:value-type="float" office:value="24993.5" calcext:value-type="float">
            <text:p>2499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8:49:51.100</text:p>
          </table:table-cell>
          <table:table-cell office:value-type="float" office:value="144" calcext:value-type="float">
            <text:p>144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27.5" calcext:value-type="float">
            <text:p>222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85.20000000001" calcext:value-type="float">
            <text:p>3485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8:52:56.000</text:p>
          </table:table-cell>
          <table:table-cell office:value-type="string" calcext:value-type="string">
            <text:p>2025-10-03 14:52:56.000</text:p>
          </table:table-cell>
          <table:table-cell office:value-type="string" calcext:value-type="string">
            <text:p>SHORT</text:p>
          </table:table-cell>
          <table:table-cell office:value-type="float" office:value="24986.5" calcext:value-type="float">
            <text:p>24986.5</text:p>
          </table:table-cell>
          <table:table-cell office:value-type="float" office:value="24976.5" calcext:value-type="float">
            <text:p>24976.5</text:p>
          </table:table-cell>
          <table:table-cell office:value-type="float" office:value="24991.5" calcext:value-type="float">
            <text:p>2499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8:53:00.9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16.8" calcext:value-type="float">
            <text:p>2416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4.50000000001" calcext:value-type="float">
            <text:p>3674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8:55:32.100</text:p>
          </table:table-cell>
          <table:table-cell office:value-type="string" calcext:value-type="string">
            <text:p>2025-10-03 14:55:32.100</text:p>
          </table:table-cell>
          <table:table-cell office:value-type="string" calcext:value-type="string">
            <text:p>LONG</text:p>
          </table:table-cell>
          <table:table-cell office:value-type="float" office:value="25002.75" calcext:value-type="float">
            <text:p>25002.75</text:p>
          </table:table-cell>
          <table:table-cell office:value-type="float" office:value="25012.75" calcext:value-type="float">
            <text:p>25012.75</text:p>
          </table:table-cell>
          <table:table-cell office:value-type="float" office:value="24997.75" calcext:value-type="float">
            <text:p>2499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8:55:33.100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8:55:43.3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96.1" calcext:value-type="float">
            <text:p>2296.1</text:p>
          </table:table-cell>
          <table:table-cell office:value-type="float" office:value="1" calcext:value-type="float">
            <text:p>1</text:p>
          </table:table-cell>
          <table:table-cell office:value-type="float" office:value="3553.80000000001" calcext:value-type="float">
            <text:p>3553.80000000001</text:p>
          </table:table-cell>
          <table:table-cell office:value-type="float" office:value="3674.50000000001" calcext:value-type="float">
            <text:p>3674.5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8:56:11.400</text:p>
          </table:table-cell>
          <table:table-cell office:value-type="string" calcext:value-type="string">
            <text:p>2025-10-03 14:56:11.400</text:p>
          </table:table-cell>
          <table:table-cell office:value-type="string" calcext:value-type="string">
            <text:p>SHORT</text:p>
          </table:table-cell>
          <table:table-cell office:value-type="float" office:value="25000.75" calcext:value-type="float">
            <text:p>25000.75</text:p>
          </table:table-cell>
          <table:table-cell office:value-type="float" office:value="24990.75" calcext:value-type="float">
            <text:p>24990.75</text:p>
          </table:table-cell>
          <table:table-cell office:value-type="float" office:value="25005.75" calcext:value-type="float">
            <text:p>2500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8:56:12.40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75.4" calcext:value-type="float">
            <text:p>2475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33.10000000001" calcext:value-type="float">
            <text:p>3733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00:20.100</text:p>
          </table:table-cell>
          <table:table-cell office:value-type="string" calcext:value-type="string">
            <text:p>2025-10-03 15:00:20.100</text:p>
          </table:table-cell>
          <table:table-cell office:value-type="string" calcext:value-type="string">
            <text:p>LONG</text:p>
          </table:table-cell>
          <table:table-cell office:value-type="float" office:value="25011.25" calcext:value-type="float">
            <text:p>25011.25</text:p>
          </table:table-cell>
          <table:table-cell office:value-type="float" office:value="25021.25" calcext:value-type="float">
            <text:p>25021.25</text:p>
          </table:table-cell>
          <table:table-cell office:value-type="float" office:value="25006.25" calcext:value-type="float">
            <text:p>2500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00:20.50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64.7" calcext:value-type="float">
            <text:p>266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22.40000000001" calcext:value-type="float">
            <text:p>3922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07:56.300</text:p>
          </table:table-cell>
          <table:table-cell office:value-type="string" calcext:value-type="string">
            <text:p>2025-10-03 15:07:56.300</text:p>
          </table:table-cell>
          <table:table-cell office:value-type="string" calcext:value-type="string">
            <text:p>SHORT</text:p>
          </table:table-cell>
          <table:table-cell office:value-type="float" office:value="25007.75" calcext:value-type="float">
            <text:p>25007.75</text:p>
          </table:table-cell>
          <table:table-cell office:value-type="float" office:value="24997.75" calcext:value-type="float">
            <text:p>24997.75</text:p>
          </table:table-cell>
          <table:table-cell office:value-type="float" office:value="25012.75" calcext:value-type="float">
            <text:p>2501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07:58.80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1.70000000001" calcext:value-type="float">
            <text:p>4111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12:27.100</text:p>
          </table:table-cell>
          <table:table-cell office:value-type="string" calcext:value-type="string">
            <text:p>2025-10-03 15:12:27.100</text:p>
          </table:table-cell>
          <table:table-cell office:value-type="string" calcext:value-type="string">
            <text:p>SHORT</text:p>
          </table:table-cell>
          <table:table-cell office:value-type="float" office:value="25020.75" calcext:value-type="float">
            <text:p>25020.75</text:p>
          </table:table-cell>
          <table:table-cell office:value-type="float" office:value="25010.75" calcext:value-type="float">
            <text:p>25010.75</text:p>
          </table:table-cell>
          <table:table-cell office:value-type="float" office:value="25025.75" calcext:value-type="float">
            <text:p>2502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12:28.100</text:p>
          </table:table-cell>
          <table:table-cell office:value-type="float" office:value="145" calcext:value-type="float">
            <text:p>145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733.3" calcext:value-type="float">
            <text:p>2733.3</text:p>
          </table:table-cell>
          <table:table-cell office:value-type="float" office:value="1" calcext:value-type="float">
            <text:p>1</text:p>
          </table:table-cell>
          <table:table-cell office:value-type="float" office:value="3991.00000000001" calcext:value-type="float">
            <text:p>3991.00000000001</text:p>
          </table:table-cell>
          <table:table-cell office:value-type="float" office:value="4111.70000000001" calcext:value-type="float">
            <text:p>4111.7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13:51.900</text:p>
          </table:table-cell>
          <table:table-cell office:value-type="string" calcext:value-type="string">
            <text:p>2025-10-03 15:13:51.900</text:p>
          </table:table-cell>
          <table:table-cell office:value-type="string" calcext:value-type="string">
            <text:p>SHORT</text:p>
          </table:table-cell>
          <table:table-cell office:value-type="float" office:value="25009.25" calcext:value-type="float">
            <text:p>25009.25</text:p>
          </table:table-cell>
          <table:table-cell office:value-type="float" office:value="24999.25" calcext:value-type="float">
            <text:p>24999.25</text:p>
          </table:table-cell>
          <table:table-cell office:value-type="float" office:value="25014.25" calcext:value-type="float">
            <text:p>25014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13:52.90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9:15:09.8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12.6" calcext:value-type="float">
            <text:p>2612.6</text:p>
          </table:table-cell>
          <table:table-cell office:value-type="float" office:value="2" calcext:value-type="float">
            <text:p>2</text:p>
          </table:table-cell>
          <table:table-cell office:value-type="float" office:value="3870.30000000001" calcext:value-type="float">
            <text:p>3870.30000000001</text:p>
          </table:table-cell>
          <table:table-cell office:value-type="float" office:value="4111.70000000001" calcext:value-type="float">
            <text:p>4111.70000000001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15:20.700</text:p>
          </table:table-cell>
          <table:table-cell office:value-type="string" calcext:value-type="string">
            <text:p>2025-10-03 15:15:20.700</text:p>
          </table:table-cell>
          <table:table-cell office:value-type="string" calcext:value-type="string">
            <text:p>LONG</text:p>
          </table:table-cell>
          <table:table-cell office:value-type="float" office:value="25016.5" calcext:value-type="float">
            <text:p>25016.5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25011.5" calcext:value-type="float">
            <text:p>2501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15:22.00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01.9" calcext:value-type="float">
            <text:p>2801.9</text:p>
          </table:table-cell>
          <table:table-cell office:value-type="float" office:value="0" calcext:value-type="float">
            <text:p>0</text:p>
          </table:table-cell>
          <table:table-cell office:value-type="float" office:value="4059.60000000001" calcext:value-type="float">
            <text:p>4059.60000000001</text:p>
          </table:table-cell>
          <table:table-cell office:value-type="float" office:value="4111.70000000001" calcext:value-type="float">
            <text:p>4111.70000000001</text:p>
          </table:table-cell>
          <table:table-cell office:value-type="float" office:value="-52.0999999999995" calcext:value-type="float">
            <text:p>-52.0999999999995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18:10.800</text:p>
          </table:table-cell>
          <table:table-cell office:value-type="string" calcext:value-type="string">
            <text:p>2025-10-03 15:18:10.800</text:p>
          </table:table-cell>
          <table:table-cell office:value-type="string" calcext:value-type="string">
            <text:p>LONG</text:p>
          </table:table-cell>
          <table:table-cell office:value-type="float" office:value="25002.75" calcext:value-type="float">
            <text:p>25002.75</text:p>
          </table:table-cell>
          <table:table-cell office:value-type="float" office:value="25012.75" calcext:value-type="float">
            <text:p>25012.75</text:p>
          </table:table-cell>
          <table:table-cell office:value-type="float" office:value="24997.75" calcext:value-type="float">
            <text:p>2499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18:11.80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986.2" calcext:value-type="float">
            <text:p>2986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43.90000000001" calcext:value-type="float">
            <text:p>4243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0:13.300</text:p>
          </table:table-cell>
          <table:table-cell office:value-type="string" calcext:value-type="string">
            <text:p>2025-10-03 15:20:13.300</text:p>
          </table:table-cell>
          <table:table-cell office:value-type="string" calcext:value-type="string">
            <text:p>SHORT</text:p>
          </table:table-cell>
          <table:table-cell office:value-type="float" office:value="25008.75" calcext:value-type="float">
            <text:p>25008.75</text:p>
          </table:table-cell>
          <table:table-cell office:value-type="float" office:value="24998.75" calcext:value-type="float">
            <text:p>24998.75</text:p>
          </table:table-cell>
          <table:table-cell office:value-type="float" office:value="25013.75" calcext:value-type="float">
            <text:p>2501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20:14.300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65.5" calcext:value-type="float">
            <text:p>2865.5</text:p>
          </table:table-cell>
          <table:table-cell office:value-type="float" office:value="1" calcext:value-type="float">
            <text:p>1</text:p>
          </table:table-cell>
          <table:table-cell office:value-type="float" office:value="4123.20000000001" calcext:value-type="float">
            <text:p>4123.20000000001</text:p>
          </table:table-cell>
          <table:table-cell office:value-type="float" office:value="4243.90000000001" calcext:value-type="float">
            <text:p>4243.9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1:40.000</text:p>
          </table:table-cell>
          <table:table-cell office:value-type="string" calcext:value-type="string">
            <text:p>2025-10-03 15:21:40.000</text:p>
          </table:table-cell>
          <table:table-cell office:value-type="string" calcext:value-type="string">
            <text:p>SHORT</text:p>
          </table:table-cell>
          <table:table-cell office:value-type="float" office:value="25000" calcext:value-type="float">
            <text:p>25000</text:p>
          </table:table-cell>
          <table:table-cell office:value-type="float" office:value="24990" calcext:value-type="float">
            <text:p>24990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21:43.300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54.8" calcext:value-type="float">
            <text:p>305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12.50000000001" calcext:value-type="float">
            <text:p>4312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1:49.300</text:p>
          </table:table-cell>
          <table:table-cell office:value-type="string" calcext:value-type="string">
            <text:p>2025-10-03 15:21:49.300</text:p>
          </table:table-cell>
          <table:table-cell office:value-type="string" calcext:value-type="string">
            <text:p>SHORT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4990.5" calcext:value-type="float">
            <text:p>24990.5</text:p>
          </table:table-cell>
          <table:table-cell office:value-type="float" office:value="25005.5" calcext:value-type="float">
            <text:p>2500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21:50.300</text:p>
          </table:table-cell>
          <table:table-cell office:value-type="float" office:value="119" calcext:value-type="float">
            <text:p>11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34.1" calcext:value-type="float">
            <text:p>323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91.80000000001" calcext:value-type="float">
            <text:p>4491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3:11.300</text:p>
          </table:table-cell>
          <table:table-cell office:value-type="string" calcext:value-type="string">
            <text:p>2025-10-03 15:23:11.300</text:p>
          </table:table-cell>
          <table:table-cell office:value-type="string" calcext:value-type="string">
            <text:p>SHORT</text:p>
          </table:table-cell>
          <table:table-cell office:value-type="float" office:value="25001.25" calcext:value-type="float">
            <text:p>25001.25</text:p>
          </table:table-cell>
          <table:table-cell office:value-type="float" office:value="24991.25" calcext:value-type="float">
            <text:p>24991.25</text:p>
          </table:table-cell>
          <table:table-cell office:value-type="float" office:value="25006.25" calcext:value-type="float">
            <text:p>2500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23:11.900</text:p>
          </table:table-cell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23.4" calcext:value-type="float">
            <text:p>342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81.10000000001" calcext:value-type="float">
            <text:p>4681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3:22.200</text:p>
          </table:table-cell>
          <table:table-cell office:value-type="string" calcext:value-type="string">
            <text:p>2025-10-03 15:23:22.200</text:p>
          </table:table-cell>
          <table:table-cell office:value-type="string" calcext:value-type="string">
            <text:p>SHORT</text:p>
          </table:table-cell>
          <table:table-cell office:value-type="float" office:value="25001" calcext:value-type="float">
            <text:p>250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006" calcext:value-type="float">
            <text:p>2500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23:23.200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07.70000000001" calcext:value-type="float">
            <text:p>3607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65.40000000001" calcext:value-type="float">
            <text:p>4865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5:04.400</text:p>
          </table:table-cell>
          <table:table-cell office:value-type="string" calcext:value-type="string">
            <text:p>2025-10-03 15:25:04.400</text:p>
          </table:table-cell>
          <table:table-cell office:value-type="string" calcext:value-type="string">
            <text:p>LONG</text:p>
          </table:table-cell>
          <table:table-cell office:value-type="float" office:value="25002.75" calcext:value-type="float">
            <text:p>25002.75</text:p>
          </table:table-cell>
          <table:table-cell office:value-type="float" office:value="25012.75" calcext:value-type="float">
            <text:p>25012.75</text:p>
          </table:table-cell>
          <table:table-cell office:value-type="float" office:value="24997.75" calcext:value-type="float">
            <text:p>2499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25:07.30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97.00000000001" calcext:value-type="float">
            <text:p>3497.00000000001</text:p>
          </table:table-cell>
          <table:table-cell office:value-type="float" office:value="1" calcext:value-type="float">
            <text:p>1</text:p>
          </table:table-cell>
          <table:table-cell office:value-type="float" office:value="4754.70000000001" calcext:value-type="float">
            <text:p>4754.70000000001</text:p>
          </table:table-cell>
          <table:table-cell office:value-type="float" office:value="4865.40000000001" calcext:value-type="float">
            <text:p>4865.4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7:51.100</text:p>
          </table:table-cell>
          <table:table-cell office:value-type="string" calcext:value-type="string">
            <text:p>2025-10-03 15:27:51.100</text:p>
          </table:table-cell>
          <table:table-cell office:value-type="string" calcext:value-type="string">
            <text:p>LONG</text:p>
          </table:table-cell>
          <table:table-cell office:value-type="float" office:value="25006.25" calcext:value-type="float">
            <text:p>25006.25</text:p>
          </table:table-cell>
          <table:table-cell office:value-type="float" office:value="25016.25" calcext:value-type="float">
            <text:p>25016.25</text:p>
          </table:table-cell>
          <table:table-cell office:value-type="float" office:value="25001.25" calcext:value-type="float">
            <text:p>2500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27:52.10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9:28:33.5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381.30000000001" calcext:value-type="float">
            <text:p>3381.30000000001</text:p>
          </table:table-cell>
          <table:table-cell office:value-type="float" office:value="2" calcext:value-type="float">
            <text:p>2</text:p>
          </table:table-cell>
          <table:table-cell office:value-type="float" office:value="4639.00000000001" calcext:value-type="float">
            <text:p>4639.00000000001</text:p>
          </table:table-cell>
          <table:table-cell office:value-type="float" office:value="4865.40000000001" calcext:value-type="float">
            <text:p>4865.40000000001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8:37.000</text:p>
          </table:table-cell>
          <table:table-cell office:value-type="string" calcext:value-type="string">
            <text:p>2025-10-03 15:28:37.000</text:p>
          </table:table-cell>
          <table:table-cell office:value-type="string" calcext:value-type="string">
            <text:p>SHORT</text:p>
          </table:table-cell>
          <table:table-cell office:value-type="float" office:value="25002.5" calcext:value-type="float">
            <text:p>25002.5</text:p>
          </table:table-cell>
          <table:table-cell office:value-type="float" office:value="24992.5" calcext:value-type="float">
            <text:p>24992.5</text:p>
          </table:table-cell>
          <table:table-cell office:value-type="float" office:value="25007.5" calcext:value-type="float">
            <text:p>2500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28:37.400</text:p>
          </table:table-cell>
          <table:table-cell office:value-type="float" office:value="79" calcext:value-type="float">
            <text:p>79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570.60000000001" calcext:value-type="float">
            <text:p>3570.60000000001</text:p>
          </table:table-cell>
          <table:table-cell office:value-type="float" office:value="0" calcext:value-type="float">
            <text:p>0</text:p>
          </table:table-cell>
          <table:table-cell office:value-type="float" office:value="4828.30000000001" calcext:value-type="float">
            <text:p>4828.30000000001</text:p>
          </table:table-cell>
          <table:table-cell office:value-type="float" office:value="4865.40000000001" calcext:value-type="float">
            <text:p>4865.40000000001</text:p>
          </table:table-cell>
          <table:table-cell office:value-type="float" office:value="-37.0999999999995" calcext:value-type="float">
            <text:p>-37.0999999999995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8:42.400</text:p>
          </table:table-cell>
          <table:table-cell office:value-type="string" calcext:value-type="string">
            <text:p>2025-10-03 15:28:42.400</text:p>
          </table:table-cell>
          <table:table-cell office:value-type="string" calcext:value-type="string">
            <text:p>LONG</text:p>
          </table:table-cell>
          <table:table-cell office:value-type="float" office:value="25000.75" calcext:value-type="float">
            <text:p>25000.75</text:p>
          </table:table-cell>
          <table:table-cell office:value-type="float" office:value="25010.75" calcext:value-type="float">
            <text:p>25010.75</text:p>
          </table:table-cell>
          <table:table-cell office:value-type="float" office:value="24995.75" calcext:value-type="float">
            <text:p>2499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28:43.100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59.90000000001" calcext:value-type="float">
            <text:p>3459.90000000001</text:p>
          </table:table-cell>
          <table:table-cell office:value-type="float" office:value="1" calcext:value-type="float">
            <text:p>1</text:p>
          </table:table-cell>
          <table:table-cell office:value-type="float" office:value="4717.60000000001" calcext:value-type="float">
            <text:p>4717.60000000001</text:p>
          </table:table-cell>
          <table:table-cell office:value-type="float" office:value="4865.40000000001" calcext:value-type="float">
            <text:p>4865.40000000001</text:p>
          </table:table-cell>
          <table:table-cell office:value-type="float" office:value="-147.799999999999" calcext:value-type="float">
            <text:p>-147.7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9:04.300</text:p>
          </table:table-cell>
          <table:table-cell office:value-type="string" calcext:value-type="string">
            <text:p>2025-10-03 15:29:04.300</text:p>
          </table:table-cell>
          <table:table-cell office:value-type="string" calcext:value-type="string">
            <text:p>SHORT</text:p>
          </table:table-cell>
          <table:table-cell office:value-type="float" office:value="25006" calcext:value-type="float">
            <text:p>25006</text:p>
          </table:table-cell>
          <table:table-cell office:value-type="float" office:value="24996" calcext:value-type="float">
            <text:p>24996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29:05.300</text:p>
          </table:table-cell>
          <table:table-cell office:value-type="float" office:value="95" calcext:value-type="float">
            <text:p>95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44.20000000001" calcext:value-type="float">
            <text:p>3644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01.90000000001" calcext:value-type="float">
            <text:p>4901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29:48.000</text:p>
          </table:table-cell>
          <table:table-cell office:value-type="string" calcext:value-type="string">
            <text:p>2025-10-03 15:29:48.000</text:p>
          </table:table-cell>
          <table:table-cell office:value-type="string" calcext:value-type="string">
            <text:p>SHORT</text:p>
          </table:table-cell>
          <table:table-cell office:value-type="float" office:value="25005.5" calcext:value-type="float">
            <text:p>25005.5</text:p>
          </table:table-cell>
          <table:table-cell office:value-type="float" office:value="24995.5" calcext:value-type="float">
            <text:p>24995.5</text:p>
          </table:table-cell>
          <table:table-cell office:value-type="float" office:value="25010.5" calcext:value-type="float">
            <text:p>2501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29:49.000</text:p>
          </table:table-cell>
          <table:table-cell office:value-type="float" office:value="68" calcext:value-type="float">
            <text:p>68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28.50000000001" calcext:value-type="float">
            <text:p>3828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6.20000000001" calcext:value-type="float">
            <text:p>5086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0:23.100</text:p>
          </table:table-cell>
          <table:table-cell office:value-type="string" calcext:value-type="string">
            <text:p>2025-10-03 15:30:23.100</text:p>
          </table:table-cell>
          <table:table-cell office:value-type="string" calcext:value-type="string">
            <text:p>SHORT</text:p>
          </table:table-cell>
          <table:table-cell office:value-type="float" office:value="25001" calcext:value-type="float">
            <text:p>250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006" calcext:value-type="float">
            <text:p>2500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30:24.100</text:p>
          </table:table-cell>
          <table:table-cell office:value-type="float" office:value="69" calcext:value-type="float">
            <text:p>69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012.80000000001" calcext:value-type="float">
            <text:p>4012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0.50000000001" calcext:value-type="float">
            <text:p>5270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1:38.600</text:p>
          </table:table-cell>
          <table:table-cell office:value-type="string" calcext:value-type="string">
            <text:p>2025-10-03 15:31:38.600</text:p>
          </table:table-cell>
          <table:table-cell office:value-type="string" calcext:value-type="string">
            <text:p>SHORT</text:p>
          </table:table-cell>
          <table:table-cell office:value-type="float" office:value="24999.75" calcext:value-type="float">
            <text:p>24999.75</text:p>
          </table:table-cell>
          <table:table-cell office:value-type="float" office:value="24989.75" calcext:value-type="float">
            <text:p>24989.75</text:p>
          </table:table-cell>
          <table:table-cell office:value-type="float" office:value="25004.75" calcext:value-type="float">
            <text:p>2500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31:40.400</text:p>
          </table:table-cell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202.10000000001" calcext:value-type="float">
            <text:p>4202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59.80000000001" calcext:value-type="float">
            <text:p>5459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1:54.800</text:p>
          </table:table-cell>
          <table:table-cell office:value-type="string" calcext:value-type="string">
            <text:p>2025-10-03 15:31:54.800</text:p>
          </table:table-cell>
          <table:table-cell office:value-type="string" calcext:value-type="string">
            <text:p>SHORT</text:p>
          </table:table-cell>
          <table:table-cell office:value-type="float" office:value="25002" calcext:value-type="float">
            <text:p>25002</text:p>
          </table:table-cell>
          <table:table-cell office:value-type="float" office:value="24992" calcext:value-type="float">
            <text:p>24992</text:p>
          </table:table-cell>
          <table:table-cell office:value-type="float" office:value="25007" calcext:value-type="float">
            <text:p>2500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31:55.800</text:p>
          </table:table-cell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381.40000000001" calcext:value-type="float">
            <text:p>4381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39.10000000001" calcext:value-type="float">
            <text:p>5639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2:21.200</text:p>
          </table:table-cell>
          <table:table-cell office:value-type="string" calcext:value-type="string">
            <text:p>2025-10-03 15:32:21.200</text:p>
          </table:table-cell>
          <table:table-cell office:value-type="string" calcext:value-type="string">
            <text:p>SHORT</text:p>
          </table:table-cell>
          <table:table-cell office:value-type="float" office:value="25004.5" calcext:value-type="float">
            <text:p>25004.5</text:p>
          </table:table-cell>
          <table:table-cell office:value-type="float" office:value="24994.5" calcext:value-type="float">
            <text:p>24994.5</text:p>
          </table:table-cell>
          <table:table-cell office:value-type="float" office:value="25009.5" calcext:value-type="float">
            <text:p>2500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32:21.400</text:p>
          </table:table-cell>
          <table:table-cell office:value-type="float" office:value="576" calcext:value-type="float">
            <text:p>576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570.70000000001" calcext:value-type="float">
            <text:p>4570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28.40000000001" calcext:value-type="float">
            <text:p>5828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3:43.100</text:p>
          </table:table-cell>
          <table:table-cell office:value-type="string" calcext:value-type="string">
            <text:p>2025-10-03 15:33:43.100</text:p>
          </table:table-cell>
          <table:table-cell office:value-type="string" calcext:value-type="string">
            <text:p>LONG</text:p>
          </table:table-cell>
          <table:table-cell office:value-type="float" office:value="25011.75" calcext:value-type="float">
            <text:p>25011.75</text:p>
          </table:table-cell>
          <table:table-cell office:value-type="float" office:value="25021.75" calcext:value-type="float">
            <text:p>25021.75</text:p>
          </table:table-cell>
          <table:table-cell office:value-type="float" office:value="25006.75" calcext:value-type="float">
            <text:p>2500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33:44.8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460.00000000001" calcext:value-type="float">
            <text:p>4460.00000000001</text:p>
          </table:table-cell>
          <table:table-cell office:value-type="float" office:value="1" calcext:value-type="float">
            <text:p>1</text:p>
          </table:table-cell>
          <table:table-cell office:value-type="float" office:value="5717.70000000001" calcext:value-type="float">
            <text:p>5717.70000000001</text:p>
          </table:table-cell>
          <table:table-cell office:value-type="float" office:value="5828.40000000001" calcext:value-type="float">
            <text:p>5828.4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4:38.100</text:p>
          </table:table-cell>
          <table:table-cell office:value-type="string" calcext:value-type="string">
            <text:p>2025-10-03 15:34:38.100</text:p>
          </table:table-cell>
          <table:table-cell office:value-type="string" calcext:value-type="string">
            <text:p>LONG</text:p>
          </table:table-cell>
          <table:table-cell office:value-type="float" office:value="25016" calcext:value-type="float">
            <text:p>25016</text:p>
          </table:table-cell>
          <table:table-cell office:value-type="float" office:value="25026" calcext:value-type="float">
            <text:p>25026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34:42.00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9:35:07.2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349.30000000001" calcext:value-type="float">
            <text:p>4349.30000000001</text:p>
          </table:table-cell>
          <table:table-cell office:value-type="float" office:value="2" calcext:value-type="float">
            <text:p>2</text:p>
          </table:table-cell>
          <table:table-cell office:value-type="float" office:value="5607.00000000001" calcext:value-type="float">
            <text:p>5607.00000000001</text:p>
          </table:table-cell>
          <table:table-cell office:value-type="float" office:value="5828.40000000001" calcext:value-type="float">
            <text:p>5828.4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5:30.800</text:p>
          </table:table-cell>
          <table:table-cell office:value-type="string" calcext:value-type="string">
            <text:p>2025-10-03 15:35:30.800</text:p>
          </table:table-cell>
          <table:table-cell office:value-type="string" calcext:value-type="string">
            <text:p>LONG</text:p>
          </table:table-cell>
          <table:table-cell office:value-type="float" office:value="25012.25" calcext:value-type="float">
            <text:p>25012.25</text:p>
          </table:table-cell>
          <table:table-cell office:value-type="float" office:value="25022.25" calcext:value-type="float">
            <text:p>25022.25</text:p>
          </table:table-cell>
          <table:table-cell office:value-type="float" office:value="25007.25" calcext:value-type="float">
            <text:p>2500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35:35.700</text:p>
          </table:table-cell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238.60000000001" calcext:value-type="float">
            <text:p>4238.60000000001</text:p>
          </table:table-cell>
          <table:table-cell office:value-type="float" office:value="3" calcext:value-type="float">
            <text:p>3</text:p>
          </table:table-cell>
          <table:table-cell office:value-type="float" office:value="5496.30000000001" calcext:value-type="float">
            <text:p>5496.30000000001</text:p>
          </table:table-cell>
          <table:table-cell office:value-type="float" office:value="5828.40000000001" calcext:value-type="float">
            <text:p>5828.40000000001</text:p>
          </table:table-cell>
          <table:table-cell office:value-type="float" office:value="-332.099999999999" calcext:value-type="float">
            <text:p>-332.0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35:34.400</text:p>
          </table:table-cell>
          <table:table-cell office:value-type="string" calcext:value-type="string">
            <text:p>2025-10-03 15:35:34.400</text:p>
          </table:table-cell>
          <table:table-cell office:value-type="string" calcext:value-type="string">
            <text:p>SHORT</text:p>
          </table:table-cell>
          <table:table-cell office:value-type="float" office:value="25012.25" calcext:value-type="float">
            <text:p>25012.25</text:p>
          </table:table-cell>
          <table:table-cell office:value-type="float" office:value="25002.25" calcext:value-type="float">
            <text:p>25002.25</text:p>
          </table:table-cell>
          <table:table-cell office:value-type="float" office:value="25017.25" calcext:value-type="float">
            <text:p>2501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35:35.700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427.90000000001" calcext:value-type="float">
            <text:p>4427.90000000001</text:p>
          </table:table-cell>
          <table:table-cell office:value-type="float" office:value="0" calcext:value-type="float">
            <text:p>0</text:p>
          </table:table-cell>
          <table:table-cell office:value-type="float" office:value="5685.60000000001" calcext:value-type="float">
            <text:p>5685.60000000001</text:p>
          </table:table-cell>
          <table:table-cell office:value-type="float" office:value="5828.40000000001" calcext:value-type="float">
            <text:p>5828.40000000001</text:p>
          </table:table-cell>
          <table:table-cell office:value-type="float" office:value="-142.799999999999" calcext:value-type="float">
            <text:p>-142.799999999999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0:03.800</text:p>
          </table:table-cell>
          <table:table-cell office:value-type="string" calcext:value-type="string">
            <text:p>2025-10-03 15:40:03.800</text:p>
          </table:table-cell>
          <table:table-cell office:value-type="string" calcext:value-type="string">
            <text:p>SHORT</text:p>
          </table:table-cell>
          <table:table-cell office:value-type="float" office:value="25015.75" calcext:value-type="float">
            <text:p>25015.75</text:p>
          </table:table-cell>
          <table:table-cell office:value-type="float" office:value="25005.75" calcext:value-type="float">
            <text:p>25005.75</text:p>
          </table:table-cell>
          <table:table-cell office:value-type="float" office:value="25020.75" calcext:value-type="float">
            <text:p>2502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40:04.800</text:p>
          </table:table-cell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612.20000000001" calcext:value-type="float">
            <text:p>4612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69.90000000001" calcext:value-type="float">
            <text:p>5869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1:07.500</text:p>
          </table:table-cell>
          <table:table-cell office:value-type="string" calcext:value-type="string">
            <text:p>2025-10-03 15:41:07.500</text:p>
          </table:table-cell>
          <table:table-cell office:value-type="string" calcext:value-type="string">
            <text:p>LONG</text:p>
          </table:table-cell>
          <table:table-cell office:value-type="float" office:value="25017.25" calcext:value-type="float">
            <text:p>25017.25</text:p>
          </table:table-cell>
          <table:table-cell office:value-type="float" office:value="25027.25" calcext:value-type="float">
            <text:p>25027.25</text:p>
          </table:table-cell>
          <table:table-cell office:value-type="float" office:value="25012.25" calcext:value-type="float">
            <text:p>2501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41:08.10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801.50000000001" calcext:value-type="float">
            <text:p>4801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59.20000000001" calcext:value-type="float">
            <text:p>6059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1:29.900</text:p>
          </table:table-cell>
          <table:table-cell office:value-type="string" calcext:value-type="string">
            <text:p>2025-10-03 15:41:29.900</text:p>
          </table:table-cell>
          <table:table-cell office:value-type="string" calcext:value-type="string">
            <text:p>LONG</text:p>
          </table:table-cell>
          <table:table-cell office:value-type="float" office:value="25022.5" calcext:value-type="float">
            <text:p>25022.5</text:p>
          </table:table-cell>
          <table:table-cell office:value-type="float" office:value="25032.5" calcext:value-type="float">
            <text:p>25032.5</text:p>
          </table:table-cell>
          <table:table-cell office:value-type="float" office:value="25017.5" calcext:value-type="float">
            <text:p>2501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41:30.70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990.80000000001" calcext:value-type="float">
            <text:p>4990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48.50000000001" calcext:value-type="float">
            <text:p>6248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2:06.600</text:p>
          </table:table-cell>
          <table:table-cell office:value-type="string" calcext:value-type="string">
            <text:p>2025-10-03 15:42:06.600</text:p>
          </table:table-cell>
          <table:table-cell office:value-type="string" calcext:value-type="string">
            <text:p>LONG</text:p>
          </table:table-cell>
          <table:table-cell office:value-type="float" office:value="25025.5" calcext:value-type="float">
            <text:p>25025.5</text:p>
          </table:table-cell>
          <table:table-cell office:value-type="float" office:value="25035.5" calcext:value-type="float">
            <text:p>25035.5</text:p>
          </table:table-cell>
          <table:table-cell office:value-type="float" office:value="25020.5" calcext:value-type="float">
            <text:p>2502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42:08.000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180.10000000001" calcext:value-type="float">
            <text:p>5180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37.80000000001" calcext:value-type="float">
            <text:p>6437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4:34.700</text:p>
          </table:table-cell>
          <table:table-cell office:value-type="string" calcext:value-type="string">
            <text:p>2025-10-03 15:44:34.700</text:p>
          </table:table-cell>
          <table:table-cell office:value-type="string" calcext:value-type="string">
            <text:p>SHORT</text:p>
          </table:table-cell>
          <table:table-cell office:value-type="float" office:value="25012.75" calcext:value-type="float">
            <text:p>25012.75</text:p>
          </table:table-cell>
          <table:table-cell office:value-type="float" office:value="25002.75" calcext:value-type="float">
            <text:p>25002.75</text:p>
          </table:table-cell>
          <table:table-cell office:value-type="float" office:value="25017.75" calcext:value-type="float">
            <text:p>2501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44:35.700</text:p>
          </table:table-cell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9:45:11.1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064.40000000001" calcext:value-type="float">
            <text:p>5064.40000000001</text:p>
          </table:table-cell>
          <table:table-cell office:value-type="float" office:value="1" calcext:value-type="float">
            <text:p>1</text:p>
          </table:table-cell>
          <table:table-cell office:value-type="float" office:value="6322.10000000001" calcext:value-type="float">
            <text:p>6322.10000000001</text:p>
          </table:table-cell>
          <table:table-cell office:value-type="float" office:value="6437.80000000001" calcext:value-type="float">
            <text:p>6437.8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8:32.100</text:p>
          </table:table-cell>
          <table:table-cell office:value-type="string" calcext:value-type="string">
            <text:p>2025-10-03 15:48:32.100</text:p>
          </table:table-cell>
          <table:table-cell office:value-type="string" calcext:value-type="string">
            <text:p>LONG</text:p>
          </table:table-cell>
          <table:table-cell office:value-type="float" office:value="25019.5" calcext:value-type="float">
            <text:p>25019.5</text:p>
          </table:table-cell>
          <table:table-cell office:value-type="float" office:value="25029.5" calcext:value-type="float">
            <text:p>25029.5</text:p>
          </table:table-cell>
          <table:table-cell office:value-type="float" office:value="25014.5" calcext:value-type="float">
            <text:p>2501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48:34.400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253.70000000001" calcext:value-type="float">
            <text:p>5253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11.40000000001" calcext:value-type="float">
            <text:p>6511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9:21.400</text:p>
          </table:table-cell>
          <table:table-cell office:value-type="string" calcext:value-type="string">
            <text:p>2025-10-03 15:49:21.400</text:p>
          </table:table-cell>
          <table:table-cell office:value-type="string" calcext:value-type="string">
            <text:p>SHORT</text:p>
          </table:table-cell>
          <table:table-cell office:value-type="float" office:value="25018" calcext:value-type="float">
            <text:p>25018</text:p>
          </table:table-cell>
          <table:table-cell office:value-type="float" office:value="25008" calcext:value-type="float">
            <text:p>25008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49:22.400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138.00000000001" calcext:value-type="float">
            <text:p>5138.00000000001</text:p>
          </table:table-cell>
          <table:table-cell office:value-type="float" office:value="1" calcext:value-type="float">
            <text:p>1</text:p>
          </table:table-cell>
          <table:table-cell office:value-type="float" office:value="6395.70000000001" calcext:value-type="float">
            <text:p>6395.70000000001</text:p>
          </table:table-cell>
          <table:table-cell office:value-type="float" office:value="6511.40000000001" calcext:value-type="float">
            <text:p>6511.4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9:48.800</text:p>
          </table:table-cell>
          <table:table-cell office:value-type="string" calcext:value-type="string">
            <text:p>2025-10-03 15:49:48.800</text:p>
          </table:table-cell>
          <table:table-cell office:value-type="string" calcext:value-type="string">
            <text:p>LONG</text:p>
          </table:table-cell>
          <table:table-cell office:value-type="float" office:value="25017.5" calcext:value-type="float">
            <text:p>25017.5</text:p>
          </table:table-cell>
          <table:table-cell office:value-type="float" office:value="25027.5" calcext:value-type="float">
            <text:p>25027.5</text:p>
          </table:table-cell>
          <table:table-cell office:value-type="float" office:value="25012.5" calcext:value-type="float">
            <text:p>2501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49:50.1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327.30000000001" calcext:value-type="float">
            <text:p>5327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85.00000000001" calcext:value-type="float">
            <text:p>6585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49:53.600</text:p>
          </table:table-cell>
          <table:table-cell office:value-type="string" calcext:value-type="string">
            <text:p>2025-10-03 15:49:53.600</text:p>
          </table:table-cell>
          <table:table-cell office:value-type="string" calcext:value-type="string">
            <text:p>LONG</text:p>
          </table:table-cell>
          <table:table-cell office:value-type="float" office:value="25019" calcext:value-type="float">
            <text:p>25019</text:p>
          </table:table-cell>
          <table:table-cell office:value-type="float" office:value="25029" calcext:value-type="float">
            <text:p>25029</text:p>
          </table:table-cell>
          <table:table-cell office:value-type="float" office:value="25014" calcext:value-type="float">
            <text:p>2501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3 19:49:57.00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516.60000000001" calcext:value-type="float">
            <text:p>5516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74.30000000001" calcext:value-type="float">
            <text:p>6774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2025-10-03 19:59:13.200</text:p>
          </table:table-cell>
          <table:table-cell office:value-type="string" calcext:value-type="string">
            <text:p>2025-10-03 15:59:13.200</text:p>
          </table:table-cell>
          <table:table-cell office:value-type="string" calcext:value-type="string">
            <text:p>SHORT</text:p>
          </table:table-cell>
          <table:table-cell office:value-type="float" office:value="24987.25" calcext:value-type="float">
            <text:p>24987.25</text:p>
          </table:table-cell>
          <table:table-cell office:value-type="float" office:value="24977.25" calcext:value-type="float">
            <text:p>24977.25</text:p>
          </table:table-cell>
          <table:table-cell office:value-type="float" office:value="24992.25" calcext:value-type="float">
            <text:p>2499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3 19:59:14.20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3 19:59:49.8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159.25" calcext:value-type="float">
            <text:p>25159.25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395.90000000001" calcext:value-type="float">
            <text:p>5395.90000000001</text:p>
          </table:table-cell>
          <table:table-cell office:value-type="float" office:value="1" calcext:value-type="float">
            <text:p>1</text:p>
          </table:table-cell>
          <table:table-cell office:value-type="float" office:value="6653.60000000001" calcext:value-type="float">
            <text:p>6653.60000000001</text:p>
          </table:table-cell>
          <table:table-cell office:value-type="float" office:value="6774.30000000001" calcext:value-type="float">
            <text:p>6774.3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3:50:53.000</text:p>
          </table:table-cell>
          <table:table-cell office:value-type="string" calcext:value-type="string">
            <text:p>2025-10-07 09:50:53.000</text:p>
          </table:table-cell>
          <table:table-cell office:value-type="string" calcext:value-type="string">
            <text:p>SHORT</text:p>
          </table:table-cell>
          <table:table-cell office:value-type="float" office:value="25237" calcext:value-type="float">
            <text:p>25237</text:p>
          </table:table-cell>
          <table:table-cell office:value-type="float" office:value="25227" calcext:value-type="float">
            <text:p>25227</text:p>
          </table:table-cell>
          <table:table-cell office:value-type="float" office:value="25242" calcext:value-type="float">
            <text:p>2524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3:50:54.00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169.3" calcext:value-type="float">
            <text:p>16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.3" calcext:value-type="float">
            <text:p>16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3:55:49.600</text:p>
          </table:table-cell>
          <table:table-cell office:value-type="string" calcext:value-type="string">
            <text:p>2025-10-07 09:55:49.600</text:p>
          </table:table-cell>
          <table:table-cell office:value-type="string" calcext:value-type="string">
            <text:p>LONG</text:p>
          </table:table-cell>
          <table:table-cell office:value-type="float" office:value="25263.5" calcext:value-type="float">
            <text:p>25263.5</text:p>
          </table:table-cell>
          <table:table-cell office:value-type="float" office:value="25273.5" calcext:value-type="float">
            <text:p>25273.5</text:p>
          </table:table-cell>
          <table:table-cell office:value-type="float" office:value="25258.5" calcext:value-type="float">
            <text:p>2525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3:55:50.300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358.6" calcext:value-type="float">
            <text:p>35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.6" calcext:value-type="float">
            <text:p>35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10:27.100</text:p>
          </table:table-cell>
          <table:table-cell office:value-type="string" calcext:value-type="string">
            <text:p>2025-10-07 10:10:27.100</text:p>
          </table:table-cell>
          <table:table-cell office:value-type="string" calcext:value-type="string">
            <text:p>SHORT</text:p>
          </table:table-cell>
          <table:table-cell office:value-type="float" office:value="25248" calcext:value-type="float">
            <text:p>25248</text:p>
          </table:table-cell>
          <table:table-cell office:value-type="float" office:value="25238" calcext:value-type="float">
            <text:p>25238</text:p>
          </table:table-cell>
          <table:table-cell office:value-type="float" office:value="25253" calcext:value-type="float">
            <text:p>2525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4:10:28.100</text:p>
          </table:table-cell>
          <table:table-cell office:value-type="float" office:value="186" calcext:value-type="float">
            <text:p>18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4:11:15.4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237.9" calcext:value-type="float">
            <text:p>237.9</text:p>
          </table:table-cell>
          <table:table-cell office:value-type="float" office:value="1" calcext:value-type="float">
            <text:p>1</text:p>
          </table:table-cell>
          <table:table-cell office:value-type="float" office:value="237.9" calcext:value-type="float">
            <text:p>237.9</text:p>
          </table:table-cell>
          <table:table-cell office:value-type="float" office:value="358.6" calcext:value-type="float">
            <text:p>358.6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20:53.600</text:p>
          </table:table-cell>
          <table:table-cell office:value-type="string" calcext:value-type="string">
            <text:p>2025-10-07 10:20:53.600</text:p>
          </table:table-cell>
          <table:table-cell office:value-type="string" calcext:value-type="string">
            <text:p>SHORT</text:p>
          </table:table-cell>
          <table:table-cell office:value-type="float" office:value="25231.5" calcext:value-type="float">
            <text:p>25231.5</text:p>
          </table:table-cell>
          <table:table-cell office:value-type="float" office:value="25221.5" calcext:value-type="float">
            <text:p>25221.5</text:p>
          </table:table-cell>
          <table:table-cell office:value-type="float" office:value="25236.5" calcext:value-type="float">
            <text:p>2523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20:54.800</text:p>
          </table:table-cell>
          <table:table-cell office:value-type="float" office:value="80" calcext:value-type="float">
            <text:p>80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127.2" calcext:value-type="float">
            <text:p>127.2</text:p>
          </table:table-cell>
          <table:table-cell office:value-type="float" office:value="2" calcext:value-type="float">
            <text:p>2</text:p>
          </table:table-cell>
          <table:table-cell office:value-type="float" office:value="127.2" calcext:value-type="float">
            <text:p>127.2</text:p>
          </table:table-cell>
          <table:table-cell office:value-type="float" office:value="358.6" calcext:value-type="float">
            <text:p>358.6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22:52.200</text:p>
          </table:table-cell>
          <table:table-cell office:value-type="string" calcext:value-type="string">
            <text:p>2025-10-07 10:22:52.200</text:p>
          </table:table-cell>
          <table:table-cell office:value-type="string" calcext:value-type="string">
            <text:p>SHORT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1" calcext:value-type="float">
            <text:p>25221</text:p>
          </table:table-cell>
          <table:table-cell office:value-type="float" office:value="25236" calcext:value-type="float">
            <text:p>2523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22:55.500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office:value-type="float" office:value="16.5" calcext:value-type="float">
            <text:p>16.5</text:p>
          </table:table-cell>
          <table:table-cell office:value-type="float" office:value="358.6" calcext:value-type="float">
            <text:p>358.6</text:p>
          </table:table-cell>
          <table:table-cell office:value-type="float" office:value="-342.1" calcext:value-type="float">
            <text:p>-342.1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32:04.400</text:p>
          </table:table-cell>
          <table:table-cell office:value-type="string" calcext:value-type="string">
            <text:p>2025-10-07 10:32:04.400</text:p>
          </table:table-cell>
          <table:table-cell office:value-type="string" calcext:value-type="string">
            <text:p>LONG</text:p>
          </table:table-cell>
          <table:table-cell office:value-type="float" office:value="25216.75" calcext:value-type="float">
            <text:p>25216.75</text:p>
          </table:table-cell>
          <table:table-cell office:value-type="float" office:value="25226.75" calcext:value-type="float">
            <text:p>25226.75</text:p>
          </table:table-cell>
          <table:table-cell office:value-type="float" office:value="25211.75" calcext:value-type="float">
            <text:p>2521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4:32:05.400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4:32:22.5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5.1" calcext:value-type="float">
            <text:p>85.1</text:p>
          </table:table-cell>
          <table:table-cell office:value-type="float" office:value="0" calcext:value-type="float">
            <text:p>0</text:p>
          </table:table-cell>
          <table:table-cell office:value-type="float" office:value="195.8" calcext:value-type="float">
            <text:p>195.8</text:p>
          </table:table-cell>
          <table:table-cell office:value-type="float" office:value="358.6" calcext:value-type="float">
            <text:p>358.6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37:32.200</text:p>
          </table:table-cell>
          <table:table-cell office:value-type="string" calcext:value-type="string">
            <text:p>2025-10-07 10:37:32.200</text:p>
          </table:table-cell>
          <table:table-cell office:value-type="string" calcext:value-type="string">
            <text:p>LONG</text:p>
          </table:table-cell>
          <table:table-cell office:value-type="float" office:value="25193.5" calcext:value-type="float">
            <text:p>25193.5</text:p>
          </table:table-cell>
          <table:table-cell office:value-type="float" office:value="25203.5" calcext:value-type="float">
            <text:p>25203.5</text:p>
          </table:table-cell>
          <table:table-cell office:value-type="float" office:value="25188.5" calcext:value-type="float">
            <text:p>2518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4:37:33.20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4:38:06.2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9.4" calcext:value-type="float">
            <text:p>269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0.1" calcext:value-type="float">
            <text:p>38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45:47.200</text:p>
          </table:table-cell>
          <table:table-cell office:value-type="string" calcext:value-type="string">
            <text:p>2025-10-07 10:45:47.200</text:p>
          </table:table-cell>
          <table:table-cell office:value-type="string" calcext:value-type="string">
            <text:p>SHORT</text:p>
          </table:table-cell>
          <table:table-cell office:value-type="float" office:value="25192.5" calcext:value-type="float">
            <text:p>25192.5</text:p>
          </table:table-cell>
          <table:table-cell office:value-type="float" office:value="25182.5" calcext:value-type="float">
            <text:p>25182.5</text:p>
          </table:table-cell>
          <table:table-cell office:value-type="float" office:value="25197.5" calcext:value-type="float">
            <text:p>2519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45:47.700</text:p>
          </table:table-cell>
          <table:table-cell office:value-type="float" office:value="81" calcext:value-type="float">
            <text:p>81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4:46:42.2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8.7" calcext:value-type="float">
            <text:p>158.7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380.1" calcext:value-type="float">
            <text:p>380.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46:54.000</text:p>
          </table:table-cell>
          <table:table-cell office:value-type="string" calcext:value-type="string">
            <text:p>2025-10-07 10:46:54.000</text:p>
          </table:table-cell>
          <table:table-cell office:value-type="string" calcext:value-type="string">
            <text:p>SHORT</text:p>
          </table:table-cell>
          <table:table-cell office:value-type="float" office:value="25200" calcext:value-type="float">
            <text:p>25200</text:p>
          </table:table-cell>
          <table:table-cell office:value-type="float" office:value="25190" calcext:value-type="float">
            <text:p>25190</text:p>
          </table:table-cell>
          <table:table-cell office:value-type="float" office:value="25205" calcext:value-type="float">
            <text:p>2520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46:54.500</text:p>
          </table:table-cell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4:47:58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58.7" calcext:value-type="float">
            <text:p>158.7</text:p>
          </table:table-cell>
          <table:table-cell office:value-type="float" office:value="380.1" calcext:value-type="float">
            <text:p>380.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56:13.200</text:p>
          </table:table-cell>
          <table:table-cell office:value-type="string" calcext:value-type="string">
            <text:p>2025-10-07 10:56:13.200</text:p>
          </table:table-cell>
          <table:table-cell office:value-type="string" calcext:value-type="string">
            <text:p>LONG</text:p>
          </table:table-cell>
          <table:table-cell office:value-type="float" office:value="25185.25" calcext:value-type="float">
            <text:p>25185.25</text:p>
          </table:table-cell>
          <table:table-cell office:value-type="float" office:value="25195.25" calcext:value-type="float">
            <text:p>25195.25</text:p>
          </table:table-cell>
          <table:table-cell office:value-type="float" office:value="25180.25" calcext:value-type="float">
            <text:p>2518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56:14.90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7.3" calcext:value-type="float">
            <text:p>237.3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80.1" calcext:value-type="float">
            <text:p>380.1</text:p>
          </table:table-cell>
          <table:table-cell office:value-type="float" office:value="-32.1" calcext:value-type="float">
            <text:p>-32.1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56:53.000</text:p>
          </table:table-cell>
          <table:table-cell office:value-type="string" calcext:value-type="string">
            <text:p>2025-10-07 10:56:53.000</text:p>
          </table:table-cell>
          <table:table-cell office:value-type="string" calcext:value-type="string">
            <text:p>SHORT</text:p>
          </table:table-cell>
          <table:table-cell office:value-type="float" office:value="25174.5" calcext:value-type="float">
            <text:p>25174.5</text:p>
          </table:table-cell>
          <table:table-cell office:value-type="float" office:value="25164.5" calcext:value-type="float">
            <text:p>25164.5</text:p>
          </table:table-cell>
          <table:table-cell office:value-type="float" office:value="25179.5" calcext:value-type="float">
            <text:p>2517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4:56:54.00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4:56:58.8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6.6" calcext:value-type="float">
            <text:p>116.6</text:p>
          </table:table-cell>
          <table:table-cell office:value-type="float" office:value="1" calcext:value-type="float">
            <text:p>1</text:p>
          </table:table-cell>
          <table:table-cell office:value-type="float" office:value="227.3" calcext:value-type="float">
            <text:p>227.3</text:p>
          </table:table-cell>
          <table:table-cell office:value-type="float" office:value="380.1" calcext:value-type="float">
            <text:p>380.1</text:p>
          </table:table-cell>
          <table:table-cell office:value-type="float" office:value="-152.8" calcext:value-type="float">
            <text:p>-152.8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57:03.400</text:p>
          </table:table-cell>
          <table:table-cell office:value-type="string" calcext:value-type="string">
            <text:p>2025-10-07 10:57:03.400</text:p>
          </table:table-cell>
          <table:table-cell office:value-type="string" calcext:value-type="string">
            <text:p>LONG</text:p>
          </table:table-cell>
          <table:table-cell office:value-type="float" office:value="25184" calcext:value-type="float">
            <text:p>25184</text:p>
          </table:table-cell>
          <table:table-cell office:value-type="float" office:value="25194" calcext:value-type="float">
            <text:p>25194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57:04.10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5.9" calcext:value-type="float">
            <text:p>30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57:30.300</text:p>
          </table:table-cell>
          <table:table-cell office:value-type="string" calcext:value-type="string">
            <text:p>2025-10-07 10:57:30.300</text:p>
          </table:table-cell>
          <table:table-cell office:value-type="string" calcext:value-type="string">
            <text:p>SHORT</text:p>
          </table:table-cell>
          <table:table-cell office:value-type="float" office:value="25186.5" calcext:value-type="float">
            <text:p>25186.5</text:p>
          </table:table-cell>
          <table:table-cell office:value-type="float" office:value="25176.5" calcext:value-type="float">
            <text:p>25176.5</text:p>
          </table:table-cell>
          <table:table-cell office:value-type="float" office:value="25191.5" calcext:value-type="float">
            <text:p>2519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57:31.00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305.9" calcext:value-type="float">
            <text:p>305.9</text:p>
          </table:table-cell>
          <table:table-cell office:value-type="float" office:value="416.6" calcext:value-type="float">
            <text:p>416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4:59:05.100</text:p>
          </table:table-cell>
          <table:table-cell office:value-type="string" calcext:value-type="string">
            <text:p>2025-10-07 10:59:05.100</text:p>
          </table:table-cell>
          <table:table-cell office:value-type="string" calcext:value-type="string">
            <text:p>LONG</text:p>
          </table:table-cell>
          <table:table-cell office:value-type="float" office:value="25184.25" calcext:value-type="float">
            <text:p>25184.25</text:p>
          </table:table-cell>
          <table:table-cell office:value-type="float" office:value="25194.25" calcext:value-type="float">
            <text:p>25194.25</text:p>
          </table:table-cell>
          <table:table-cell office:value-type="float" office:value="25179.25" calcext:value-type="float">
            <text:p>2517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4:59:05.60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5.2" calcext:value-type="float">
            <text:p>49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15:39.300</text:p>
          </table:table-cell>
          <table:table-cell office:value-type="string" calcext:value-type="string">
            <text:p>2025-10-07 11:15:39.300</text:p>
          </table:table-cell>
          <table:table-cell office:value-type="string" calcext:value-type="string">
            <text:p>LONG</text:p>
          </table:table-cell>
          <table:table-cell office:value-type="float" office:value="25104" calcext:value-type="float">
            <text:p>25104</text:p>
          </table:table-cell>
          <table:table-cell office:value-type="float" office:value="25114" calcext:value-type="float">
            <text:p>25114</text:p>
          </table:table-cell>
          <table:table-cell office:value-type="float" office:value="25099" calcext:value-type="float">
            <text:p>2509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15:40.000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5:15:41.4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73.8" calcext:value-type="float">
            <text:p>273.8</text:p>
          </table:table-cell>
          <table:table-cell office:value-type="float" office:value="1" calcext:value-type="float">
            <text:p>1</text:p>
          </table:table-cell>
          <table:table-cell office:value-type="float" office:value="384.5" calcext:value-type="float">
            <text:p>384.5</text:p>
          </table:table-cell>
          <table:table-cell office:value-type="float" office:value="495.2" calcext:value-type="float">
            <text:p>495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17:50.000</text:p>
          </table:table-cell>
          <table:table-cell office:value-type="string" calcext:value-type="string">
            <text:p>2025-10-07 11:17:50.000</text:p>
          </table:table-cell>
          <table:table-cell office:value-type="string" calcext:value-type="string">
            <text:p>LONG</text:p>
          </table:table-cell>
          <table:table-cell office:value-type="float" office:value="25110.5" calcext:value-type="float">
            <text:p>25110.5</text:p>
          </table:table-cell>
          <table:table-cell office:value-type="float" office:value="25120.5" calcext:value-type="float">
            <text:p>25120.5</text:p>
          </table:table-cell>
          <table:table-cell office:value-type="float" office:value="25105.5" calcext:value-type="float">
            <text:p>2510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17:51.400</text:p>
          </table:table-cell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5:18:09.4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3.1" calcext:value-type="float">
            <text:p>163.1</text:p>
          </table:table-cell>
          <table:table-cell office:value-type="float" office:value="2" calcext:value-type="float">
            <text:p>2</text:p>
          </table:table-cell>
          <table:table-cell office:value-type="float" office:value="273.8" calcext:value-type="float">
            <text:p>273.8</text:p>
          </table:table-cell>
          <table:table-cell office:value-type="float" office:value="495.2" calcext:value-type="float">
            <text:p>495.2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18:38.900</text:p>
          </table:table-cell>
          <table:table-cell office:value-type="string" calcext:value-type="string">
            <text:p>2025-10-07 11:18:38.900</text:p>
          </table:table-cell>
          <table:table-cell office:value-type="string" calcext:value-type="string">
            <text:p>SHORT</text:p>
          </table:table-cell>
          <table:table-cell office:value-type="float" office:value="25107" calcext:value-type="float">
            <text:p>25107</text:p>
          </table:table-cell>
          <table:table-cell office:value-type="float" office:value="25097" calcext:value-type="float">
            <text:p>25097</text:p>
          </table:table-cell>
          <table:table-cell office:value-type="float" office:value="25112" calcext:value-type="float">
            <text:p>2511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5:18:39.900</text:p>
          </table:table-cell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5:19:31.8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458.1" calcext:value-type="float">
            <text:p>458.1</text:p>
          </table:table-cell>
          <table:table-cell office:value-type="float" office:value="495.2" calcext:value-type="float">
            <text:p>495.2</text:p>
          </table:table-cell>
          <table:table-cell office:value-type="float" office:value="-37.1" calcext:value-type="float">
            <text:p>-37.1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25:47.100</text:p>
          </table:table-cell>
          <table:table-cell office:value-type="string" calcext:value-type="string">
            <text:p>2025-10-07 11:25:47.100</text:p>
          </table:table-cell>
          <table:table-cell office:value-type="string" calcext:value-type="string">
            <text:p>LONG</text:p>
          </table:table-cell>
          <table:table-cell office:value-type="float" office:value="25114.75" calcext:value-type="float">
            <text:p>25114.75</text:p>
          </table:table-cell>
          <table:table-cell office:value-type="float" office:value="25124.75" calcext:value-type="float">
            <text:p>25124.75</text:p>
          </table:table-cell>
          <table:table-cell office:value-type="float" office:value="25109.75" calcext:value-type="float">
            <text:p>2510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5:25:48.10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26.7" calcext:value-type="float">
            <text:p>526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7.4" calcext:value-type="float">
            <text:p>6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26:05.700</text:p>
          </table:table-cell>
          <table:table-cell office:value-type="string" calcext:value-type="string">
            <text:p>2025-10-07 11:26:05.700</text:p>
          </table:table-cell>
          <table:table-cell office:value-type="string" calcext:value-type="string">
            <text:p>SHORT</text:p>
          </table:table-cell>
          <table:table-cell office:value-type="float" office:value="25106.75" calcext:value-type="float">
            <text:p>25106.75</text:p>
          </table:table-cell>
          <table:table-cell office:value-type="float" office:value="25096.75" calcext:value-type="float">
            <text:p>25096.75</text:p>
          </table:table-cell>
          <table:table-cell office:value-type="float" office:value="25111.75" calcext:value-type="float">
            <text:p>2511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26:07.300</text:p>
          </table:table-cell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526.7" calcext:value-type="float">
            <text:p>526.7</text:p>
          </table:table-cell>
          <table:table-cell office:value-type="float" office:value="637.4" calcext:value-type="float">
            <text:p>637.4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28:12.400</text:p>
          </table:table-cell>
          <table:table-cell office:value-type="string" calcext:value-type="string">
            <text:p>2025-10-07 11:28:12.400</text:p>
          </table:table-cell>
          <table:table-cell office:value-type="string" calcext:value-type="string">
            <text:p>LONG</text:p>
          </table:table-cell>
          <table:table-cell office:value-type="float" office:value="25075.25" calcext:value-type="float">
            <text:p>25075.25</text:p>
          </table:table-cell>
          <table:table-cell office:value-type="float" office:value="25085.25" calcext:value-type="float">
            <text:p>25085.25</text:p>
          </table:table-cell>
          <table:table-cell office:value-type="float" office:value="25070.25" calcext:value-type="float">
            <text:p>2507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28:12.500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05.3" calcext:value-type="float">
            <text:p>60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28:19.300</text:p>
          </table:table-cell>
          <table:table-cell office:value-type="string" calcext:value-type="string">
            <text:p>2025-10-07 11:28:19.300</text:p>
          </table:table-cell>
          <table:table-cell office:value-type="string" calcext:value-type="string">
            <text:p>LONG</text:p>
          </table:table-cell>
          <table:table-cell office:value-type="float" office:value="25071.75" calcext:value-type="float">
            <text:p>25071.75</text:p>
          </table:table-cell>
          <table:table-cell office:value-type="float" office:value="25081.75" calcext:value-type="float">
            <text:p>25081.75</text:p>
          </table:table-cell>
          <table:table-cell office:value-type="float" office:value="25066.75" calcext:value-type="float">
            <text:p>2506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28:20.000</text:p>
          </table:table-cell>
          <table:table-cell office:value-type="float" office:value="228" calcext:value-type="float">
            <text:p>22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94.6" calcext:value-type="float">
            <text:p>794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5.3" calcext:value-type="float">
            <text:p>90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47:15.700</text:p>
          </table:table-cell>
          <table:table-cell office:value-type="string" calcext:value-type="string">
            <text:p>2025-10-07 11:47:15.700</text:p>
          </table:table-cell>
          <table:table-cell office:value-type="string" calcext:value-type="string">
            <text:p>LONG</text:p>
          </table:table-cell>
          <table:table-cell office:value-type="float" office:value="25015.5" calcext:value-type="float">
            <text:p>25015.5</text:p>
          </table:table-cell>
          <table:table-cell office:value-type="float" office:value="25025.5" calcext:value-type="float">
            <text:p>25025.5</text:p>
          </table:table-cell>
          <table:table-cell office:value-type="float" office:value="25010.5" calcext:value-type="float">
            <text:p>250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47:17.200</text:p>
          </table:table-cell>
          <table:table-cell office:value-type="float" office:value="1792" calcext:value-type="float">
            <text:p>179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83.9" calcext:value-type="float">
            <text:p>983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4.6" calcext:value-type="float">
            <text:p>109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5:52:41.700</text:p>
          </table:table-cell>
          <table:table-cell office:value-type="string" calcext:value-type="string">
            <text:p>2025-10-07 11:52:41.700</text:p>
          </table:table-cell>
          <table:table-cell office:value-type="string" calcext:value-type="string">
            <text:p>LONG</text:p>
          </table:table-cell>
          <table:table-cell office:value-type="float" office:value="24999" calcext:value-type="float">
            <text:p>24999</text:p>
          </table:table-cell>
          <table:table-cell office:value-type="float" office:value="25009" calcext:value-type="float">
            <text:p>25009</text:p>
          </table:table-cell>
          <table:table-cell office:value-type="float" office:value="24994" calcext:value-type="float">
            <text:p>2499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5:52:44.70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5:52:56.6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73.2" calcext:value-type="float">
            <text:p>117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3.9" calcext:value-type="float">
            <text:p>128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04:16.400</text:p>
          </table:table-cell>
          <table:table-cell office:value-type="string" calcext:value-type="string">
            <text:p>2025-10-07 12:04:16.400</text:p>
          </table:table-cell>
          <table:table-cell office:value-type="string" calcext:value-type="string">
            <text:p>SHORT</text:p>
          </table:table-cell>
          <table:table-cell office:value-type="float" office:value="25052.75" calcext:value-type="float">
            <text:p>25052.75</text:p>
          </table:table-cell>
          <table:table-cell office:value-type="float" office:value="25042.75" calcext:value-type="float">
            <text:p>25042.75</text:p>
          </table:table-cell>
          <table:table-cell office:value-type="float" office:value="25057.75" calcext:value-type="float">
            <text:p>2505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04:18.100</text:p>
          </table:table-cell>
          <table:table-cell office:value-type="float" office:value="73" calcext:value-type="float">
            <text:p>73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6:05:10.9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62.5" calcext:value-type="float">
            <text:p>1062.5</text:p>
          </table:table-cell>
          <table:table-cell office:value-type="float" office:value="1" calcext:value-type="float">
            <text:p>1</text:p>
          </table:table-cell>
          <table:table-cell office:value-type="float" office:value="1173.2" calcext:value-type="float">
            <text:p>1173.2</text:p>
          </table:table-cell>
          <table:table-cell office:value-type="float" office:value="1283.9" calcext:value-type="float">
            <text:p>1283.9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05:45.600</text:p>
          </table:table-cell>
          <table:table-cell office:value-type="string" calcext:value-type="string">
            <text:p>2025-10-07 12:05:45.600</text:p>
          </table:table-cell>
          <table:table-cell office:value-type="string" calcext:value-type="string">
            <text:p>LONG</text:p>
          </table:table-cell>
          <table:table-cell office:value-type="float" office:value="25052" calcext:value-type="float">
            <text:p>25052</text:p>
          </table:table-cell>
          <table:table-cell office:value-type="float" office:value="25062" calcext:value-type="float">
            <text:p>25062</text:p>
          </table:table-cell>
          <table:table-cell office:value-type="float" office:value="25047" calcext:value-type="float">
            <text:p>2504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05:46.600</text:p>
          </table:table-cell>
          <table:table-cell office:value-type="float" office:value="154" calcext:value-type="float">
            <text:p>15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41.8" calcext:value-type="float">
            <text:p>124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2.5" calcext:value-type="float">
            <text:p>1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09:16.100</text:p>
          </table:table-cell>
          <table:table-cell office:value-type="string" calcext:value-type="string">
            <text:p>2025-10-07 12:09:16.100</text:p>
          </table:table-cell>
          <table:table-cell office:value-type="string" calcext:value-type="string">
            <text:p>SHORT</text:p>
          </table:table-cell>
          <table:table-cell office:value-type="float" office:value="25024.5" calcext:value-type="float">
            <text:p>25024.5</text:p>
          </table:table-cell>
          <table:table-cell office:value-type="float" office:value="25014.5" calcext:value-type="float">
            <text:p>25014.5</text:p>
          </table:table-cell>
          <table:table-cell office:value-type="float" office:value="25029.5" calcext:value-type="float">
            <text:p>2502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09:21.100</text:p>
          </table:table-cell>
          <table:table-cell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6:09:39.2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31.1" calcext:value-type="float">
            <text:p>1131.1</text:p>
          </table:table-cell>
          <table:table-cell office:value-type="float" office:value="1" calcext:value-type="float">
            <text:p>1</text:p>
          </table:table-cell>
          <table:table-cell office:value-type="float" office:value="1241.8" calcext:value-type="float">
            <text:p>1241.8</text:p>
          </table:table-cell>
          <table:table-cell office:value-type="float" office:value="1352.5" calcext:value-type="float">
            <text:p>1352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18:20.600</text:p>
          </table:table-cell>
          <table:table-cell office:value-type="string" calcext:value-type="string">
            <text:p>2025-10-07 12:18:20.600</text:p>
          </table:table-cell>
          <table:table-cell office:value-type="string" calcext:value-type="string">
            <text:p>LONG</text:p>
          </table:table-cell>
          <table:table-cell office:value-type="float" office:value="25019.75" calcext:value-type="float">
            <text:p>25019.75</text:p>
          </table:table-cell>
          <table:table-cell office:value-type="float" office:value="25029.75" calcext:value-type="float">
            <text:p>25029.75</text:p>
          </table:table-cell>
          <table:table-cell office:value-type="float" office:value="25014.75" calcext:value-type="float">
            <text:p>2501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18:21.60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6:19:00.5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15.4" calcext:value-type="float">
            <text:p>1015.4</text:p>
          </table:table-cell>
          <table:table-cell office:value-type="float" office:value="2" calcext:value-type="float">
            <text:p>2</text:p>
          </table:table-cell>
          <table:table-cell office:value-type="float" office:value="1126.1" calcext:value-type="float">
            <text:p>1126.1</text:p>
          </table:table-cell>
          <table:table-cell office:value-type="float" office:value="1352.5" calcext:value-type="float">
            <text:p>1352.5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21:35.600</text:p>
          </table:table-cell>
          <table:table-cell office:value-type="string" calcext:value-type="string">
            <text:p>2025-10-07 12:21:35.600</text:p>
          </table:table-cell>
          <table:table-cell office:value-type="string" calcext:value-type="string">
            <text:p>LONG</text:p>
          </table:table-cell>
          <table:table-cell office:value-type="float" office:value="25017.75" calcext:value-type="float">
            <text:p>25017.75</text:p>
          </table:table-cell>
          <table:table-cell office:value-type="float" office:value="25027.75" calcext:value-type="float">
            <text:p>25027.75</text:p>
          </table:table-cell>
          <table:table-cell office:value-type="float" office:value="25012.75" calcext:value-type="float">
            <text:p>2501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21:36.60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6:21:54.7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99.7" calcext:value-type="float">
            <text:p>1199.7</text:p>
          </table:table-cell>
          <table:table-cell office:value-type="float" office:value="0" calcext:value-type="float">
            <text:p>0</text:p>
          </table:table-cell>
          <table:table-cell office:value-type="float" office:value="1310.4" calcext:value-type="float">
            <text:p>1310.4</text:p>
          </table:table-cell>
          <table:table-cell office:value-type="float" office:value="1352.5" calcext:value-type="float">
            <text:p>1352.5</text:p>
          </table:table-cell>
          <table:table-cell office:value-type="float" office:value="-42.1000000000001" calcext:value-type="float">
            <text:p>-42.1000000000001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24:40.600</text:p>
          </table:table-cell>
          <table:table-cell office:value-type="string" calcext:value-type="string">
            <text:p>2025-10-07 12:24:40.600</text:p>
          </table:table-cell>
          <table:table-cell office:value-type="string" calcext:value-type="string">
            <text:p>SHORT</text:p>
          </table:table-cell>
          <table:table-cell office:value-type="float" office:value="25026.25" calcext:value-type="float">
            <text:p>25026.25</text:p>
          </table:table-cell>
          <table:table-cell office:value-type="float" office:value="25016.25" calcext:value-type="float">
            <text:p>25016.25</text:p>
          </table:table-cell>
          <table:table-cell office:value-type="float" office:value="25031.25" calcext:value-type="float">
            <text:p>2503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24:44.500</text:p>
          </table:table-cell>
          <table:table-cell office:value-type="float" office:value="103" calcext:value-type="float">
            <text:p>103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9.7" calcext:value-type="float">
            <text:p>149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25:14.700</text:p>
          </table:table-cell>
          <table:table-cell office:value-type="string" calcext:value-type="string">
            <text:p>2025-10-07 12:25:14.700</text:p>
          </table:table-cell>
          <table:table-cell office:value-type="string" calcext:value-type="string">
            <text:p>SHORT</text:p>
          </table:table-cell>
          <table:table-cell office:value-type="float" office:value="25032" calcext:value-type="float">
            <text:p>25032</text:p>
          </table:table-cell>
          <table:table-cell office:value-type="float" office:value="25022" calcext:value-type="float">
            <text:p>25022</text:p>
          </table:table-cell>
          <table:table-cell office:value-type="float" office:value="25037" calcext:value-type="float">
            <text:p>2503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25:15.700</text:p>
          </table:table-cell>
          <table:table-cell office:value-type="float" office:value="115" calcext:value-type="float">
            <text:p>115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68.3" calcext:value-type="float">
            <text:p>156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26:59.700</text:p>
          </table:table-cell>
          <table:table-cell office:value-type="string" calcext:value-type="string">
            <text:p>2025-10-07 12:26:59.700</text:p>
          </table:table-cell>
          <table:table-cell office:value-type="string" calcext:value-type="string">
            <text:p>LONG</text:p>
          </table:table-cell>
          <table:table-cell office:value-type="float" office:value="25053" calcext:value-type="float">
            <text:p>25053</text:p>
          </table:table-cell>
          <table:table-cell office:value-type="float" office:value="25063" calcext:value-type="float">
            <text:p>25063</text:p>
          </table:table-cell>
          <table:table-cell office:value-type="float" office:value="25048" calcext:value-type="float">
            <text:p>2504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27:00.700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6:27:45.6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47.6" calcext:value-type="float">
            <text:p>1447.6</text:p>
          </table:table-cell>
          <table:table-cell office:value-type="float" office:value="1" calcext:value-type="float">
            <text:p>1</text:p>
          </table:table-cell>
          <table:table-cell office:value-type="float" office:value="1558.3" calcext:value-type="float">
            <text:p>1558.3</text:p>
          </table:table-cell>
          <table:table-cell office:value-type="float" office:value="1679" calcext:value-type="float">
            <text:p>1679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33:17.400</text:p>
          </table:table-cell>
          <table:table-cell office:value-type="string" calcext:value-type="string">
            <text:p>2025-10-07 12:33:17.400</text:p>
          </table:table-cell>
          <table:table-cell office:value-type="string" calcext:value-type="string">
            <text:p>LONG</text:p>
          </table:table-cell>
          <table:table-cell office:value-type="float" office:value="25063" calcext:value-type="float">
            <text:p>25063</text:p>
          </table:table-cell>
          <table:table-cell office:value-type="float" office:value="25073" calcext:value-type="float">
            <text:p>25073</text:p>
          </table:table-cell>
          <table:table-cell office:value-type="float" office:value="25058" calcext:value-type="float">
            <text:p>2505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33:18.400</text:p>
          </table:table-cell>
          <table:table-cell office:value-type="float" office:value="188" calcext:value-type="float">
            <text:p>188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26.9" calcext:value-type="float">
            <text:p>1326.9</text:p>
          </table:table-cell>
          <table:table-cell office:value-type="float" office:value="2" calcext:value-type="float">
            <text:p>2</text:p>
          </table:table-cell>
          <table:table-cell office:value-type="float" office:value="1437.6" calcext:value-type="float">
            <text:p>1437.6</text:p>
          </table:table-cell>
          <table:table-cell office:value-type="float" office:value="1679" calcext:value-type="float">
            <text:p>1679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33:35.400</text:p>
          </table:table-cell>
          <table:table-cell office:value-type="string" calcext:value-type="string">
            <text:p>2025-10-07 12:33:35.400</text:p>
          </table:table-cell>
          <table:table-cell office:value-type="string" calcext:value-type="string">
            <text:p>SHORT</text:p>
          </table:table-cell>
          <table:table-cell office:value-type="float" office:value="25066.5" calcext:value-type="float">
            <text:p>25066.5</text:p>
          </table:table-cell>
          <table:table-cell office:value-type="float" office:value="25056.5" calcext:value-type="float">
            <text:p>25056.5</text:p>
          </table:table-cell>
          <table:table-cell office:value-type="float" office:value="25071.5" calcext:value-type="float">
            <text:p>2507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33:35.70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16.2" calcext:value-type="float">
            <text:p>1516.2</text:p>
          </table:table-cell>
          <table:table-cell office:value-type="float" office:value="0" calcext:value-type="float">
            <text:p>0</text:p>
          </table:table-cell>
          <table:table-cell office:value-type="float" office:value="1626.9" calcext:value-type="float">
            <text:p>1626.9</text:p>
          </table:table-cell>
          <table:table-cell office:value-type="float" office:value="1679" calcext:value-type="float">
            <text:p>1679</text:p>
          </table:table-cell>
          <table:table-cell office:value-type="float" office:value="-52.1000000000001" calcext:value-type="float">
            <text:p>-52.1000000000001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34:29.300</text:p>
          </table:table-cell>
          <table:table-cell office:value-type="string" calcext:value-type="string">
            <text:p>2025-10-07 12:34:29.300</text:p>
          </table:table-cell>
          <table:table-cell office:value-type="string" calcext:value-type="string">
            <text:p>LONG</text:p>
          </table:table-cell>
          <table:table-cell office:value-type="float" office:value="25072" calcext:value-type="float">
            <text:p>25072</text:p>
          </table:table-cell>
          <table:table-cell office:value-type="float" office:value="25082" calcext:value-type="float">
            <text:p>25082</text:p>
          </table:table-cell>
          <table:table-cell office:value-type="float" office:value="25067" calcext:value-type="float">
            <text:p>2506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34:32.40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6:35:24.3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05.5" calcext:value-type="float">
            <text:p>1405.5</text:p>
          </table:table-cell>
          <table:table-cell office:value-type="float" office:value="1" calcext:value-type="float">
            <text:p>1</text:p>
          </table:table-cell>
          <table:table-cell office:value-type="float" office:value="1516.2" calcext:value-type="float">
            <text:p>1516.2</text:p>
          </table:table-cell>
          <table:table-cell office:value-type="float" office:value="1679" calcext:value-type="float">
            <text:p>1679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35:34.000</text:p>
          </table:table-cell>
          <table:table-cell office:value-type="string" calcext:value-type="string">
            <text:p>2025-10-07 12:35:34.000</text:p>
          </table:table-cell>
          <table:table-cell office:value-type="string" calcext:value-type="string">
            <text:p>LONG</text:p>
          </table:table-cell>
          <table:table-cell office:value-type="float" office:value="25071.75" calcext:value-type="float">
            <text:p>25071.75</text:p>
          </table:table-cell>
          <table:table-cell office:value-type="float" office:value="25081.75" calcext:value-type="float">
            <text:p>25081.75</text:p>
          </table:table-cell>
          <table:table-cell office:value-type="float" office:value="25066.75" calcext:value-type="float">
            <text:p>2506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35:35.000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6:35:50.900</text:p>
          </table:table-cell>
          <table:table-cell office:value-type="float" office:value="-130.7" calcext:value-type="float">
            <text:p>-13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274.8" calcext:value-type="float">
            <text:p>1274.8</text:p>
          </table:table-cell>
          <table:table-cell office:value-type="float" office:value="2" calcext:value-type="float">
            <text:p>2</text:p>
          </table:table-cell>
          <table:table-cell office:value-type="float" office:value="1385.5" calcext:value-type="float">
            <text:p>1385.5</text:p>
          </table:table-cell>
          <table:table-cell office:value-type="float" office:value="1679" calcext:value-type="float">
            <text:p>1679</text:p>
          </table:table-cell>
          <table:table-cell office:value-type="float" office:value="-293.5" calcext:value-type="float">
            <text:p>-293.5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36:26.300</text:p>
          </table:table-cell>
          <table:table-cell office:value-type="string" calcext:value-type="string">
            <text:p>2025-10-07 12:36:26.300</text:p>
          </table:table-cell>
          <table:table-cell office:value-type="string" calcext:value-type="string">
            <text:p>SHORT</text:p>
          </table:table-cell>
          <table:table-cell office:value-type="float" office:value="25067" calcext:value-type="float">
            <text:p>25067</text:p>
          </table:table-cell>
          <table:table-cell office:value-type="float" office:value="25057" calcext:value-type="float">
            <text:p>25057</text:p>
          </table:table-cell>
          <table:table-cell office:value-type="float" office:value="25072" calcext:value-type="float">
            <text:p>2507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36:27.300</text:p>
          </table:table-cell>
          <table:table-cell office:value-type="float" office:value="83" calcext:value-type="float">
            <text:p>83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59.1" calcext:value-type="float">
            <text:p>1459.1</text:p>
          </table:table-cell>
          <table:table-cell office:value-type="float" office:value="0" calcext:value-type="float">
            <text:p>0</text:p>
          </table:table-cell>
          <table:table-cell office:value-type="float" office:value="1569.8" calcext:value-type="float">
            <text:p>1569.8</text:p>
          </table:table-cell>
          <table:table-cell office:value-type="float" office:value="1679" calcext:value-type="float">
            <text:p>1679</text:p>
          </table:table-cell>
          <table:table-cell office:value-type="float" office:value="-109.2" calcext:value-type="float">
            <text:p>-109.2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36:42.500</text:p>
          </table:table-cell>
          <table:table-cell office:value-type="string" calcext:value-type="string">
            <text:p>2025-10-07 12:36:42.500</text:p>
          </table:table-cell>
          <table:table-cell office:value-type="string" calcext:value-type="string">
            <text:p>LONG</text:p>
          </table:table-cell>
          <table:table-cell office:value-type="float" office:value="25067.75" calcext:value-type="float">
            <text:p>25067.75</text:p>
          </table:table-cell>
          <table:table-cell office:value-type="float" office:value="25077.75" calcext:value-type="float">
            <text:p>25077.75</text:p>
          </table:table-cell>
          <table:table-cell office:value-type="float" office:value="25062.75" calcext:value-type="float">
            <text:p>2506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36:46.7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6:37:12.4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48.4" calcext:value-type="float">
            <text:p>1648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9.1" calcext:value-type="float">
            <text:p>175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40:05.700</text:p>
          </table:table-cell>
          <table:table-cell office:value-type="string" calcext:value-type="string">
            <text:p>2025-10-07 12:40:05.700</text:p>
          </table:table-cell>
          <table:table-cell office:value-type="string" calcext:value-type="string">
            <text:p>LONG</text:p>
          </table:table-cell>
          <table:table-cell office:value-type="float" office:value="25083.25" calcext:value-type="float">
            <text:p>25083.25</text:p>
          </table:table-cell>
          <table:table-cell office:value-type="float" office:value="25093.25" calcext:value-type="float">
            <text:p>25093.25</text:p>
          </table:table-cell>
          <table:table-cell office:value-type="float" office:value="25078.25" calcext:value-type="float">
            <text:p>2507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40:07.10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837.7" calcext:value-type="float">
            <text:p>1837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48.4" calcext:value-type="float">
            <text:p>194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40:13.000</text:p>
          </table:table-cell>
          <table:table-cell office:value-type="string" calcext:value-type="string">
            <text:p>2025-10-07 12:40:13.000</text:p>
          </table:table-cell>
          <table:table-cell office:value-type="string" calcext:value-type="string">
            <text:p>LONG</text:p>
          </table:table-cell>
          <table:table-cell office:value-type="float" office:value="25083.75" calcext:value-type="float">
            <text:p>25083.75</text:p>
          </table:table-cell>
          <table:table-cell office:value-type="float" office:value="25093.75" calcext:value-type="float">
            <text:p>25093.75</text:p>
          </table:table-cell>
          <table:table-cell office:value-type="float" office:value="25078.75" calcext:value-type="float">
            <text:p>2507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6:40:17.400</text:p>
          </table:table-cell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7.7" calcext:value-type="float">
            <text:p>213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6:47:41.600</text:p>
          </table:table-cell>
          <table:table-cell office:value-type="string" calcext:value-type="string">
            <text:p>2025-10-07 12:47:41.600</text:p>
          </table:table-cell>
          <table:table-cell office:value-type="string" calcext:value-type="string">
            <text:p>LONG</text:p>
          </table:table-cell>
          <table:table-cell office:value-type="float" office:value="25062.5" calcext:value-type="float">
            <text:p>25062.5</text:p>
          </table:table-cell>
          <table:table-cell office:value-type="float" office:value="25072.5" calcext:value-type="float">
            <text:p>25072.5</text:p>
          </table:table-cell>
          <table:table-cell office:value-type="float" office:value="25057.5" calcext:value-type="float">
            <text:p>2505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6:47:42.60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06.3" calcext:value-type="float">
            <text:p>2206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04:08.400</text:p>
          </table:table-cell>
          <table:table-cell office:value-type="string" calcext:value-type="string">
            <text:p>2025-10-07 13:04:08.400</text:p>
          </table:table-cell>
          <table:table-cell office:value-type="string" calcext:value-type="string">
            <text:p>SHORT</text:p>
          </table:table-cell>
          <table:table-cell office:value-type="float" office:value="25045" calcext:value-type="float">
            <text:p>25045</text:p>
          </table:table-cell>
          <table:table-cell office:value-type="float" office:value="25035" calcext:value-type="float">
            <text:p>25035</text:p>
          </table:table-cell>
          <table:table-cell office:value-type="float" office:value="25050" calcext:value-type="float">
            <text:p>2505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04:09.400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7:05:18.3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385.6" calcext:value-type="float">
            <text:p>2385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6.3" calcext:value-type="float">
            <text:p>249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20:03.800</text:p>
          </table:table-cell>
          <table:table-cell office:value-type="string" calcext:value-type="string">
            <text:p>2025-10-07 13:20:03.800</text:p>
          </table:table-cell>
          <table:table-cell office:value-type="string" calcext:value-type="string">
            <text:p>SHORT</text:p>
          </table:table-cell>
          <table:table-cell office:value-type="float" office:value="25043.5" calcext:value-type="float">
            <text:p>25043.5</text:p>
          </table:table-cell>
          <table:table-cell office:value-type="float" office:value="25033.5" calcext:value-type="float">
            <text:p>25033.5</text:p>
          </table:table-cell>
          <table:table-cell office:value-type="float" office:value="25048.5" calcext:value-type="float">
            <text:p>2504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20:04.600</text:p>
          </table:table-cell>
          <table:table-cell office:value-type="float" office:value="90" calcext:value-type="float">
            <text:p>90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574.9" calcext:value-type="float">
            <text:p>2574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5.6" calcext:value-type="float">
            <text:p>268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21:15.800</text:p>
          </table:table-cell>
          <table:table-cell office:value-type="string" calcext:value-type="string">
            <text:p>2025-10-07 13:21:15.800</text:p>
          </table:table-cell>
          <table:table-cell office:value-type="string" calcext:value-type="string">
            <text:p>LONG</text:p>
          </table:table-cell>
          <table:table-cell office:value-type="float" office:value="25047" calcext:value-type="float">
            <text:p>25047</text:p>
          </table:table-cell>
          <table:table-cell office:value-type="float" office:value="25057" calcext:value-type="float">
            <text:p>25057</text:p>
          </table:table-cell>
          <table:table-cell office:value-type="float" office:value="25042" calcext:value-type="float">
            <text:p>2504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21:20.10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7:23:44.1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764.2" calcext:value-type="float">
            <text:p>27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4.9" calcext:value-type="float">
            <text:p>287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24:08.700</text:p>
          </table:table-cell>
          <table:table-cell office:value-type="string" calcext:value-type="string">
            <text:p>2025-10-07 13:24:08.700</text:p>
          </table:table-cell>
          <table:table-cell office:value-type="string" calcext:value-type="string">
            <text:p>LONG</text:p>
          </table:table-cell>
          <table:table-cell office:value-type="float" office:value="25064" calcext:value-type="float">
            <text:p>25064</text:p>
          </table:table-cell>
          <table:table-cell office:value-type="float" office:value="25074" calcext:value-type="float">
            <text:p>25074</text:p>
          </table:table-cell>
          <table:table-cell office:value-type="float" office:value="25059" calcext:value-type="float">
            <text:p>2505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24:10.00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953.5" calcext:value-type="float">
            <text:p>295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64.2" calcext:value-type="float">
            <text:p>306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26:14.700</text:p>
          </table:table-cell>
          <table:table-cell office:value-type="string" calcext:value-type="string">
            <text:p>2025-10-07 13:26:14.700</text:p>
          </table:table-cell>
          <table:table-cell office:value-type="string" calcext:value-type="string">
            <text:p>SHORT</text:p>
          </table:table-cell>
          <table:table-cell office:value-type="float" office:value="25044.75" calcext:value-type="float">
            <text:p>25044.75</text:p>
          </table:table-cell>
          <table:table-cell office:value-type="float" office:value="25034.75" calcext:value-type="float">
            <text:p>25034.75</text:p>
          </table:table-cell>
          <table:table-cell office:value-type="float" office:value="25049.75" calcext:value-type="float">
            <text:p>2504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26:15.70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7:28:21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32.8" calcext:value-type="float">
            <text:p>2832.8</text:p>
          </table:table-cell>
          <table:table-cell office:value-type="float" office:value="1" calcext:value-type="float">
            <text:p>1</text:p>
          </table:table-cell>
          <table:table-cell office:value-type="float" office:value="2943.5" calcext:value-type="float">
            <text:p>2943.5</text:p>
          </table:table-cell>
          <table:table-cell office:value-type="float" office:value="3064.2" calcext:value-type="float">
            <text:p>3064.2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31:47.300</text:p>
          </table:table-cell>
          <table:table-cell office:value-type="string" calcext:value-type="string">
            <text:p>2025-10-07 13:31:47.300</text:p>
          </table:table-cell>
          <table:table-cell office:value-type="string" calcext:value-type="string">
            <text:p>LONG</text:p>
          </table:table-cell>
          <table:table-cell office:value-type="float" office:value="25042" calcext:value-type="float">
            <text:p>25042</text:p>
          </table:table-cell>
          <table:table-cell office:value-type="float" office:value="25052" calcext:value-type="float">
            <text:p>25052</text:p>
          </table:table-cell>
          <table:table-cell office:value-type="float" office:value="25037" calcext:value-type="float">
            <text:p>2503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31:47.80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22.1" calcext:value-type="float">
            <text:p>302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32.8" calcext:value-type="float">
            <text:p>31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36:13.600</text:p>
          </table:table-cell>
          <table:table-cell office:value-type="string" calcext:value-type="string">
            <text:p>2025-10-07 13:36:13.600</text:p>
          </table:table-cell>
          <table:table-cell office:value-type="string" calcext:value-type="string">
            <text:p>SHORT</text:p>
          </table:table-cell>
          <table:table-cell office:value-type="float" office:value="25033" calcext:value-type="float">
            <text:p>25033</text:p>
          </table:table-cell>
          <table:table-cell office:value-type="float" office:value="25023" calcext:value-type="float">
            <text:p>25023</text:p>
          </table:table-cell>
          <table:table-cell office:value-type="float" office:value="25038" calcext:value-type="float">
            <text:p>2503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36:14.6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06.4" calcext:value-type="float">
            <text:p>3206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7.1" calcext:value-type="float">
            <text:p>33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37:23.800</text:p>
          </table:table-cell>
          <table:table-cell office:value-type="string" calcext:value-type="string">
            <text:p>2025-10-07 13:37:23.800</text:p>
          </table:table-cell>
          <table:table-cell office:value-type="string" calcext:value-type="string">
            <text:p>SHORT</text:p>
          </table:table-cell>
          <table:table-cell office:value-type="float" office:value="25033.25" calcext:value-type="float">
            <text:p>25033.25</text:p>
          </table:table-cell>
          <table:table-cell office:value-type="float" office:value="25023.25" calcext:value-type="float">
            <text:p>25023.25</text:p>
          </table:table-cell>
          <table:table-cell office:value-type="float" office:value="25038.25" calcext:value-type="float">
            <text:p>2503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37:24.800</text:p>
          </table:table-cell>
          <table:table-cell office:value-type="float" office:value="114" calcext:value-type="float">
            <text:p>11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385.7" calcext:value-type="float">
            <text:p>3385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96.4" calcext:value-type="float">
            <text:p>349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37:53.400</text:p>
          </table:table-cell>
          <table:table-cell office:value-type="string" calcext:value-type="string">
            <text:p>2025-10-07 13:37:53.400</text:p>
          </table:table-cell>
          <table:table-cell office:value-type="string" calcext:value-type="string">
            <text:p>SHORT</text:p>
          </table:table-cell>
          <table:table-cell office:value-type="float" office:value="25030.75" calcext:value-type="float">
            <text:p>25030.75</text:p>
          </table:table-cell>
          <table:table-cell office:value-type="float" office:value="25020.75" calcext:value-type="float">
            <text:p>25020.75</text:p>
          </table:table-cell>
          <table:table-cell office:value-type="float" office:value="25035.75" calcext:value-type="float">
            <text:p>2503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37:57.2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85.7" calcext:value-type="float">
            <text:p>36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37:57.800</text:p>
          </table:table-cell>
          <table:table-cell office:value-type="string" calcext:value-type="string">
            <text:p>2025-10-07 13:37:57.800</text:p>
          </table:table-cell>
          <table:table-cell office:value-type="string" calcext:value-type="string">
            <text:p>SHORT</text:p>
          </table:table-cell>
          <table:table-cell office:value-type="float" office:value="25029.5" calcext:value-type="float">
            <text:p>25029.5</text:p>
          </table:table-cell>
          <table:table-cell office:value-type="float" office:value="25019.5" calcext:value-type="float">
            <text:p>25019.5</text:p>
          </table:table-cell>
          <table:table-cell office:value-type="float" office:value="25034.5" calcext:value-type="float">
            <text:p>2503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38:00.400</text:p>
          </table:table-cell>
          <table:table-cell office:value-type="float" office:value="138" calcext:value-type="float">
            <text:p>13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764.3" calcext:value-type="float">
            <text:p>3764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41:31.700</text:p>
          </table:table-cell>
          <table:table-cell office:value-type="string" calcext:value-type="string">
            <text:p>2025-10-07 13:41:31.700</text:p>
          </table:table-cell>
          <table:table-cell office:value-type="string" calcext:value-type="string">
            <text:p>SHORT</text:p>
          </table:table-cell>
          <table:table-cell office:value-type="float" office:value="25027.25" calcext:value-type="float">
            <text:p>25027.25</text:p>
          </table:table-cell>
          <table:table-cell office:value-type="float" office:value="25017.25" calcext:value-type="float">
            <text:p>25017.25</text:p>
          </table:table-cell>
          <table:table-cell office:value-type="float" office:value="25032.25" calcext:value-type="float">
            <text:p>2503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41:32.700</text:p>
          </table:table-cell>
          <table:table-cell office:value-type="float" office:value="69" calcext:value-type="float">
            <text:p>69</text:p>
          </table:table-cell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948.6" calcext:value-type="float">
            <text:p>394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59.3" calcext:value-type="float">
            <text:p>405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43:35.700</text:p>
          </table:table-cell>
          <table:table-cell office:value-type="string" calcext:value-type="string">
            <text:p>2025-10-07 13:43:35.700</text:p>
          </table:table-cell>
          <table:table-cell office:value-type="string" calcext:value-type="string">
            <text:p>SHORT</text:p>
          </table:table-cell>
          <table:table-cell office:value-type="float" office:value="25036.75" calcext:value-type="float">
            <text:p>25036.75</text:p>
          </table:table-cell>
          <table:table-cell office:value-type="float" office:value="25026.75" calcext:value-type="float">
            <text:p>25026.75</text:p>
          </table:table-cell>
          <table:table-cell office:value-type="float" office:value="25041.75" calcext:value-type="float">
            <text:p>2504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43:36.7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7:44:34.6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27.9" calcext:value-type="float">
            <text:p>3827.9</text:p>
          </table:table-cell>
          <table:table-cell office:value-type="float" office:value="1" calcext:value-type="float">
            <text:p>1</text:p>
          </table:table-cell>
          <table:table-cell office:value-type="float" office:value="3938.6" calcext:value-type="float">
            <text:p>3938.6</text:p>
          </table:table-cell>
          <table:table-cell office:value-type="float" office:value="4059.3" calcext:value-type="float">
            <text:p>4059.3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45:29.100</text:p>
          </table:table-cell>
          <table:table-cell office:value-type="string" calcext:value-type="string">
            <text:p>2025-10-07 13:45:29.100</text:p>
          </table:table-cell>
          <table:table-cell office:value-type="string" calcext:value-type="string">
            <text:p>SHORT</text:p>
          </table:table-cell>
          <table:table-cell office:value-type="float" office:value="25041.75" calcext:value-type="float">
            <text:p>25041.75</text:p>
          </table:table-cell>
          <table:table-cell office:value-type="float" office:value="25031.75" calcext:value-type="float">
            <text:p>25031.75</text:p>
          </table:table-cell>
          <table:table-cell office:value-type="float" office:value="25046.75" calcext:value-type="float">
            <text:p>2504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7:45:30.100</text:p>
          </table:table-cell>
          <table:table-cell office:value-type="float" office:value="191" calcext:value-type="float">
            <text:p>191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7:46:02.3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707.2" calcext:value-type="float">
            <text:p>3707.2</text:p>
          </table:table-cell>
          <table:table-cell office:value-type="float" office:value="2" calcext:value-type="float">
            <text:p>2</text:p>
          </table:table-cell>
          <table:table-cell office:value-type="float" office:value="3817.9" calcext:value-type="float">
            <text:p>3817.9</text:p>
          </table:table-cell>
          <table:table-cell office:value-type="float" office:value="4059.3" calcext:value-type="float">
            <text:p>4059.3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7:52:11.000</text:p>
          </table:table-cell>
          <table:table-cell office:value-type="string" calcext:value-type="string">
            <text:p>2025-10-07 13:52:11.000</text:p>
          </table:table-cell>
          <table:table-cell office:value-type="string" calcext:value-type="string">
            <text:p>SHORT</text:p>
          </table:table-cell>
          <table:table-cell office:value-type="float" office:value="25024.5" calcext:value-type="float">
            <text:p>25024.5</text:p>
          </table:table-cell>
          <table:table-cell office:value-type="float" office:value="25014.5" calcext:value-type="float">
            <text:p>25014.5</text:p>
          </table:table-cell>
          <table:table-cell office:value-type="float" office:value="25029.5" calcext:value-type="float">
            <text:p>2502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7:52:14.100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596.5" calcext:value-type="float">
            <text:p>3596.5</text:p>
          </table:table-cell>
          <table:table-cell office:value-type="float" office:value="3" calcext:value-type="float">
            <text:p>3</text:p>
          </table:table-cell>
          <table:table-cell office:value-type="float" office:value="3707.2" calcext:value-type="float">
            <text:p>3707.2</text:p>
          </table:table-cell>
          <table:table-cell office:value-type="float" office:value="4059.3" calcext:value-type="float">
            <text:p>4059.3</text:p>
          </table:table-cell>
          <table:table-cell office:value-type="float" office:value="-352.099999999999" calcext:value-type="float">
            <text:p>-352.0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2:18.600</text:p>
          </table:table-cell>
          <table:table-cell office:value-type="string" calcext:value-type="string">
            <text:p>2025-10-07 14:12:18.600</text:p>
          </table:table-cell>
          <table:table-cell office:value-type="string" calcext:value-type="string">
            <text:p>SHORT</text:p>
          </table:table-cell>
          <table:table-cell office:value-type="float" office:value="25032.5" calcext:value-type="float">
            <text:p>25032.5</text:p>
          </table:table-cell>
          <table:table-cell office:value-type="float" office:value="25022.5" calcext:value-type="float">
            <text:p>25022.5</text:p>
          </table:table-cell>
          <table:table-cell office:value-type="float" office:value="25037.5" calcext:value-type="float">
            <text:p>2503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8:12:19.6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71.6" calcext:value-type="float">
            <text:p>3071.6</text:p>
          </table:table-cell>
          <table:table-cell office:value-type="float" office:value="0" calcext:value-type="float">
            <text:p>0</text:p>
          </table:table-cell>
          <table:table-cell office:value-type="float" office:value="3891.5" calcext:value-type="float">
            <text:p>3891.5</text:p>
          </table:table-cell>
          <table:table-cell office:value-type="float" office:value="4059.3" calcext:value-type="float">
            <text:p>4059.3</text:p>
          </table:table-cell>
          <table:table-cell office:value-type="float" office:value="-167.799999999999" calcext:value-type="float">
            <text:p>-167.7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2:56.300</text:p>
          </table:table-cell>
          <table:table-cell office:value-type="string" calcext:value-type="string">
            <text:p>2025-10-07 14:12:56.300</text:p>
          </table:table-cell>
          <table:table-cell office:value-type="string" calcext:value-type="string">
            <text:p>SHORT</text:p>
          </table:table-cell>
          <table:table-cell office:value-type="float" office:value="25040" calcext:value-type="float">
            <text:p>25040</text:p>
          </table:table-cell>
          <table:table-cell office:value-type="float" office:value="25030" calcext:value-type="float">
            <text:p>25030</text:p>
          </table:table-cell>
          <table:table-cell office:value-type="float" office:value="25045" calcext:value-type="float">
            <text:p>2504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8:13:00.100</text:p>
          </table:table-cell>
          <table:table-cell office:value-type="float" office:value="123" calcext:value-type="float">
            <text:p>123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8:13:39.2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960.9" calcext:value-type="float">
            <text:p>2960.9</text:p>
          </table:table-cell>
          <table:table-cell office:value-type="float" office:value="1" calcext:value-type="float">
            <text:p>1</text:p>
          </table:table-cell>
          <table:table-cell office:value-type="float" office:value="3780.8" calcext:value-type="float">
            <text:p>3780.8</text:p>
          </table:table-cell>
          <table:table-cell office:value-type="float" office:value="4059.3" calcext:value-type="float">
            <text:p>4059.3</text:p>
          </table:table-cell>
          <table:table-cell office:value-type="float" office:value="-278.499999999999" calcext:value-type="float">
            <text:p>-278.4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3:41.400</text:p>
          </table:table-cell>
          <table:table-cell office:value-type="string" calcext:value-type="string">
            <text:p>2025-10-07 14:13:41.400</text:p>
          </table:table-cell>
          <table:table-cell office:value-type="string" calcext:value-type="string">
            <text:p>SHORT</text:p>
          </table:table-cell>
          <table:table-cell office:value-type="float" office:value="25046.5" calcext:value-type="float">
            <text:p>25046.5</text:p>
          </table:table-cell>
          <table:table-cell office:value-type="float" office:value="25036.5" calcext:value-type="float">
            <text:p>25036.5</text:p>
          </table:table-cell>
          <table:table-cell office:value-type="float" office:value="25051.5" calcext:value-type="float">
            <text:p>2505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8:13:46.100</text:p>
          </table:table-cell>
          <table:table-cell office:value-type="float" office:value="195" calcext:value-type="float">
            <text:p>195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50.2" calcext:value-type="float">
            <text:p>2850.2</text:p>
          </table:table-cell>
          <table:table-cell office:value-type="float" office:value="2" calcext:value-type="float">
            <text:p>2</text:p>
          </table:table-cell>
          <table:table-cell office:value-type="float" office:value="3670.1" calcext:value-type="float">
            <text:p>3670.1</text:p>
          </table:table-cell>
          <table:table-cell office:value-type="float" office:value="4059.3" calcext:value-type="float">
            <text:p>4059.3</text:p>
          </table:table-cell>
          <table:table-cell office:value-type="float" office:value="-389.199999999999" calcext:value-type="float">
            <text:p>-389.1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4:19.400</text:p>
          </table:table-cell>
          <table:table-cell office:value-type="string" calcext:value-type="string">
            <text:p>2025-10-07 14:14:19.400</text:p>
          </table:table-cell>
          <table:table-cell office:value-type="string" calcext:value-type="string">
            <text:p>SHORT</text:p>
          </table:table-cell>
          <table:table-cell office:value-type="float" office:value="25047.5" calcext:value-type="float">
            <text:p>25047.5</text:p>
          </table:table-cell>
          <table:table-cell office:value-type="float" office:value="25037.5" calcext:value-type="float">
            <text:p>25037.5</text:p>
          </table:table-cell>
          <table:table-cell office:value-type="float" office:value="25052.5" calcext:value-type="float">
            <text:p>2505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8:14:20.000</text:p>
          </table:table-cell>
          <table:table-cell office:value-type="float" office:value="222" calcext:value-type="float">
            <text:p>222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739.5" calcext:value-type="float">
            <text:p>2739.5</text:p>
          </table:table-cell>
          <table:table-cell office:value-type="float" office:value="3" calcext:value-type="float">
            <text:p>3</text:p>
          </table:table-cell>
          <table:table-cell office:value-type="float" office:value="3559.4" calcext:value-type="float">
            <text:p>3559.4</text:p>
          </table:table-cell>
          <table:table-cell office:value-type="float" office:value="4059.3" calcext:value-type="float">
            <text:p>4059.3</text:p>
          </table:table-cell>
          <table:table-cell office:value-type="float" office:value="-499.899999999999" calcext:value-type="float">
            <text:p>-499.8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6:32.400</text:p>
          </table:table-cell>
          <table:table-cell office:value-type="string" calcext:value-type="string">
            <text:p>2025-10-07 14:16:32.400</text:p>
          </table:table-cell>
          <table:table-cell office:value-type="string" calcext:value-type="string">
            <text:p>SHORT</text:p>
          </table:table-cell>
          <table:table-cell office:value-type="float" office:value="25038.75" calcext:value-type="float">
            <text:p>25038.75</text:p>
          </table:table-cell>
          <table:table-cell office:value-type="float" office:value="25028.75" calcext:value-type="float">
            <text:p>25028.75</text:p>
          </table:table-cell>
          <table:table-cell office:value-type="float" office:value="25043.75" calcext:value-type="float">
            <text:p>25043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8:16:36.000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8:17:59.8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97.4" calcext:value-type="float">
            <text:p>2697.4</text:p>
          </table:table-cell>
          <table:table-cell office:value-type="float" office:value="0" calcext:value-type="float">
            <text:p>0</text:p>
          </table:table-cell>
          <table:table-cell office:value-type="float" office:value="3748.7" calcext:value-type="float">
            <text:p>3748.7</text:p>
          </table:table-cell>
          <table:table-cell office:value-type="float" office:value="4059.3" calcext:value-type="float">
            <text:p>4059.3</text:p>
          </table:table-cell>
          <table:table-cell office:value-type="float" office:value="-310.599999999999" calcext:value-type="float">
            <text:p>-310.5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9:21.600</text:p>
          </table:table-cell>
          <table:table-cell office:value-type="string" calcext:value-type="string">
            <text:p>2025-10-07 14:19:21.600</text:p>
          </table:table-cell>
          <table:table-cell office:value-type="string" calcext:value-type="string">
            <text:p>SHORT</text:p>
          </table:table-cell>
          <table:table-cell office:value-type="float" office:value="25032" calcext:value-type="float">
            <text:p>25032</text:p>
          </table:table-cell>
          <table:table-cell office:value-type="float" office:value="25022" calcext:value-type="float">
            <text:p>25022</text:p>
          </table:table-cell>
          <table:table-cell office:value-type="float" office:value="25037" calcext:value-type="float">
            <text:p>2503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8:19:22.6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76.7" calcext:value-type="float">
            <text:p>2876.7</text:p>
          </table:table-cell>
          <table:table-cell office:value-type="float" office:value="0" calcext:value-type="float">
            <text:p>0</text:p>
          </table:table-cell>
          <table:table-cell office:value-type="float" office:value="3928" calcext:value-type="float">
            <text:p>3928</text:p>
          </table:table-cell>
          <table:table-cell office:value-type="float" office:value="4059.3" calcext:value-type="float">
            <text:p>4059.3</text:p>
          </table:table-cell>
          <table:table-cell office:value-type="float" office:value="-131.299999999998" calcext:value-type="float">
            <text:p>-131.299999999998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19:26.900</text:p>
          </table:table-cell>
          <table:table-cell office:value-type="string" calcext:value-type="string">
            <text:p>2025-10-07 14:19:26.900</text:p>
          </table:table-cell>
          <table:table-cell office:value-type="string" calcext:value-type="string">
            <text:p>SHORT</text:p>
          </table:table-cell>
          <table:table-cell office:value-type="float" office:value="25032.5" calcext:value-type="float">
            <text:p>25032.5</text:p>
          </table:table-cell>
          <table:table-cell office:value-type="float" office:value="25022.5" calcext:value-type="float">
            <text:p>25022.5</text:p>
          </table:table-cell>
          <table:table-cell office:value-type="float" office:value="25037.5" calcext:value-type="float">
            <text:p>2503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8:19:31.500</text:p>
          </table:table-cell>
          <table:table-cell office:value-type="float" office:value="128" calcext:value-type="float">
            <text:p>12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7.3" calcext:value-type="float">
            <text:p>41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21:48.000</text:p>
          </table:table-cell>
          <table:table-cell office:value-type="string" calcext:value-type="string">
            <text:p>2025-10-07 14:21:48.000</text:p>
          </table:table-cell>
          <table:table-cell office:value-type="string" calcext:value-type="string">
            <text:p>SHORT</text:p>
          </table:table-cell>
          <table:table-cell office:value-type="float" office:value="25042.5" calcext:value-type="float">
            <text:p>25042.5</text:p>
          </table:table-cell>
          <table:table-cell office:value-type="float" office:value="25032.5" calcext:value-type="float">
            <text:p>25032.5</text:p>
          </table:table-cell>
          <table:table-cell office:value-type="float" office:value="25047.5" calcext:value-type="float">
            <text:p>2504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8:21:49.000</text:p>
          </table:table-cell>
          <table:table-cell office:value-type="float" office:value="146" calcext:value-type="float">
            <text:p>146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945.3" calcext:value-type="float">
            <text:p>2945.3</text:p>
          </table:table-cell>
          <table:table-cell office:value-type="float" office:value="1" calcext:value-type="float">
            <text:p>1</text:p>
          </table:table-cell>
          <table:table-cell office:value-type="float" office:value="3996.6" calcext:value-type="float">
            <text:p>3996.6</text:p>
          </table:table-cell>
          <table:table-cell office:value-type="float" office:value="4117.3" calcext:value-type="float">
            <text:p>4117.3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48:11.500</text:p>
          </table:table-cell>
          <table:table-cell office:value-type="string" calcext:value-type="string">
            <text:p>2025-10-07 14:48:11.500</text:p>
          </table:table-cell>
          <table:table-cell office:value-type="string" calcext:value-type="string">
            <text:p>LONG</text:p>
          </table:table-cell>
          <table:table-cell office:value-type="float" office:value="25037.5" calcext:value-type="float">
            <text:p>25037.5</text:p>
          </table:table-cell>
          <table:table-cell office:value-type="float" office:value="25047.5" calcext:value-type="float">
            <text:p>25047.5</text:p>
          </table:table-cell>
          <table:table-cell office:value-type="float" office:value="25032.5" calcext:value-type="float">
            <text:p>2503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8:48:12.500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24.60000000001" calcext:value-type="float">
            <text:p>2824.60000000001</text:p>
          </table:table-cell>
          <table:table-cell office:value-type="float" office:value="2" calcext:value-type="float">
            <text:p>2</text:p>
          </table:table-cell>
          <table:table-cell office:value-type="float" office:value="3875.9" calcext:value-type="float">
            <text:p>3875.9</text:p>
          </table:table-cell>
          <table:table-cell office:value-type="float" office:value="4117.3" calcext:value-type="float">
            <text:p>4117.3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8:56:51.100</text:p>
          </table:table-cell>
          <table:table-cell office:value-type="string" calcext:value-type="string">
            <text:p>2025-10-07 14:56:51.100</text:p>
          </table:table-cell>
          <table:table-cell office:value-type="string" calcext:value-type="string">
            <text:p>SHORT</text:p>
          </table:table-cell>
          <table:table-cell office:value-type="float" office:value="25045.75" calcext:value-type="float">
            <text:p>25045.75</text:p>
          </table:table-cell>
          <table:table-cell office:value-type="float" office:value="25035.75" calcext:value-type="float">
            <text:p>25035.75</text:p>
          </table:table-cell>
          <table:table-cell office:value-type="float" office:value="25050.75" calcext:value-type="float">
            <text:p>2505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8:56:52.100</text:p>
          </table:table-cell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08.90000000001" calcext:value-type="float">
            <text:p>3008.90000000001</text:p>
          </table:table-cell>
          <table:table-cell office:value-type="float" office:value="0" calcext:value-type="float">
            <text:p>0</text:p>
          </table:table-cell>
          <table:table-cell office:value-type="float" office:value="4060.2" calcext:value-type="float">
            <text:p>4060.2</text:p>
          </table:table-cell>
          <table:table-cell office:value-type="float" office:value="4117.3" calcext:value-type="float">
            <text:p>4117.3</text:p>
          </table:table-cell>
          <table:table-cell office:value-type="float" office:value="-57.0999999999995" calcext:value-type="float">
            <text:p>-57.0999999999995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00:14.300</text:p>
          </table:table-cell>
          <table:table-cell office:value-type="string" calcext:value-type="string">
            <text:p>2025-10-07 15:00:14.300</text:p>
          </table:table-cell>
          <table:table-cell office:value-type="string" calcext:value-type="string">
            <text:p>SHORT</text:p>
          </table:table-cell>
          <table:table-cell office:value-type="float" office:value="25054.25" calcext:value-type="float">
            <text:p>25054.25</text:p>
          </table:table-cell>
          <table:table-cell office:value-type="float" office:value="25044.25" calcext:value-type="float">
            <text:p>25044.25</text:p>
          </table:table-cell>
          <table:table-cell office:value-type="float" office:value="25059.25" calcext:value-type="float">
            <text:p>2505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00:17.000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98.20000000001" calcext:value-type="float">
            <text:p>2898.20000000001</text:p>
          </table:table-cell>
          <table:table-cell office:value-type="float" office:value="1" calcext:value-type="float">
            <text:p>1</text:p>
          </table:table-cell>
          <table:table-cell office:value-type="float" office:value="3949.5" calcext:value-type="float">
            <text:p>3949.5</text:p>
          </table:table-cell>
          <table:table-cell office:value-type="float" office:value="4117.3" calcext:value-type="float">
            <text:p>4117.3</text:p>
          </table:table-cell>
          <table:table-cell office:value-type="float" office:value="-167.799999999999" calcext:value-type="float">
            <text:p>-167.7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00:53.200</text:p>
          </table:table-cell>
          <table:table-cell office:value-type="string" calcext:value-type="string">
            <text:p>2025-10-07 15:00:53.200</text:p>
          </table:table-cell>
          <table:table-cell office:value-type="string" calcext:value-type="string">
            <text:p>LONG</text:p>
          </table:table-cell>
          <table:table-cell office:value-type="float" office:value="25053" calcext:value-type="float">
            <text:p>25053</text:p>
          </table:table-cell>
          <table:table-cell office:value-type="float" office:value="25063" calcext:value-type="float">
            <text:p>25063</text:p>
          </table:table-cell>
          <table:table-cell office:value-type="float" office:value="25048" calcext:value-type="float">
            <text:p>2504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00:54.20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82.50000000001" calcext:value-type="float">
            <text:p>3082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33.8" calcext:value-type="float">
            <text:p>41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04:28.600</text:p>
          </table:table-cell>
          <table:table-cell office:value-type="string" calcext:value-type="string">
            <text:p>2025-10-07 15:04:28.600</text:p>
          </table:table-cell>
          <table:table-cell office:value-type="string" calcext:value-type="string">
            <text:p>SHORT</text:p>
          </table:table-cell>
          <table:table-cell office:value-type="float" office:value="25044.25" calcext:value-type="float">
            <text:p>25044.25</text:p>
          </table:table-cell>
          <table:table-cell office:value-type="float" office:value="25034.25" calcext:value-type="float">
            <text:p>25034.25</text:p>
          </table:table-cell>
          <table:table-cell office:value-type="float" office:value="25049.25" calcext:value-type="float">
            <text:p>25049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04:29.600</text:p>
          </table:table-cell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961.80000000001" calcext:value-type="float">
            <text:p>2961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4013.1" calcext:value-type="float">
            <text:p>4013.1</text:p>
          </table:table-cell>
          <table:table-cell office:value-type="float" office:value="4133.8" calcext:value-type="float">
            <text:p>4133.8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04:59.900</text:p>
          </table:table-cell>
          <table:table-cell office:value-type="string" calcext:value-type="string">
            <text:p>2025-10-07 15:04:59.900</text:p>
          </table:table-cell>
          <table:table-cell office:value-type="string" calcext:value-type="string">
            <text:p>LONG</text:p>
          </table:table-cell>
          <table:table-cell office:value-type="float" office:value="25045.5" calcext:value-type="float">
            <text:p>25045.5</text:p>
          </table:table-cell>
          <table:table-cell office:value-type="float" office:value="25055.5" calcext:value-type="float">
            <text:p>25055.5</text:p>
          </table:table-cell>
          <table:table-cell office:value-type="float" office:value="25040.5" calcext:value-type="float">
            <text:p>2504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05:00.900</text:p>
          </table:table-cell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146.10000000001" calcext:value-type="float">
            <text:p>3146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7.4" calcext:value-type="float">
            <text:p>419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05:13.900</text:p>
          </table:table-cell>
          <table:table-cell office:value-type="string" calcext:value-type="string">
            <text:p>2025-10-07 15:05:13.900</text:p>
          </table:table-cell>
          <table:table-cell office:value-type="string" calcext:value-type="string">
            <text:p>SHORT</text:p>
          </table:table-cell>
          <table:table-cell office:value-type="float" office:value="25045.75" calcext:value-type="float">
            <text:p>25045.75</text:p>
          </table:table-cell>
          <table:table-cell office:value-type="float" office:value="25035.75" calcext:value-type="float">
            <text:p>25035.75</text:p>
          </table:table-cell>
          <table:table-cell office:value-type="float" office:value="25050.75" calcext:value-type="float">
            <text:p>2505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05:14.90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25.40000000001" calcext:value-type="float">
            <text:p>3025.40000000001</text:p>
          </table:table-cell>
          <table:table-cell office:value-type="float" office:value="1" calcext:value-type="float">
            <text:p>1</text:p>
          </table:table-cell>
          <table:table-cell office:value-type="float" office:value="4076.7" calcext:value-type="float">
            <text:p>4076.7</text:p>
          </table:table-cell>
          <table:table-cell office:value-type="float" office:value="4197.4" calcext:value-type="float">
            <text:p>4197.4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09:50.100</text:p>
          </table:table-cell>
          <table:table-cell office:value-type="string" calcext:value-type="string">
            <text:p>2025-10-07 15:09:50.100</text:p>
          </table:table-cell>
          <table:table-cell office:value-type="string" calcext:value-type="string">
            <text:p>SHORT</text:p>
          </table:table-cell>
          <table:table-cell office:value-type="float" office:value="25041.5" calcext:value-type="float">
            <text:p>25041.5</text:p>
          </table:table-cell>
          <table:table-cell office:value-type="float" office:value="25031.5" calcext:value-type="float">
            <text:p>25031.5</text:p>
          </table:table-cell>
          <table:table-cell office:value-type="float" office:value="25046.5" calcext:value-type="float">
            <text:p>2504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09:51.10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04.70000000001" calcext:value-type="float">
            <text:p>3204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56.00000000001" calcext:value-type="float">
            <text:p>4256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10:21.000</text:p>
          </table:table-cell>
          <table:table-cell office:value-type="string" calcext:value-type="string">
            <text:p>2025-10-07 15:10:21.000</text:p>
          </table:table-cell>
          <table:table-cell office:value-type="string" calcext:value-type="string">
            <text:p>SHORT</text:p>
          </table:table-cell>
          <table:table-cell office:value-type="float" office:value="25037.25" calcext:value-type="float">
            <text:p>25037.25</text:p>
          </table:table-cell>
          <table:table-cell office:value-type="float" office:value="25027.25" calcext:value-type="float">
            <text:p>25027.25</text:p>
          </table:table-cell>
          <table:table-cell office:value-type="float" office:value="25042.25" calcext:value-type="float">
            <text:p>2504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10:22.000</text:p>
          </table:table-cell>
          <table:table-cell office:value-type="float" office:value="154" calcext:value-type="float">
            <text:p>154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384.00000000001" calcext:value-type="float">
            <text:p>3384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35.30000000001" calcext:value-type="float">
            <text:p>4435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27:09.400</text:p>
          </table:table-cell>
          <table:table-cell office:value-type="string" calcext:value-type="string">
            <text:p>2025-10-07 15:27:09.400</text:p>
          </table:table-cell>
          <table:table-cell office:value-type="string" calcext:value-type="string">
            <text:p>SHORT</text:p>
          </table:table-cell>
          <table:table-cell office:value-type="float" office:value="25038" calcext:value-type="float">
            <text:p>25038</text:p>
          </table:table-cell>
          <table:table-cell office:value-type="float" office:value="25028" calcext:value-type="float">
            <text:p>25028</text:p>
          </table:table-cell>
          <table:table-cell office:value-type="float" office:value="25043" calcext:value-type="float">
            <text:p>2504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27:14.300</text:p>
          </table:table-cell>
          <table:table-cell office:value-type="float" office:value="111" calcext:value-type="float">
            <text:p>111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573.30000000001" calcext:value-type="float">
            <text:p>3573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24.60000000001" calcext:value-type="float">
            <text:p>4624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35:49.000</text:p>
          </table:table-cell>
          <table:table-cell office:value-type="string" calcext:value-type="string">
            <text:p>2025-10-07 15:35:49.000</text:p>
          </table:table-cell>
          <table:table-cell office:value-type="string" calcext:value-type="string">
            <text:p>SHORT</text:p>
          </table:table-cell>
          <table:table-cell office:value-type="float" office:value="25042.5" calcext:value-type="float">
            <text:p>25042.5</text:p>
          </table:table-cell>
          <table:table-cell office:value-type="float" office:value="25032.5" calcext:value-type="float">
            <text:p>25032.5</text:p>
          </table:table-cell>
          <table:table-cell office:value-type="float" office:value="25047.5" calcext:value-type="float">
            <text:p>2504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35:51.700</text:p>
          </table:table-cell>
          <table:table-cell office:value-type="float" office:value="84" calcext:value-type="float">
            <text:p>84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762.60000000001" calcext:value-type="float">
            <text:p>3762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13.90000000001" calcext:value-type="float">
            <text:p>4813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42:01.300</text:p>
          </table:table-cell>
          <table:table-cell office:value-type="string" calcext:value-type="string">
            <text:p>2025-10-07 15:42:01.300</text:p>
          </table:table-cell>
          <table:table-cell office:value-type="string" calcext:value-type="string">
            <text:p>LONG</text:p>
          </table:table-cell>
          <table:table-cell office:value-type="float" office:value="25056.25" calcext:value-type="float">
            <text:p>25056.25</text:p>
          </table:table-cell>
          <table:table-cell office:value-type="float" office:value="25066.25" calcext:value-type="float">
            <text:p>25066.25</text:p>
          </table:table-cell>
          <table:table-cell office:value-type="float" office:value="25051.25" calcext:value-type="float">
            <text:p>2505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42:03.20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651.90000000001" calcext:value-type="float">
            <text:p>3651.90000000001</text:p>
          </table:table-cell>
          <table:table-cell office:value-type="float" office:value="1" calcext:value-type="float">
            <text:p>1</text:p>
          </table:table-cell>
          <table:table-cell office:value-type="float" office:value="4703.20000000001" calcext:value-type="float">
            <text:p>4703.20000000001</text:p>
          </table:table-cell>
          <table:table-cell office:value-type="float" office:value="4813.90000000001" calcext:value-type="float">
            <text:p>4813.9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48:32.800</text:p>
          </table:table-cell>
          <table:table-cell office:value-type="string" calcext:value-type="string">
            <text:p>2025-10-07 15:48:32.800</text:p>
          </table:table-cell>
          <table:table-cell office:value-type="string" calcext:value-type="string">
            <text:p>SHORT</text:p>
          </table:table-cell>
          <table:table-cell office:value-type="float" office:value="25056.75" calcext:value-type="float">
            <text:p>25056.75</text:p>
          </table:table-cell>
          <table:table-cell office:value-type="float" office:value="25046.75" calcext:value-type="float">
            <text:p>25046.75</text:p>
          </table:table-cell>
          <table:table-cell office:value-type="float" office:value="25061.75" calcext:value-type="float">
            <text:p>2506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48:33.400</text:p>
          </table:table-cell>
          <table:table-cell office:value-type="float" office:value="169" calcext:value-type="float">
            <text:p>169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9:48:55.1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541.20000000001" calcext:value-type="float">
            <text:p>3541.20000000001</text:p>
          </table:table-cell>
          <table:table-cell office:value-type="float" office:value="2" calcext:value-type="float">
            <text:p>2</text:p>
          </table:table-cell>
          <table:table-cell office:value-type="float" office:value="4592.50000000001" calcext:value-type="float">
            <text:p>4592.50000000001</text:p>
          </table:table-cell>
          <table:table-cell office:value-type="float" office:value="4813.90000000001" calcext:value-type="float">
            <text:p>4813.9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50:40.300</text:p>
          </table:table-cell>
          <table:table-cell office:value-type="string" calcext:value-type="string">
            <text:p>2025-10-07 15:50:40.300</text:p>
          </table:table-cell>
          <table:table-cell office:value-type="string" calcext:value-type="string">
            <text:p>SHORT</text:p>
          </table:table-cell>
          <table:table-cell office:value-type="float" office:value="25058" calcext:value-type="float">
            <text:p>25058</text:p>
          </table:table-cell>
          <table:table-cell office:value-type="float" office:value="25048" calcext:value-type="float">
            <text:p>25048</text:p>
          </table:table-cell>
          <table:table-cell office:value-type="float" office:value="25063" calcext:value-type="float">
            <text:p>2506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7 19:50:41.30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9:50:56.6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425.50000000001" calcext:value-type="float">
            <text:p>3425.50000000001</text:p>
          </table:table-cell>
          <table:table-cell office:value-type="float" office:value="3" calcext:value-type="float">
            <text:p>3</text:p>
          </table:table-cell>
          <table:table-cell office:value-type="float" office:value="4476.80000000001" calcext:value-type="float">
            <text:p>4476.80000000001</text:p>
          </table:table-cell>
          <table:table-cell office:value-type="float" office:value="4813.90000000001" calcext:value-type="float">
            <text:p>4813.90000000001</text:p>
          </table:table-cell>
          <table:table-cell office:value-type="float" office:value="-337.099999999999" calcext:value-type="float">
            <text:p>-337.0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54:52.200</text:p>
          </table:table-cell>
          <table:table-cell office:value-type="string" calcext:value-type="string">
            <text:p>2025-10-07 15:54:52.200</text:p>
          </table:table-cell>
          <table:table-cell office:value-type="string" calcext:value-type="string">
            <text:p>SHORT</text:p>
          </table:table-cell>
          <table:table-cell office:value-type="float" office:value="25056.5" calcext:value-type="float">
            <text:p>25056.5</text:p>
          </table:table-cell>
          <table:table-cell office:value-type="float" office:value="25046.5" calcext:value-type="float">
            <text:p>25046.5</text:p>
          </table:table-cell>
          <table:table-cell office:value-type="float" office:value="25061.5" calcext:value-type="float">
            <text:p>2506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54:53.800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7 19:57:11.5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494.10000000001" calcext:value-type="float">
            <text:p>3494.10000000001</text:p>
          </table:table-cell>
          <table:table-cell office:value-type="float" office:value="0" calcext:value-type="float">
            <text:p>0</text:p>
          </table:table-cell>
          <table:table-cell office:value-type="float" office:value="4666.10000000001" calcext:value-type="float">
            <text:p>4666.10000000001</text:p>
          </table:table-cell>
          <table:table-cell office:value-type="float" office:value="4813.90000000001" calcext:value-type="float">
            <text:p>4813.90000000001</text:p>
          </table:table-cell>
          <table:table-cell office:value-type="float" office:value="-147.799999999999" calcext:value-type="float">
            <text:p>-147.799999999999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58:22.600</text:p>
          </table:table-cell>
          <table:table-cell office:value-type="string" calcext:value-type="string">
            <text:p>2025-10-07 15:58:22.600</text:p>
          </table:table-cell>
          <table:table-cell office:value-type="string" calcext:value-type="string">
            <text:p>SHORT</text:p>
          </table:table-cell>
          <table:table-cell office:value-type="float" office:value="25036.5" calcext:value-type="float">
            <text:p>25036.5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25041.5" calcext:value-type="float">
            <text:p>2504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58:23.100</text:p>
          </table:table-cell>
          <table:table-cell office:value-type="float" office:value="161" calcext:value-type="float">
            <text:p>161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683.40000000001" calcext:value-type="float">
            <text:p>3683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55.40000000001" calcext:value-type="float">
            <text:p>4855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2025-10-07 19:58:28.600</text:p>
          </table:table-cell>
          <table:table-cell office:value-type="string" calcext:value-type="string">
            <text:p>2025-10-07 15:58:28.600</text:p>
          </table:table-cell>
          <table:table-cell office:value-type="string" calcext:value-type="string">
            <text:p>LONG</text:p>
          </table:table-cell>
          <table:table-cell office:value-type="float" office:value="25035" calcext:value-type="float">
            <text:p>25035</text:p>
          </table:table-cell>
          <table:table-cell office:value-type="float" office:value="25045" calcext:value-type="float">
            <text:p>25045</text:p>
          </table:table-cell>
          <table:table-cell office:value-type="float" office:value="25030" calcext:value-type="float">
            <text:p>2503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7 19:58:29.60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7 19:59:07.3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50.75" calcext:value-type="float">
            <text:p>25250.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572.70000000001" calcext:value-type="float">
            <text:p>3572.70000000001</text:p>
          </table:table-cell>
          <table:table-cell office:value-type="float" office:value="1" calcext:value-type="float">
            <text:p>1</text:p>
          </table:table-cell>
          <table:table-cell office:value-type="float" office:value="4744.70000000001" calcext:value-type="float">
            <text:p>4744.70000000001</text:p>
          </table:table-cell>
          <table:table-cell office:value-type="float" office:value="4855.40000000001" calcext:value-type="float">
            <text:p>4855.4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3:32:51.400</text:p>
          </table:table-cell>
          <table:table-cell office:value-type="string" calcext:value-type="string">
            <text:p>2025-10-08 09:32:51.400</text:p>
          </table:table-cell>
          <table:table-cell office:value-type="string" calcext:value-type="string">
            <text:p>LONG</text:p>
          </table:table-cell>
          <table:table-cell office:value-type="float" office:value="25122.5" calcext:value-type="float">
            <text:p>25122.5</text:p>
          </table:table-cell>
          <table:table-cell office:value-type="float" office:value="25132.5" calcext:value-type="float">
            <text:p>25132.5</text:p>
          </table:table-cell>
          <table:table-cell office:value-type="float" office:value="25117.5" calcext:value-type="float">
            <text:p>2511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3:32:51.700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8 13:33:26.4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3:58:13.900</text:p>
          </table:table-cell>
          <table:table-cell office:value-type="string" calcext:value-type="string">
            <text:p>2025-10-08 09:58:13.900</text:p>
          </table:table-cell>
          <table:table-cell office:value-type="string" calcext:value-type="string">
            <text:p>LONG</text:p>
          </table:table-cell>
          <table:table-cell office:value-type="float" office:value="25179.25" calcext:value-type="float">
            <text:p>25179.25</text:p>
          </table:table-cell>
          <table:table-cell office:value-type="float" office:value="25189.25" calcext:value-type="float">
            <text:p>25189.25</text:p>
          </table:table-cell>
          <table:table-cell office:value-type="float" office:value="25174.25" calcext:value-type="float">
            <text:p>2517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3:58:15.000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8 13:59:51.9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78.6" calcext:value-type="float">
            <text:p>78.6</text:p>
          </table:table-cell>
          <table:table-cell office:value-type="float" office:value="1" calcext:value-type="float">
            <text:p>1</text:p>
          </table:table-cell>
          <table:table-cell office:value-type="float" office:value="78.6" calcext:value-type="float">
            <text:p>78.6</text:p>
          </table:table-cell>
          <table:table-cell office:value-type="float" office:value="189.3" calcext:value-type="float">
            <text:p>189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06:33.600</text:p>
          </table:table-cell>
          <table:table-cell office:value-type="string" calcext:value-type="string">
            <text:p>2025-10-08 10:06:33.600</text:p>
          </table:table-cell>
          <table:table-cell office:value-type="string" calcext:value-type="string">
            <text:p>LONG</text:p>
          </table:table-cell>
          <table:table-cell office:value-type="float" office:value="25204.25" calcext:value-type="float">
            <text:p>25204.25</text:p>
          </table:table-cell>
          <table:table-cell office:value-type="float" office:value="25214.25" calcext:value-type="float">
            <text:p>25214.25</text:p>
          </table:table-cell>
          <table:table-cell office:value-type="float" office:value="25199.25" calcext:value-type="float">
            <text:p>2519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4:06:34.200</text:p>
          </table:table-cell>
          <table:table-cell office:value-type="float" office:value="242" calcext:value-type="float">
            <text:p>24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-32.1" calcext:value-type="float">
            <text:p>-32.1</text:p>
          </table:table-cell>
          <table:table-cell office:value-type="float" office:value="2" calcext:value-type="float">
            <text:p>2</text:p>
          </table:table-cell>
          <table:table-cell office:value-type="float" office:value="-32.1" calcext:value-type="float">
            <text:p>-32.1</text:p>
          </table:table-cell>
          <table:table-cell office:value-type="float" office:value="189.3" calcext:value-type="float">
            <text:p>189.3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17:19.600</text:p>
          </table:table-cell>
          <table:table-cell office:value-type="string" calcext:value-type="string">
            <text:p>2025-10-08 10:17:19.600</text:p>
          </table:table-cell>
          <table:table-cell office:value-type="string" calcext:value-type="string">
            <text:p>LONG</text:p>
          </table:table-cell>
          <table:table-cell office:value-type="float" office:value="25213" calcext:value-type="float">
            <text:p>25213</text:p>
          </table:table-cell>
          <table:table-cell office:value-type="float" office:value="25223" calcext:value-type="float">
            <text:p>25223</text:p>
          </table:table-cell>
          <table:table-cell office:value-type="float" office:value="25208" calcext:value-type="float">
            <text:p>2520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4:17:20.600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.2</text:p>
          </table:table-cell>
          <table:table-cell office:value-type="float" office:value="189.3" calcext:value-type="float">
            <text:p>189.3</text:p>
          </table:table-cell>
          <table:table-cell office:value-type="float" office:value="-42.1" calcext:value-type="float">
            <text:p>-42.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19:21.800</text:p>
          </table:table-cell>
          <table:table-cell office:value-type="string" calcext:value-type="string">
            <text:p>2025-10-08 10:19:21.800</text:p>
          </table:table-cell>
          <table:table-cell office:value-type="string" calcext:value-type="string">
            <text:p>LONG</text:p>
          </table:table-cell>
          <table:table-cell office:value-type="float" office:value="25212.75" calcext:value-type="float">
            <text:p>25212.75</text:p>
          </table:table-cell>
          <table:table-cell office:value-type="float" office:value="25222.75" calcext:value-type="float">
            <text:p>25222.75</text:p>
          </table:table-cell>
          <table:table-cell office:value-type="float" office:value="25207.75" calcext:value-type="float">
            <text:p>2520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4:19:23.30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225.8" calcext:value-type="float">
            <text:p>225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6.5" calcext:value-type="float">
            <text:p>3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26:54.400</text:p>
          </table:table-cell>
          <table:table-cell office:value-type="string" calcext:value-type="string">
            <text:p>2025-10-08 10:26:54.400</text:p>
          </table:table-cell>
          <table:table-cell office:value-type="string" calcext:value-type="string">
            <text:p>LONG</text:p>
          </table:table-cell>
          <table:table-cell office:value-type="float" office:value="25212.25" calcext:value-type="float">
            <text:p>25212.25</text:p>
          </table:table-cell>
          <table:table-cell office:value-type="float" office:value="25222.25" calcext:value-type="float">
            <text:p>25222.25</text:p>
          </table:table-cell>
          <table:table-cell office:value-type="float" office:value="25207.25" calcext:value-type="float">
            <text:p>2520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4:26:54.600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8 14:27:12.1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115.1" calcext:value-type="float">
            <text:p>115.1</text:p>
          </table:table-cell>
          <table:table-cell office:value-type="float" office:value="1" calcext:value-type="float">
            <text:p>1</text:p>
          </table:table-cell>
          <table:table-cell office:value-type="float" office:value="225.8" calcext:value-type="float">
            <text:p>225.8</text:p>
          </table:table-cell>
          <table:table-cell office:value-type="float" office:value="336.5" calcext:value-type="float">
            <text:p>336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33:55.100</text:p>
          </table:table-cell>
          <table:table-cell office:value-type="string" calcext:value-type="string">
            <text:p>2025-10-08 10:33:55.100</text:p>
          </table:table-cell>
          <table:table-cell office:value-type="string" calcext:value-type="string">
            <text:p>SHORT</text:p>
          </table:table-cell>
          <table:table-cell office:value-type="float" office:value="25215.5" calcext:value-type="float">
            <text:p>25215.5</text:p>
          </table:table-cell>
          <table:table-cell office:value-type="float" office:value="25205.5" calcext:value-type="float">
            <text:p>25205.5</text:p>
          </table:table-cell>
          <table:table-cell office:value-type="float" office:value="25220.5" calcext:value-type="float">
            <text:p>2522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4:33:55.200</text:p>
          </table:table-cell>
          <table:table-cell office:value-type="float" office:value="73" calcext:value-type="float">
            <text:p>73</text:p>
          </table:table-cell>
          <table:table-cell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.40000000000001" calcext:value-type="float">
            <text:p>4.4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15.1" calcext:value-type="float">
            <text:p>115.1</text:p>
          </table:table-cell>
          <table:table-cell office:value-type="float" office:value="336.5" calcext:value-type="float">
            <text:p>336.5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46:38.500</text:p>
          </table:table-cell>
          <table:table-cell office:value-type="string" calcext:value-type="string">
            <text:p>2025-10-08 10:46:38.500</text:p>
          </table:table-cell>
          <table:table-cell office:value-type="string" calcext:value-type="string">
            <text:p>LONG</text:p>
          </table:table-cell>
          <table:table-cell office:value-type="float" office:value="25198.25" calcext:value-type="float">
            <text:p>25198.25</text:p>
          </table:table-cell>
          <table:table-cell office:value-type="float" office:value="25208.25" calcext:value-type="float">
            <text:p>25208.25</text:p>
          </table:table-cell>
          <table:table-cell office:value-type="float" office:value="25193.25" calcext:value-type="float">
            <text:p>2519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4:46:39.6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-32.7" calcext:value-type="float">
            <text:p>-32.7</text:p>
          </table:table-cell>
          <table:table-cell office:value-type="float" office:value="0" calcext:value-type="float">
            <text:p>0</text:p>
          </table:table-cell>
          <table:table-cell office:value-type="float" office:value="304.4" calcext:value-type="float">
            <text:p>304.4</text:p>
          </table:table-cell>
          <table:table-cell office:value-type="float" office:value="336.5" calcext:value-type="float">
            <text:p>336.5</text:p>
          </table:table-cell>
          <table:table-cell office:value-type="float" office:value="-32.1" calcext:value-type="float">
            <text:p>-32.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4:59:23.400</text:p>
          </table:table-cell>
          <table:table-cell office:value-type="string" calcext:value-type="string">
            <text:p>2025-10-08 10:59:23.400</text:p>
          </table:table-cell>
          <table:table-cell office:value-type="string" calcext:value-type="string">
            <text:p>SHORT</text:p>
          </table:table-cell>
          <table:table-cell office:value-type="float" office:value="25186.5" calcext:value-type="float">
            <text:p>25186.5</text:p>
          </table:table-cell>
          <table:table-cell office:value-type="float" office:value="25176.5" calcext:value-type="float">
            <text:p>25176.5</text:p>
          </table:table-cell>
          <table:table-cell office:value-type="float" office:value="25191.5" calcext:value-type="float">
            <text:p>2519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4:59:24.700</text:p>
          </table:table-cell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.80000000000007" calcext:value-type="float">
            <text:p>3.80000000000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.7" calcext:value-type="float">
            <text:p>49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00:41.400</text:p>
          </table:table-cell>
          <table:table-cell office:value-type="string" calcext:value-type="string">
            <text:p>2025-10-08 11:00:41.400</text:p>
          </table:table-cell>
          <table:table-cell office:value-type="string" calcext:value-type="string">
            <text:p>SHORT</text:p>
          </table:table-cell>
          <table:table-cell office:value-type="float" office:value="25196.75" calcext:value-type="float">
            <text:p>25196.75</text:p>
          </table:table-cell>
          <table:table-cell office:value-type="float" office:value="25186.75" calcext:value-type="float">
            <text:p>25186.75</text:p>
          </table:table-cell>
          <table:table-cell office:value-type="float" office:value="25201.75" calcext:value-type="float">
            <text:p>2520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00:41.500</text:p>
          </table:table-cell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93.1" calcext:value-type="float">
            <text:p>193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04:25.700</text:p>
          </table:table-cell>
          <table:table-cell office:value-type="string" calcext:value-type="string">
            <text:p>2025-10-08 11:04:25.700</text:p>
          </table:table-cell>
          <table:table-cell office:value-type="string" calcext:value-type="string">
            <text:p>SHORT</text:p>
          </table:table-cell>
          <table:table-cell office:value-type="float" office:value="25201.5" calcext:value-type="float">
            <text:p>25201.5</text:p>
          </table:table-cell>
          <table:table-cell office:value-type="float" office:value="25191.5" calcext:value-type="float">
            <text:p>25191.5</text:p>
          </table:table-cell>
          <table:table-cell office:value-type="float" office:value="25206.5" calcext:value-type="float">
            <text:p>2520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04:25.90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2.4" calcext:value-type="float">
            <text:p>382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2.3" calcext:value-type="float">
            <text:p>87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19:33.300</text:p>
          </table:table-cell>
          <table:table-cell office:value-type="string" calcext:value-type="string">
            <text:p>2025-10-08 11:19:33.300</text:p>
          </table:table-cell>
          <table:table-cell office:value-type="string" calcext:value-type="string">
            <text:p>SHORT</text:p>
          </table:table-cell>
          <table:table-cell office:value-type="float" office:value="25202" calcext:value-type="float">
            <text:p>25202</text:p>
          </table:table-cell>
          <table:table-cell office:value-type="float" office:value="25192" calcext:value-type="float">
            <text:p>25192</text:p>
          </table:table-cell>
          <table:table-cell office:value-type="float" office:value="25207" calcext:value-type="float">
            <text:p>2520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19:34.800</text:p>
          </table:table-cell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71.7" calcext:value-type="float">
            <text:p>571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1.6" calcext:value-type="float">
            <text:p>106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20:21.100</text:p>
          </table:table-cell>
          <table:table-cell office:value-type="string" calcext:value-type="string">
            <text:p>2025-10-08 11:20:21.100</text:p>
          </table:table-cell>
          <table:table-cell office:value-type="string" calcext:value-type="string">
            <text:p>SHORT</text:p>
          </table:table-cell>
          <table:table-cell office:value-type="float" office:value="25210.5" calcext:value-type="float">
            <text:p>25210.5</text:p>
          </table:table-cell>
          <table:table-cell office:value-type="float" office:value="25200.5" calcext:value-type="float">
            <text:p>25200.5</text:p>
          </table:table-cell>
          <table:table-cell office:value-type="float" office:value="25215.5" calcext:value-type="float">
            <text:p>2521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20:21.200</text:p>
          </table:table-cell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0.9" calcext:value-type="float">
            <text:p>125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21:25.000</text:p>
          </table:table-cell>
          <table:table-cell office:value-type="string" calcext:value-type="string">
            <text:p>2025-10-08 11:21:25.000</text:p>
          </table:table-cell>
          <table:table-cell office:value-type="string" calcext:value-type="string">
            <text:p>SHORT</text:p>
          </table:table-cell>
          <table:table-cell office:value-type="float" office:value="25214.25" calcext:value-type="float">
            <text:p>25214.25</text:p>
          </table:table-cell>
          <table:table-cell office:value-type="float" office:value="25204.25" calcext:value-type="float">
            <text:p>25204.25</text:p>
          </table:table-cell>
          <table:table-cell office:value-type="float" office:value="25219.25" calcext:value-type="float">
            <text:p>2521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21:25.1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950.3" calcext:value-type="float">
            <text:p>95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0.2" calcext:value-type="float">
            <text:p>144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22:52.000</text:p>
          </table:table-cell>
          <table:table-cell office:value-type="string" calcext:value-type="string">
            <text:p>2025-10-08 11:22:52.000</text:p>
          </table:table-cell>
          <table:table-cell office:value-type="string" calcext:value-type="string">
            <text:p>SHORT</text:p>
          </table:table-cell>
          <table:table-cell office:value-type="float" office:value="25213.75" calcext:value-type="float">
            <text:p>25213.75</text:p>
          </table:table-cell>
          <table:table-cell office:value-type="float" office:value="25203.75" calcext:value-type="float">
            <text:p>25203.75</text:p>
          </table:table-cell>
          <table:table-cell office:value-type="float" office:value="25218.75" calcext:value-type="float">
            <text:p>2521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22:53.300</text:p>
          </table:table-cell>
          <table:table-cell office:value-type="float" office:value="127" calcext:value-type="float">
            <text:p>127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139.6" calcext:value-type="float">
            <text:p>1139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9.5" calcext:value-type="float">
            <text:p>16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31:41.500</text:p>
          </table:table-cell>
          <table:table-cell office:value-type="string" calcext:value-type="string">
            <text:p>2025-10-08 11:31:41.500</text:p>
          </table:table-cell>
          <table:table-cell office:value-type="string" calcext:value-type="string">
            <text:p>SHORT</text:p>
          </table:table-cell>
          <table:table-cell office:value-type="float" office:value="25236.75" calcext:value-type="float">
            <text:p>25236.75</text:p>
          </table:table-cell>
          <table:table-cell office:value-type="float" office:value="25226.75" calcext:value-type="float">
            <text:p>25226.75</text:p>
          </table:table-cell>
          <table:table-cell office:value-type="float" office:value="25241.75" calcext:value-type="float">
            <text:p>2524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31:42.5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323.9" calcext:value-type="float">
            <text:p>1323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13.8" calcext:value-type="float">
            <text:p>18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35:20.200</text:p>
          </table:table-cell>
          <table:table-cell office:value-type="string" calcext:value-type="string">
            <text:p>2025-10-08 11:35:20.200</text:p>
          </table:table-cell>
          <table:table-cell office:value-type="string" calcext:value-type="string">
            <text:p>SHORT</text:p>
          </table:table-cell>
          <table:table-cell office:value-type="float" office:value="25235.25" calcext:value-type="float">
            <text:p>25235.25</text:p>
          </table:table-cell>
          <table:table-cell office:value-type="float" office:value="25225.25" calcext:value-type="float">
            <text:p>25225.25</text:p>
          </table:table-cell>
          <table:table-cell office:value-type="float" office:value="25240.25" calcext:value-type="float">
            <text:p>2524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35:21.200</text:p>
          </table:table-cell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508.2" calcext:value-type="float">
            <text:p>150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8.1" calcext:value-type="float">
            <text:p>199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36:06.200</text:p>
          </table:table-cell>
          <table:table-cell office:value-type="string" calcext:value-type="string">
            <text:p>2025-10-08 11:36:06.200</text:p>
          </table:table-cell>
          <table:table-cell office:value-type="string" calcext:value-type="string">
            <text:p>SHORT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4" calcext:value-type="float">
            <text:p>25224</text:p>
          </table:table-cell>
          <table:table-cell office:value-type="float" office:value="25239" calcext:value-type="float">
            <text:p>2523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36:09.300</text:p>
          </table:table-cell>
          <table:table-cell office:value-type="float" office:value="71" calcext:value-type="float">
            <text:p>7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97.5" calcext:value-type="float">
            <text:p>169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7.4" calcext:value-type="float">
            <text:p>218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37:36.300</text:p>
          </table:table-cell>
          <table:table-cell office:value-type="string" calcext:value-type="string">
            <text:p>2025-10-08 11:37:36.300</text:p>
          </table:table-cell>
          <table:table-cell office:value-type="string" calcext:value-type="string">
            <text:p>SHORT</text:p>
          </table:table-cell>
          <table:table-cell office:value-type="float" office:value="25241.5" calcext:value-type="float">
            <text:p>25241.5</text:p>
          </table:table-cell>
          <table:table-cell office:value-type="float" office:value="25231.5" calcext:value-type="float">
            <text:p>25231.5</text:p>
          </table:table-cell>
          <table:table-cell office:value-type="float" office:value="25246.5" calcext:value-type="float">
            <text:p>2524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37:38.400</text:p>
          </table:table-cell>
          <table:table-cell office:value-type="float" office:value="91" calcext:value-type="float">
            <text:p>91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86.8" calcext:value-type="float">
            <text:p>1886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6.7" calcext:value-type="float">
            <text:p>237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41:42.100</text:p>
          </table:table-cell>
          <table:table-cell office:value-type="string" calcext:value-type="string">
            <text:p>2025-10-08 11:41:42.100</text:p>
          </table:table-cell>
          <table:table-cell office:value-type="string" calcext:value-type="string">
            <text:p>SHORT</text:p>
          </table:table-cell>
          <table:table-cell office:value-type="float" office:value="25244.25" calcext:value-type="float">
            <text:p>25244.25</text:p>
          </table:table-cell>
          <table:table-cell office:value-type="float" office:value="25234.25" calcext:value-type="float">
            <text:p>25234.25</text:p>
          </table:table-cell>
          <table:table-cell office:value-type="float" office:value="25249.25" calcext:value-type="float">
            <text:p>2524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41:42.300</text:p>
          </table:table-cell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8 15:42:50.6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076.1" calcext:value-type="float">
            <text:p>2076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45:00.700</text:p>
          </table:table-cell>
          <table:table-cell office:value-type="string" calcext:value-type="string">
            <text:p>2025-10-08 11:45:00.700</text:p>
          </table:table-cell>
          <table:table-cell office:value-type="string" calcext:value-type="string">
            <text:p>SHORT</text:p>
          </table:table-cell>
          <table:table-cell office:value-type="float" office:value="25238" calcext:value-type="float">
            <text:p>25238</text:p>
          </table:table-cell>
          <table:table-cell office:value-type="float" office:value="25228" calcext:value-type="float">
            <text:p>25228</text:p>
          </table:table-cell>
          <table:table-cell office:value-type="float" office:value="25243" calcext:value-type="float">
            <text:p>2524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45:01.700</text:p>
          </table:table-cell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55.4" calcext:value-type="float">
            <text:p>2255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5.3" calcext:value-type="float">
            <text:p>274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45:26.300</text:p>
          </table:table-cell>
          <table:table-cell office:value-type="string" calcext:value-type="string">
            <text:p>2025-10-08 11:45:26.300</text:p>
          </table:table-cell>
          <table:table-cell office:value-type="string" calcext:value-type="string">
            <text:p>SHORT</text:p>
          </table:table-cell>
          <table:table-cell office:value-type="float" office:value="25243.25" calcext:value-type="float">
            <text:p>25243.25</text:p>
          </table:table-cell>
          <table:table-cell office:value-type="float" office:value="25233.25" calcext:value-type="float">
            <text:p>25233.25</text:p>
          </table:table-cell>
          <table:table-cell office:value-type="float" office:value="25248.25" calcext:value-type="float">
            <text:p>2524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45:27.300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439.7" calcext:value-type="float">
            <text:p>2439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9.6" calcext:value-type="float">
            <text:p>29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45:38.600</text:p>
          </table:table-cell>
          <table:table-cell office:value-type="string" calcext:value-type="string">
            <text:p>2025-10-08 11:45:38.600</text:p>
          </table:table-cell>
          <table:table-cell office:value-type="string" calcext:value-type="string">
            <text:p>SHORT</text:p>
          </table:table-cell>
          <table:table-cell office:value-type="float" office:value="25242.25" calcext:value-type="float">
            <text:p>25242.25</text:p>
          </table:table-cell>
          <table:table-cell office:value-type="float" office:value="25232.25" calcext:value-type="float">
            <text:p>25232.25</text:p>
          </table:table-cell>
          <table:table-cell office:value-type="float" office:value="25247.25" calcext:value-type="float">
            <text:p>2524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45:39.600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8.9" calcext:value-type="float">
            <text:p>310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45:39.200</text:p>
          </table:table-cell>
          <table:table-cell office:value-type="string" calcext:value-type="string">
            <text:p>2025-10-08 11:45:39.200</text:p>
          </table:table-cell>
          <table:table-cell office:value-type="string" calcext:value-type="string">
            <text:p>SHORT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3" calcext:value-type="float">
            <text:p>25233</text:p>
          </table:table-cell>
          <table:table-cell office:value-type="float" office:value="25248" calcext:value-type="float">
            <text:p>2524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45:40.200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59.3" calcext:value-type="float">
            <text:p>15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778.3" calcext:value-type="float">
            <text:p>277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.2" calcext:value-type="float">
            <text:p>326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46:22.400</text:p>
          </table:table-cell>
          <table:table-cell office:value-type="string" calcext:value-type="string">
            <text:p>2025-10-08 11:46:22.400</text:p>
          </table:table-cell>
          <table:table-cell office:value-type="string" calcext:value-type="string">
            <text:p>SHORT</text:p>
          </table:table-cell>
          <table:table-cell office:value-type="float" office:value="25243.25" calcext:value-type="float">
            <text:p>25243.25</text:p>
          </table:table-cell>
          <table:table-cell office:value-type="float" office:value="25233.25" calcext:value-type="float">
            <text:p>25233.25</text:p>
          </table:table-cell>
          <table:table-cell office:value-type="float" office:value="25248.25" calcext:value-type="float">
            <text:p>2524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46:27.4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67.6" calcext:value-type="float">
            <text:p>2967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7.5" calcext:value-type="float">
            <text:p>34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0:48.200</text:p>
          </table:table-cell>
          <table:table-cell office:value-type="string" calcext:value-type="string">
            <text:p>2025-10-08 11:50:48.200</text:p>
          </table:table-cell>
          <table:table-cell office:value-type="string" calcext:value-type="string">
            <text:p>LONG</text:p>
          </table:table-cell>
          <table:table-cell office:value-type="float" office:value="25252.5" calcext:value-type="float">
            <text:p>25252.5</text:p>
          </table:table-cell>
          <table:table-cell office:value-type="float" office:value="25262.5" calcext:value-type="float">
            <text:p>25262.5</text:p>
          </table:table-cell>
          <table:table-cell office:value-type="float" office:value="25247.5" calcext:value-type="float">
            <text:p>2524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50:49.20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40.7" calcext:value-type="float">
            <text:p>-14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826.9" calcext:value-type="float">
            <text:p>2826.9</text:p>
          </table:table-cell>
          <table:table-cell office:value-type="float" office:value="1" calcext:value-type="float">
            <text:p>1</text:p>
          </table:table-cell>
          <table:table-cell office:value-type="float" office:value="3316.8" calcext:value-type="float">
            <text:p>3316.8</text:p>
          </table:table-cell>
          <table:table-cell office:value-type="float" office:value="3457.5" calcext:value-type="float">
            <text:p>3457.5</text:p>
          </table:table-cell>
          <table:table-cell office:value-type="float" office:value="-140.7" calcext:value-type="float">
            <text:p>-14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2:51.700</text:p>
          </table:table-cell>
          <table:table-cell office:value-type="string" calcext:value-type="string">
            <text:p>2025-10-08 11:52:51.700</text:p>
          </table:table-cell>
          <table:table-cell office:value-type="string" calcext:value-type="string">
            <text:p>LONG</text:p>
          </table:table-cell>
          <table:table-cell office:value-type="float" office:value="25257.25" calcext:value-type="float">
            <text:p>25257.25</text:p>
          </table:table-cell>
          <table:table-cell office:value-type="float" office:value="25267.25" calcext:value-type="float">
            <text:p>25267.25</text:p>
          </table:table-cell>
          <table:table-cell office:value-type="float" office:value="25252.25" calcext:value-type="float">
            <text:p>2525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52:52.200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16.2" calcext:value-type="float">
            <text:p>3016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06.1" calcext:value-type="float">
            <text:p>350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5:13.300</text:p>
          </table:table-cell>
          <table:table-cell office:value-type="string" calcext:value-type="string">
            <text:p>2025-10-08 11:55:13.300</text:p>
          </table:table-cell>
          <table:table-cell office:value-type="string" calcext:value-type="string">
            <text:p>LONG</text:p>
          </table:table-cell>
          <table:table-cell office:value-type="float" office:value="25255.25" calcext:value-type="float">
            <text:p>25255.25</text:p>
          </table:table-cell>
          <table:table-cell office:value-type="float" office:value="25265.25" calcext:value-type="float">
            <text:p>25265.25</text:p>
          </table:table-cell>
          <table:table-cell office:value-type="float" office:value="25250.25" calcext:value-type="float">
            <text:p>2525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55:15.50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05.5" calcext:value-type="float">
            <text:p>320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95.4" calcext:value-type="float">
            <text:p>369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7:35.900</text:p>
          </table:table-cell>
          <table:table-cell office:value-type="string" calcext:value-type="string">
            <text:p>2025-10-08 11:57:35.900</text:p>
          </table:table-cell>
          <table:table-cell office:value-type="string" calcext:value-type="string">
            <text:p>LONG</text:p>
          </table:table-cell>
          <table:table-cell office:value-type="float" office:value="25258" calcext:value-type="float">
            <text:p>25258</text:p>
          </table:table-cell>
          <table:table-cell office:value-type="float" office:value="25268" calcext:value-type="float">
            <text:p>25268</text:p>
          </table:table-cell>
          <table:table-cell office:value-type="float" office:value="25253" calcext:value-type="float">
            <text:p>2525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57:36.600</text:p>
          </table:table-cell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394.8" calcext:value-type="float">
            <text:p>339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4.7" calcext:value-type="float">
            <text:p>388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8:05.600</text:p>
          </table:table-cell>
          <table:table-cell office:value-type="string" calcext:value-type="string">
            <text:p>2025-10-08 11:58:05.600</text:p>
          </table:table-cell>
          <table:table-cell office:value-type="string" calcext:value-type="string">
            <text:p>SHORT</text:p>
          </table:table-cell>
          <table:table-cell office:value-type="float" office:value="25258.5" calcext:value-type="float">
            <text:p>25258.5</text:p>
          </table:table-cell>
          <table:table-cell office:value-type="float" office:value="25248.5" calcext:value-type="float">
            <text:p>25248.5</text:p>
          </table:table-cell>
          <table:table-cell office:value-type="float" office:value="25263.5" calcext:value-type="float">
            <text:p>2526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58:05.700</text:p>
          </table:table-cell>
          <table:table-cell office:value-type="float" office:value="2174" calcext:value-type="float">
            <text:p>217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84.1" calcext:value-type="float">
            <text:p>3284.1</text:p>
          </table:table-cell>
          <table:table-cell office:value-type="float" office:value="1" calcext:value-type="float">
            <text:p>1</text:p>
          </table:table-cell>
          <table:table-cell office:value-type="float" office:value="3774" calcext:value-type="float">
            <text:p>3774</text:p>
          </table:table-cell>
          <table:table-cell office:value-type="float" office:value="3884.7" calcext:value-type="float">
            <text:p>3884.7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8:56.100</text:p>
          </table:table-cell>
          <table:table-cell office:value-type="string" calcext:value-type="string">
            <text:p>2025-10-08 11:58:56.100</text:p>
          </table:table-cell>
          <table:table-cell office:value-type="string" calcext:value-type="string">
            <text:p>LONG</text:p>
          </table:table-cell>
          <table:table-cell office:value-type="float" office:value="25252.5" calcext:value-type="float">
            <text:p>25252.5</text:p>
          </table:table-cell>
          <table:table-cell office:value-type="float" office:value="25262.5" calcext:value-type="float">
            <text:p>25262.5</text:p>
          </table:table-cell>
          <table:table-cell office:value-type="float" office:value="25247.5" calcext:value-type="float">
            <text:p>2524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5:58:57.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463.4" calcext:value-type="float">
            <text:p>346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53.3" calcext:value-type="float">
            <text:p>395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5:59:14.700</text:p>
          </table:table-cell>
          <table:table-cell office:value-type="string" calcext:value-type="string">
            <text:p>2025-10-08 11:59:14.700</text:p>
          </table:table-cell>
          <table:table-cell office:value-type="string" calcext:value-type="string">
            <text:p>SHORT</text:p>
          </table:table-cell>
          <table:table-cell office:value-type="float" office:value="25252.5" calcext:value-type="float">
            <text:p>25252.5</text:p>
          </table:table-cell>
          <table:table-cell office:value-type="float" office:value="25242.5" calcext:value-type="float">
            <text:p>25242.5</text:p>
          </table:table-cell>
          <table:table-cell office:value-type="float" office:value="25257.5" calcext:value-type="float">
            <text:p>2525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5:59:14.800</text:p>
          </table:table-cell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652.7" calcext:value-type="float">
            <text:p>3652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42.6" calcext:value-type="float">
            <text:p>414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00:49.700</text:p>
          </table:table-cell>
          <table:table-cell office:value-type="string" calcext:value-type="string">
            <text:p>2025-10-08 12:00:49.700</text:p>
          </table:table-cell>
          <table:table-cell office:value-type="string" calcext:value-type="string">
            <text:p>LONG</text:p>
          </table:table-cell>
          <table:table-cell office:value-type="float" office:value="25253.25" calcext:value-type="float">
            <text:p>25253.25</text:p>
          </table:table-cell>
          <table:table-cell office:value-type="float" office:value="25263.25" calcext:value-type="float">
            <text:p>25263.25</text:p>
          </table:table-cell>
          <table:table-cell office:value-type="float" office:value="25248.25" calcext:value-type="float">
            <text:p>2524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6:00:50.70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32" calcext:value-type="float">
            <text:p>3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21.9" calcext:value-type="float">
            <text:p>432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1:56.200</text:p>
          </table:table-cell>
          <table:table-cell office:value-type="string" calcext:value-type="string">
            <text:p>2025-10-08 12:11:56.200</text:p>
          </table:table-cell>
          <table:table-cell office:value-type="string" calcext:value-type="string">
            <text:p>SHORT</text:p>
          </table:table-cell>
          <table:table-cell office:value-type="float" office:value="25266" calcext:value-type="float">
            <text:p>25266</text:p>
          </table:table-cell>
          <table:table-cell office:value-type="float" office:value="25256" calcext:value-type="float">
            <text:p>25256</text:p>
          </table:table-cell>
          <table:table-cell office:value-type="float" office:value="25271" calcext:value-type="float">
            <text:p>2527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1:56.9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021.3" calcext:value-type="float">
            <text:p>402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11.2" calcext:value-type="float">
            <text:p>45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1:56.900</text:p>
          </table:table-cell>
          <table:table-cell office:value-type="string" calcext:value-type="string">
            <text:p>2025-10-08 12:11:56.900</text:p>
          </table:table-cell>
          <table:table-cell office:value-type="string" calcext:value-type="string">
            <text:p>SHORT</text:p>
          </table:table-cell>
          <table:table-cell office:value-type="float" office:value="25266" calcext:value-type="float">
            <text:p>25266</text:p>
          </table:table-cell>
          <table:table-cell office:value-type="float" office:value="25256" calcext:value-type="float">
            <text:p>25256</text:p>
          </table:table-cell>
          <table:table-cell office:value-type="float" office:value="25271" calcext:value-type="float">
            <text:p>2527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1:57.000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10.6" calcext:value-type="float">
            <text:p>421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00.5" calcext:value-type="float">
            <text:p>47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2:27.700</text:p>
          </table:table-cell>
          <table:table-cell office:value-type="string" calcext:value-type="string">
            <text:p>2025-10-08 12:12:27.700</text:p>
          </table:table-cell>
          <table:table-cell office:value-type="string" calcext:value-type="string">
            <text:p>LONG</text:p>
          </table:table-cell>
          <table:table-cell office:value-type="float" office:value="25267" calcext:value-type="float">
            <text:p>25267</text:p>
          </table:table-cell>
          <table:table-cell office:value-type="float" office:value="25277" calcext:value-type="float">
            <text:p>25277</text:p>
          </table:table-cell>
          <table:table-cell office:value-type="float" office:value="25262" calcext:value-type="float">
            <text:p>2526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2:28.400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399.9" calcext:value-type="float">
            <text:p>4399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89.8" calcext:value-type="float">
            <text:p>488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2:28.100</text:p>
          </table:table-cell>
          <table:table-cell office:value-type="string" calcext:value-type="string">
            <text:p>2025-10-08 12:12:28.100</text:p>
          </table:table-cell>
          <table:table-cell office:value-type="string" calcext:value-type="string">
            <text:p>LONG</text:p>
          </table:table-cell>
          <table:table-cell office:value-type="float" office:value="25267" calcext:value-type="float">
            <text:p>25267</text:p>
          </table:table-cell>
          <table:table-cell office:value-type="float" office:value="25277" calcext:value-type="float">
            <text:p>25277</text:p>
          </table:table-cell>
          <table:table-cell office:value-type="float" office:value="25262" calcext:value-type="float">
            <text:p>2526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2:28.40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89.2" calcext:value-type="float">
            <text:p>4589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79.1" calcext:value-type="float">
            <text:p>50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3:55.900</text:p>
          </table:table-cell>
          <table:table-cell office:value-type="string" calcext:value-type="string">
            <text:p>2025-10-08 12:13:55.900</text:p>
          </table:table-cell>
          <table:table-cell office:value-type="string" calcext:value-type="string">
            <text:p>LONG</text:p>
          </table:table-cell>
          <table:table-cell office:value-type="float" office:value="25266" calcext:value-type="float">
            <text:p>25266</text:p>
          </table:table-cell>
          <table:table-cell office:value-type="float" office:value="25276" calcext:value-type="float">
            <text:p>25276</text:p>
          </table:table-cell>
          <table:table-cell office:value-type="float" office:value="25261" calcext:value-type="float">
            <text:p>2526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3:56.2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478.5" calcext:value-type="float">
            <text:p>4478.5</text:p>
          </table:table-cell>
          <table:table-cell office:value-type="float" office:value="1" calcext:value-type="float">
            <text:p>1</text:p>
          </table:table-cell>
          <table:table-cell office:value-type="float" office:value="4968.4" calcext:value-type="float">
            <text:p>4968.4</text:p>
          </table:table-cell>
          <table:table-cell office:value-type="float" office:value="5079.1" calcext:value-type="float">
            <text:p>5079.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7:27.800</text:p>
          </table:table-cell>
          <table:table-cell office:value-type="string" calcext:value-type="string">
            <text:p>2025-10-08 12:17:27.800</text:p>
          </table:table-cell>
          <table:table-cell office:value-type="string" calcext:value-type="string">
            <text:p>SHORT</text:p>
          </table:table-cell>
          <table:table-cell office:value-type="float" office:value="25267" calcext:value-type="float">
            <text:p>25267</text:p>
          </table:table-cell>
          <table:table-cell office:value-type="float" office:value="25257" calcext:value-type="float">
            <text:p>25257</text:p>
          </table:table-cell>
          <table:table-cell office:value-type="float" office:value="25272" calcext:value-type="float">
            <text:p>2527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7:27.900</text:p>
          </table:table-cell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8 16:17:46.4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367.8" calcext:value-type="float">
            <text:p>4367.8</text:p>
          </table:table-cell>
          <table:table-cell office:value-type="float" office:value="2" calcext:value-type="float">
            <text:p>2</text:p>
          </table:table-cell>
          <table:table-cell office:value-type="float" office:value="4857.7" calcext:value-type="float">
            <text:p>4857.7</text:p>
          </table:table-cell>
          <table:table-cell office:value-type="float" office:value="5079.1" calcext:value-type="float">
            <text:p>5079.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17:54.700</text:p>
          </table:table-cell>
          <table:table-cell office:value-type="string" calcext:value-type="string">
            <text:p>2025-10-08 12:17:54.700</text:p>
          </table:table-cell>
          <table:table-cell office:value-type="string" calcext:value-type="string">
            <text:p>SHORT</text:p>
          </table:table-cell>
          <table:table-cell office:value-type="float" office:value="25270.75" calcext:value-type="float">
            <text:p>25270.75</text:p>
          </table:table-cell>
          <table:table-cell office:value-type="float" office:value="25260.75" calcext:value-type="float">
            <text:p>25260.75</text:p>
          </table:table-cell>
          <table:table-cell office:value-type="float" office:value="25275.75" calcext:value-type="float">
            <text:p>2527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17:57.700</text:p>
          </table:table-cell>
          <table:table-cell office:value-type="float" office:value="2315" calcext:value-type="float">
            <text:p>2315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57.1" calcext:value-type="float">
            <text:p>4257.1</text:p>
          </table:table-cell>
          <table:table-cell office:value-type="float" office:value="3" calcext:value-type="float">
            <text:p>3</text:p>
          </table:table-cell>
          <table:table-cell office:value-type="float" office:value="4747" calcext:value-type="float">
            <text:p>4747</text:p>
          </table:table-cell>
          <table:table-cell office:value-type="float" office:value="5079.1" calcext:value-type="float">
            <text:p>5079.1</text:p>
          </table:table-cell>
          <table:table-cell office:value-type="float" office:value="-332.099999999999" calcext:value-type="float">
            <text:p>-332.0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33:35.000</text:p>
          </table:table-cell>
          <table:table-cell office:value-type="string" calcext:value-type="string">
            <text:p>2025-10-08 12:33:35.000</text:p>
          </table:table-cell>
          <table:table-cell office:value-type="string" calcext:value-type="string">
            <text:p>SHORT</text:p>
          </table:table-cell>
          <table:table-cell office:value-type="float" office:value="25247.5" calcext:value-type="float">
            <text:p>25247.5</text:p>
          </table:table-cell>
          <table:table-cell office:value-type="float" office:value="25237.5" calcext:value-type="float">
            <text:p>25237.5</text:p>
          </table:table-cell>
          <table:table-cell office:value-type="float" office:value="25252.5" calcext:value-type="float">
            <text:p>2525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6:33:36.000</text:p>
          </table:table-cell>
          <table:table-cell office:value-type="float" office:value="95" calcext:value-type="float">
            <text:p>95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330.7" calcext:value-type="float">
            <text:p>4330.7</text:p>
          </table:table-cell>
          <table:table-cell office:value-type="float" office:value="0" calcext:value-type="float">
            <text:p>0</text:p>
          </table:table-cell>
          <table:table-cell office:value-type="float" office:value="4931.3" calcext:value-type="float">
            <text:p>4931.3</text:p>
          </table:table-cell>
          <table:table-cell office:value-type="float" office:value="5079.1" calcext:value-type="float">
            <text:p>5079.1</text:p>
          </table:table-cell>
          <table:table-cell office:value-type="float" office:value="-147.799999999999" calcext:value-type="float">
            <text:p>-147.7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42:55.200</text:p>
          </table:table-cell>
          <table:table-cell office:value-type="string" calcext:value-type="string">
            <text:p>2025-10-08 12:42:55.200</text:p>
          </table:table-cell>
          <table:table-cell office:value-type="string" calcext:value-type="string">
            <text:p>LONG</text:p>
          </table:table-cell>
          <table:table-cell office:value-type="float" office:value="25249.25" calcext:value-type="float">
            <text:p>25249.25</text:p>
          </table:table-cell>
          <table:table-cell office:value-type="float" office:value="25259.25" calcext:value-type="float">
            <text:p>25259.25</text:p>
          </table:table-cell>
          <table:table-cell office:value-type="float" office:value="25244.25" calcext:value-type="float">
            <text:p>2524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42:57.7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0.6" calcext:value-type="float">
            <text:p>512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44:18.200</text:p>
          </table:table-cell>
          <table:table-cell office:value-type="string" calcext:value-type="string">
            <text:p>2025-10-08 12:44:18.200</text:p>
          </table:table-cell>
          <table:table-cell office:value-type="string" calcext:value-type="string">
            <text:p>SHORT</text:p>
          </table:table-cell>
          <table:table-cell office:value-type="float" office:value="25245.5" calcext:value-type="float">
            <text:p>25245.5</text:p>
          </table:table-cell>
          <table:table-cell office:value-type="float" office:value="25235.5" calcext:value-type="float">
            <text:p>25235.5</text:p>
          </table:table-cell>
          <table:table-cell office:value-type="float" office:value="25250.5" calcext:value-type="float">
            <text:p>2525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6:44:19.200</text:p>
          </table:table-cell>
          <table:table-cell office:value-type="float" office:value="87" calcext:value-type="float">
            <text:p>87</text:p>
          </table:table-cell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404.3" calcext:value-type="float">
            <text:p>4404.3</text:p>
          </table:table-cell>
          <table:table-cell office:value-type="float" office:value="1" calcext:value-type="float">
            <text:p>1</text:p>
          </table:table-cell>
          <table:table-cell office:value-type="float" office:value="5004.9" calcext:value-type="float">
            <text:p>5004.9</text:p>
          </table:table-cell>
          <table:table-cell office:value-type="float" office:value="5120.6" calcext:value-type="float">
            <text:p>5120.6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44:39.900</text:p>
          </table:table-cell>
          <table:table-cell office:value-type="string" calcext:value-type="string">
            <text:p>2025-10-08 12:44:39.900</text:p>
          </table:table-cell>
          <table:table-cell office:value-type="string" calcext:value-type="string">
            <text:p>LONG</text:p>
          </table:table-cell>
          <table:table-cell office:value-type="float" office:value="25248.5" calcext:value-type="float">
            <text:p>25248.5</text:p>
          </table:table-cell>
          <table:table-cell office:value-type="float" office:value="25258.5" calcext:value-type="float">
            <text:p>25258.5</text:p>
          </table:table-cell>
          <table:table-cell office:value-type="float" office:value="25243.5" calcext:value-type="float">
            <text:p>2524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6:44:40.90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88.6" calcext:value-type="float">
            <text:p>458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9.2" calcext:value-type="float">
            <text:p>518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6:44:47.100</text:p>
          </table:table-cell>
          <table:table-cell office:value-type="string" calcext:value-type="string">
            <text:p>2025-10-08 12:44:47.100</text:p>
          </table:table-cell>
          <table:table-cell office:value-type="string" calcext:value-type="string">
            <text:p>SHORT</text:p>
          </table:table-cell>
          <table:table-cell office:value-type="float" office:value="25248.75" calcext:value-type="float">
            <text:p>25248.75</text:p>
          </table:table-cell>
          <table:table-cell office:value-type="float" office:value="25238.75" calcext:value-type="float">
            <text:p>25238.75</text:p>
          </table:table-cell>
          <table:table-cell office:value-type="float" office:value="25253.75" calcext:value-type="float">
            <text:p>25253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6:44:48.900</text:p>
          </table:table-cell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477.9" calcext:value-type="float">
            <text:p>4477.9</text:p>
          </table:table-cell>
          <table:table-cell office:value-type="float" office:value="1" calcext:value-type="float">
            <text:p>1</text:p>
          </table:table-cell>
          <table:table-cell office:value-type="float" office:value="5078.50000000001" calcext:value-type="float">
            <text:p>5078.50000000001</text:p>
          </table:table-cell>
          <table:table-cell office:value-type="float" office:value="5189.2" calcext:value-type="float">
            <text:p>5189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01:19.000</text:p>
          </table:table-cell>
          <table:table-cell office:value-type="string" calcext:value-type="string">
            <text:p>2025-10-08 13:01:19.000</text:p>
          </table:table-cell>
          <table:table-cell office:value-type="string" calcext:value-type="string">
            <text:p>SHORT</text:p>
          </table:table-cell>
          <table:table-cell office:value-type="float" office:value="25249.5" calcext:value-type="float">
            <text:p>25249.5</text:p>
          </table:table-cell>
          <table:table-cell office:value-type="float" office:value="25239.5" calcext:value-type="float">
            <text:p>25239.5</text:p>
          </table:table-cell>
          <table:table-cell office:value-type="float" office:value="25254.5" calcext:value-type="float">
            <text:p>2525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01:20.000</text:p>
          </table:table-cell>
          <table:table-cell office:value-type="float" office:value="104" calcext:value-type="float">
            <text:p>104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657.2" calcext:value-type="float">
            <text:p>465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57.80000000001" calcext:value-type="float">
            <text:p>5257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03:29.400</text:p>
          </table:table-cell>
          <table:table-cell office:value-type="string" calcext:value-type="string">
            <text:p>2025-10-08 13:03:29.400</text:p>
          </table:table-cell>
          <table:table-cell office:value-type="string" calcext:value-type="string">
            <text:p>SHORT</text:p>
          </table:table-cell>
          <table:table-cell office:value-type="float" office:value="25254.75" calcext:value-type="float">
            <text:p>25254.75</text:p>
          </table:table-cell>
          <table:table-cell office:value-type="float" office:value="25244.75" calcext:value-type="float">
            <text:p>25244.75</text:p>
          </table:table-cell>
          <table:table-cell office:value-type="float" office:value="25259.75" calcext:value-type="float">
            <text:p>2525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03:30.400</text:p>
          </table:table-cell>
          <table:table-cell office:value-type="float" office:value="81" calcext:value-type="float">
            <text:p>81</text:p>
          </table:table-cell>
          <table:table-cell office:value-type="float" office:value="-39" calcext:value-type="float">
            <text:p>-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41.50000000001" calcext:value-type="float">
            <text:p>4541.50000000001</text:p>
          </table:table-cell>
          <table:table-cell office:value-type="float" office:value="1" calcext:value-type="float">
            <text:p>1</text:p>
          </table:table-cell>
          <table:table-cell office:value-type="float" office:value="5142.10000000001" calcext:value-type="float">
            <text:p>5142.10000000001</text:p>
          </table:table-cell>
          <table:table-cell office:value-type="float" office:value="5257.80000000001" calcext:value-type="float">
            <text:p>5257.8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06:20.900</text:p>
          </table:table-cell>
          <table:table-cell office:value-type="string" calcext:value-type="string">
            <text:p>2025-10-08 13:06:20.900</text:p>
          </table:table-cell>
          <table:table-cell office:value-type="string" calcext:value-type="string">
            <text:p>SHORT</text:p>
          </table:table-cell>
          <table:table-cell office:value-type="float" office:value="25247.25" calcext:value-type="float">
            <text:p>25247.25</text:p>
          </table:table-cell>
          <table:table-cell office:value-type="float" office:value="25237.25" calcext:value-type="float">
            <text:p>25237.25</text:p>
          </table:table-cell>
          <table:table-cell office:value-type="float" office:value="25252.25" calcext:value-type="float">
            <text:p>2525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06:22.700</text:p>
          </table:table-cell>
          <table:table-cell office:value-type="float" office:value="71" calcext:value-type="float">
            <text:p>71</text:p>
          </table:table-cell>
          <table:table-cell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730.80000000001" calcext:value-type="float">
            <text:p>4730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31.40000000001" calcext:value-type="float">
            <text:p>5331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11:46.300</text:p>
          </table:table-cell>
          <table:table-cell office:value-type="string" calcext:value-type="string">
            <text:p>2025-10-08 13:11:46.300</text:p>
          </table:table-cell>
          <table:table-cell office:value-type="string" calcext:value-type="string">
            <text:p>LONG</text:p>
          </table:table-cell>
          <table:table-cell office:value-type="float" office:value="25244" calcext:value-type="float">
            <text:p>25244</text:p>
          </table:table-cell>
          <table:table-cell office:value-type="float" office:value="25254" calcext:value-type="float">
            <text:p>25254</text:p>
          </table:table-cell>
          <table:table-cell office:value-type="float" office:value="25239" calcext:value-type="float">
            <text:p>2523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11:46.7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620.10000000001" calcext:value-type="float">
            <text:p>4620.10000000001</text:p>
          </table:table-cell>
          <table:table-cell office:value-type="float" office:value="1" calcext:value-type="float">
            <text:p>1</text:p>
          </table:table-cell>
          <table:table-cell office:value-type="float" office:value="5220.70000000001" calcext:value-type="float">
            <text:p>5220.70000000001</text:p>
          </table:table-cell>
          <table:table-cell office:value-type="float" office:value="5331.40000000001" calcext:value-type="float">
            <text:p>5331.4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13:30.200</text:p>
          </table:table-cell>
          <table:table-cell office:value-type="string" calcext:value-type="string">
            <text:p>2025-10-08 13:13:30.200</text:p>
          </table:table-cell>
          <table:table-cell office:value-type="string" calcext:value-type="string">
            <text:p>LONG</text:p>
          </table:table-cell>
          <table:table-cell office:value-type="float" office:value="25243.5" calcext:value-type="float">
            <text:p>25243.5</text:p>
          </table:table-cell>
          <table:table-cell office:value-type="float" office:value="25253.5" calcext:value-type="float">
            <text:p>25253.5</text:p>
          </table:table-cell>
          <table:table-cell office:value-type="float" office:value="25238.5" calcext:value-type="float">
            <text:p>2523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13:35.00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09.40000000001" calcext:value-type="float">
            <text:p>4509.40000000001</text:p>
          </table:table-cell>
          <table:table-cell office:value-type="float" office:value="2" calcext:value-type="float">
            <text:p>2</text:p>
          </table:table-cell>
          <table:table-cell office:value-type="float" office:value="5110.00000000001" calcext:value-type="float">
            <text:p>5110.00000000001</text:p>
          </table:table-cell>
          <table:table-cell office:value-type="float" office:value="5331.40000000001" calcext:value-type="float">
            <text:p>5331.4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16:01.300</text:p>
          </table:table-cell>
          <table:table-cell office:value-type="string" calcext:value-type="string">
            <text:p>2025-10-08 13:16:01.300</text:p>
          </table:table-cell>
          <table:table-cell office:value-type="string" calcext:value-type="string">
            <text:p>SHORT</text:p>
          </table:table-cell>
          <table:table-cell office:value-type="float" office:value="25252.75" calcext:value-type="float">
            <text:p>25252.75</text:p>
          </table:table-cell>
          <table:table-cell office:value-type="float" office:value="25242.75" calcext:value-type="float">
            <text:p>25242.75</text:p>
          </table:table-cell>
          <table:table-cell office:value-type="float" office:value="25257.75" calcext:value-type="float">
            <text:p>2525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16:02.300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693.70000000001" calcext:value-type="float">
            <text:p>4693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5294.30000000001" calcext:value-type="float">
            <text:p>5294.30000000001</text:p>
          </table:table-cell>
          <table:table-cell office:value-type="float" office:value="5331.40000000001" calcext:value-type="float">
            <text:p>5331.40000000001</text:p>
          </table:table-cell>
          <table:table-cell office:value-type="float" office:value="-37.0999999999995" calcext:value-type="float">
            <text:p>-37.0999999999995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18:35.700</text:p>
          </table:table-cell>
          <table:table-cell office:value-type="string" calcext:value-type="string">
            <text:p>2025-10-08 13:18:35.700</text:p>
          </table:table-cell>
          <table:table-cell office:value-type="string" calcext:value-type="string">
            <text:p>SHORT</text:p>
          </table:table-cell>
          <table:table-cell office:value-type="float" office:value="25256.5" calcext:value-type="float">
            <text:p>25256.5</text:p>
          </table:table-cell>
          <table:table-cell office:value-type="float" office:value="25246.5" calcext:value-type="float">
            <text:p>25246.5</text:p>
          </table:table-cell>
          <table:table-cell office:value-type="float" office:value="25261.5" calcext:value-type="float">
            <text:p>25261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18:36.700</text:p>
          </table:table-cell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878.00000000001" calcext:value-type="float">
            <text:p>4878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78.60000000001" calcext:value-type="float">
            <text:p>5478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26:19.100</text:p>
          </table:table-cell>
          <table:table-cell office:value-type="string" calcext:value-type="string">
            <text:p>2025-10-08 13:26:19.100</text:p>
          </table:table-cell>
          <table:table-cell office:value-type="string" calcext:value-type="string">
            <text:p>SHORT</text:p>
          </table:table-cell>
          <table:table-cell office:value-type="float" office:value="25260.75" calcext:value-type="float">
            <text:p>25260.75</text:p>
          </table:table-cell>
          <table:table-cell office:value-type="float" office:value="25250.75" calcext:value-type="float">
            <text:p>25250.75</text:p>
          </table:table-cell>
          <table:table-cell office:value-type="float" office:value="25265.75" calcext:value-type="float">
            <text:p>2526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26:20.100</text:p>
          </table:table-cell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062.30000000001" calcext:value-type="float">
            <text:p>5062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62.90000000001" calcext:value-type="float">
            <text:p>5662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29:32.100</text:p>
          </table:table-cell>
          <table:table-cell office:value-type="string" calcext:value-type="string">
            <text:p>2025-10-08 13:29:32.100</text:p>
          </table:table-cell>
          <table:table-cell office:value-type="string" calcext:value-type="string">
            <text:p>SHORT</text:p>
          </table:table-cell>
          <table:table-cell office:value-type="float" office:value="25265.25" calcext:value-type="float">
            <text:p>25265.25</text:p>
          </table:table-cell>
          <table:table-cell office:value-type="float" office:value="25255.25" calcext:value-type="float">
            <text:p>25255.25</text:p>
          </table:table-cell>
          <table:table-cell office:value-type="float" office:value="25270.25" calcext:value-type="float">
            <text:p>2527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29:33.10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246.60000000001" calcext:value-type="float">
            <text:p>5246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47.20000000001" calcext:value-type="float">
            <text:p>5847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30:00.900</text:p>
          </table:table-cell>
          <table:table-cell office:value-type="string" calcext:value-type="string">
            <text:p>2025-10-08 13:30:00.900</text:p>
          </table:table-cell>
          <table:table-cell office:value-type="string" calcext:value-type="string">
            <text:p>SHORT</text:p>
          </table:table-cell>
          <table:table-cell office:value-type="float" office:value="25268" calcext:value-type="float">
            <text:p>25268</text:p>
          </table:table-cell>
          <table:table-cell office:value-type="float" office:value="25258" calcext:value-type="float">
            <text:p>25258</text:p>
          </table:table-cell>
          <table:table-cell office:value-type="float" office:value="25273" calcext:value-type="float">
            <text:p>2527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30:01.900</text:p>
          </table:table-cell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425.90000000001" calcext:value-type="float">
            <text:p>5425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26.50000000001" calcext:value-type="float">
            <text:p>6026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34:03.100</text:p>
          </table:table-cell>
          <table:table-cell office:value-type="string" calcext:value-type="string">
            <text:p>2025-10-08 13:34:03.100</text:p>
          </table:table-cell>
          <table:table-cell office:value-type="string" calcext:value-type="string">
            <text:p>LONG</text:p>
          </table:table-cell>
          <table:table-cell office:value-type="float" office:value="25271" calcext:value-type="float">
            <text:p>25271</text:p>
          </table:table-cell>
          <table:table-cell office:value-type="float" office:value="25281" calcext:value-type="float">
            <text:p>25281</text:p>
          </table:table-cell>
          <table:table-cell office:value-type="float" office:value="25266" calcext:value-type="float">
            <text:p>2526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34:07.10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615.20000000001" calcext:value-type="float">
            <text:p>5615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15.80000000001" calcext:value-type="float">
            <text:p>6215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35:28.700</text:p>
          </table:table-cell>
          <table:table-cell office:value-type="string" calcext:value-type="string">
            <text:p>2025-10-08 13:35:28.700</text:p>
          </table:table-cell>
          <table:table-cell office:value-type="string" calcext:value-type="string">
            <text:p>LONG</text:p>
          </table:table-cell>
          <table:table-cell office:value-type="float" office:value="25266" calcext:value-type="float">
            <text:p>25266</text:p>
          </table:table-cell>
          <table:table-cell office:value-type="float" office:value="25276" calcext:value-type="float">
            <text:p>25276</text:p>
          </table:table-cell>
          <table:table-cell office:value-type="float" office:value="25261" calcext:value-type="float">
            <text:p>2526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35:30.90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804.50000000001" calcext:value-type="float">
            <text:p>5804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5.10000000001" calcext:value-type="float">
            <text:p>6405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35:31.200</text:p>
          </table:table-cell>
          <table:table-cell office:value-type="string" calcext:value-type="string">
            <text:p>2025-10-08 13:35:31.200</text:p>
          </table:table-cell>
          <table:table-cell office:value-type="string" calcext:value-type="string">
            <text:p>LONG</text:p>
          </table:table-cell>
          <table:table-cell office:value-type="float" office:value="25266.25" calcext:value-type="float">
            <text:p>25266.25</text:p>
          </table:table-cell>
          <table:table-cell office:value-type="float" office:value="25276.25" calcext:value-type="float">
            <text:p>25276.25</text:p>
          </table:table-cell>
          <table:table-cell office:value-type="float" office:value="25261.25" calcext:value-type="float">
            <text:p>2526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35:32.200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988.80000000001" calcext:value-type="float">
            <text:p>5988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89.40000000001" calcext:value-type="float">
            <text:p>6589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35:54.900</text:p>
          </table:table-cell>
          <table:table-cell office:value-type="string" calcext:value-type="string">
            <text:p>2025-10-08 13:35:54.900</text:p>
          </table:table-cell>
          <table:table-cell office:value-type="string" calcext:value-type="string">
            <text:p>LONG</text:p>
          </table:table-cell>
          <table:table-cell office:value-type="float" office:value="25263.5" calcext:value-type="float">
            <text:p>25263.5</text:p>
          </table:table-cell>
          <table:table-cell office:value-type="float" office:value="25273.5" calcext:value-type="float">
            <text:p>25273.5</text:p>
          </table:table-cell>
          <table:table-cell office:value-type="float" office:value="25258.5" calcext:value-type="float">
            <text:p>2525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35:55.400</text:p>
          </table:table-cell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878.10000000001" calcext:value-type="float">
            <text:p>5878.10000000001</text:p>
          </table:table-cell>
          <table:table-cell office:value-type="float" office:value="1" calcext:value-type="float">
            <text:p>1</text:p>
          </table:table-cell>
          <table:table-cell office:value-type="float" office:value="6478.70000000001" calcext:value-type="float">
            <text:p>6478.70000000001</text:p>
          </table:table-cell>
          <table:table-cell office:value-type="float" office:value="6589.40000000001" calcext:value-type="float">
            <text:p>6589.4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35:56.900</text:p>
          </table:table-cell>
          <table:table-cell office:value-type="string" calcext:value-type="string">
            <text:p>2025-10-08 13:35:56.900</text:p>
          </table:table-cell>
          <table:table-cell office:value-type="string" calcext:value-type="string">
            <text:p>LONG</text:p>
          </table:table-cell>
          <table:table-cell office:value-type="float" office:value="25263.75" calcext:value-type="float">
            <text:p>25263.75</text:p>
          </table:table-cell>
          <table:table-cell office:value-type="float" office:value="25273.75" calcext:value-type="float">
            <text:p>25273.75</text:p>
          </table:table-cell>
          <table:table-cell office:value-type="float" office:value="25258.75" calcext:value-type="float">
            <text:p>2525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36:00.60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767.40000000001" calcext:value-type="float">
            <text:p>5767.40000000001</text:p>
          </table:table-cell>
          <table:table-cell office:value-type="float" office:value="2" calcext:value-type="float">
            <text:p>2</text:p>
          </table:table-cell>
          <table:table-cell office:value-type="float" office:value="6368.00000000001" calcext:value-type="float">
            <text:p>6368.00000000001</text:p>
          </table:table-cell>
          <table:table-cell office:value-type="float" office:value="6589.40000000001" calcext:value-type="float">
            <text:p>6589.4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48:50.600</text:p>
          </table:table-cell>
          <table:table-cell office:value-type="string" calcext:value-type="string">
            <text:p>2025-10-08 13:48:50.600</text:p>
          </table:table-cell>
          <table:table-cell office:value-type="string" calcext:value-type="string">
            <text:p>SHORT</text:p>
          </table:table-cell>
          <table:table-cell office:value-type="float" office:value="25274.25" calcext:value-type="float">
            <text:p>25274.25</text:p>
          </table:table-cell>
          <table:table-cell office:value-type="float" office:value="25264.25" calcext:value-type="float">
            <text:p>25264.25</text:p>
          </table:table-cell>
          <table:table-cell office:value-type="float" office:value="25279.25" calcext:value-type="float">
            <text:p>2527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48:50.800</text:p>
          </table:table-cell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956.70000000001" calcext:value-type="float">
            <text:p>5956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557.30000000001" calcext:value-type="float">
            <text:p>6557.30000000001</text:p>
          </table:table-cell>
          <table:table-cell office:value-type="float" office:value="6589.40000000001" calcext:value-type="float">
            <text:p>6589.40000000001</text:p>
          </table:table-cell>
          <table:table-cell office:value-type="float" office:value="-32.0999999999995" calcext:value-type="float">
            <text:p>-32.0999999999995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49:25.500</text:p>
          </table:table-cell>
          <table:table-cell office:value-type="string" calcext:value-type="string">
            <text:p>2025-10-08 13:49:25.500</text:p>
          </table:table-cell>
          <table:table-cell office:value-type="string" calcext:value-type="string">
            <text:p>SHORT</text:p>
          </table:table-cell>
          <table:table-cell office:value-type="float" office:value="25277" calcext:value-type="float">
            <text:p>25277</text:p>
          </table:table-cell>
          <table:table-cell office:value-type="float" office:value="25267" calcext:value-type="float">
            <text:p>25267</text:p>
          </table:table-cell>
          <table:table-cell office:value-type="float" office:value="25282" calcext:value-type="float">
            <text:p>2528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49:29.800</text:p>
          </table:table-cell>
          <table:table-cell office:value-type="float" office:value="164" calcext:value-type="float">
            <text:p>164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846.00000000001" calcext:value-type="float">
            <text:p>5846.00000000001</text:p>
          </table:table-cell>
          <table:table-cell office:value-type="float" office:value="1" calcext:value-type="float">
            <text:p>1</text:p>
          </table:table-cell>
          <table:table-cell office:value-type="float" office:value="6446.60000000001" calcext:value-type="float">
            <text:p>6446.60000000001</text:p>
          </table:table-cell>
          <table:table-cell office:value-type="float" office:value="6589.40000000001" calcext:value-type="float">
            <text:p>6589.40000000001</text:p>
          </table:table-cell>
          <table:table-cell office:value-type="float" office:value="-142.799999999999" calcext:value-type="float">
            <text:p>-142.7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0:50.900</text:p>
          </table:table-cell>
          <table:table-cell office:value-type="string" calcext:value-type="string">
            <text:p>2025-10-08 13:50:50.900</text:p>
          </table:table-cell>
          <table:table-cell office:value-type="string" calcext:value-type="string">
            <text:p>LONG</text:p>
          </table:table-cell>
          <table:table-cell office:value-type="float" office:value="25275.75" calcext:value-type="float">
            <text:p>25275.75</text:p>
          </table:table-cell>
          <table:table-cell office:value-type="float" office:value="25285.75" calcext:value-type="float">
            <text:p>25285.75</text:p>
          </table:table-cell>
          <table:table-cell office:value-type="float" office:value="25270.75" calcext:value-type="float">
            <text:p>2527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50:51.0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035.30000000001" calcext:value-type="float">
            <text:p>6035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35.90000000001" calcext:value-type="float">
            <text:p>6635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1:27.100</text:p>
          </table:table-cell>
          <table:table-cell office:value-type="string" calcext:value-type="string">
            <text:p>2025-10-08 13:51:27.100</text:p>
          </table:table-cell>
          <table:table-cell office:value-type="string" calcext:value-type="string">
            <text:p>SHORT</text:p>
          </table:table-cell>
          <table:table-cell office:value-type="float" office:value="25274" calcext:value-type="float">
            <text:p>25274</text:p>
          </table:table-cell>
          <table:table-cell office:value-type="float" office:value="25264" calcext:value-type="float">
            <text:p>25264</text:p>
          </table:table-cell>
          <table:table-cell office:value-type="float" office:value="25279" calcext:value-type="float">
            <text:p>2527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51:28.600</text:p>
          </table:table-cell>
          <table:table-cell office:value-type="float" office:value="110" calcext:value-type="float">
            <text:p>110</text:p>
          </table:table-cell>
          <table:table-cell office:value-type="float" office:value="-39" calcext:value-type="float">
            <text:p>-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224.60000000001" calcext:value-type="float">
            <text:p>6224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25.20000000001" calcext:value-type="float">
            <text:p>6825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1:41.100</text:p>
          </table:table-cell>
          <table:table-cell office:value-type="string" calcext:value-type="string">
            <text:p>2025-10-08 13:51:41.100</text:p>
          </table:table-cell>
          <table:table-cell office:value-type="string" calcext:value-type="string">
            <text:p>SHORT</text:p>
          </table:table-cell>
          <table:table-cell office:value-type="float" office:value="25276.25" calcext:value-type="float">
            <text:p>25276.25</text:p>
          </table:table-cell>
          <table:table-cell office:value-type="float" office:value="25266.25" calcext:value-type="float">
            <text:p>25266.25</text:p>
          </table:table-cell>
          <table:table-cell office:value-type="float" office:value="25281.25" calcext:value-type="float">
            <text:p>2528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51:42.100</text:p>
          </table:table-cell>
          <table:table-cell office:value-type="float" office:value="85" calcext:value-type="float">
            <text:p>85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108.90000000001" calcext:value-type="float">
            <text:p>6108.90000000001</text:p>
          </table:table-cell>
          <table:table-cell office:value-type="float" office:value="1" calcext:value-type="float">
            <text:p>1</text:p>
          </table:table-cell>
          <table:table-cell office:value-type="float" office:value="6709.50000000001" calcext:value-type="float">
            <text:p>6709.50000000001</text:p>
          </table:table-cell>
          <table:table-cell office:value-type="float" office:value="6825.20000000001" calcext:value-type="float">
            <text:p>6825.2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4:27.000</text:p>
          </table:table-cell>
          <table:table-cell office:value-type="string" calcext:value-type="string">
            <text:p>2025-10-08 13:54:27.000</text:p>
          </table:table-cell>
          <table:table-cell office:value-type="string" calcext:value-type="string">
            <text:p>SHORT</text:p>
          </table:table-cell>
          <table:table-cell office:value-type="float" office:value="25269.5" calcext:value-type="float">
            <text:p>25269.5</text:p>
          </table:table-cell>
          <table:table-cell office:value-type="float" office:value="25259.5" calcext:value-type="float">
            <text:p>25259.5</text:p>
          </table:table-cell>
          <table:table-cell office:value-type="float" office:value="25274.5" calcext:value-type="float">
            <text:p>2527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54:28.000</text:p>
          </table:table-cell>
          <table:table-cell office:value-type="float" office:value="126" calcext:value-type="float">
            <text:p>126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288.20000000001" calcext:value-type="float">
            <text:p>6288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88.80000000001" calcext:value-type="float">
            <text:p>6888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6:16.500</text:p>
          </table:table-cell>
          <table:table-cell office:value-type="string" calcext:value-type="string">
            <text:p>2025-10-08 13:56:16.500</text:p>
          </table:table-cell>
          <table:table-cell office:value-type="string" calcext:value-type="string">
            <text:p>SHORT</text:p>
          </table:table-cell>
          <table:table-cell office:value-type="float" office:value="25269.75" calcext:value-type="float">
            <text:p>25269.75</text:p>
          </table:table-cell>
          <table:table-cell office:value-type="float" office:value="25259.75" calcext:value-type="float">
            <text:p>25259.75</text:p>
          </table:table-cell>
          <table:table-cell office:value-type="float" office:value="25274.75" calcext:value-type="float">
            <text:p>2527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7:56:18.200</text:p>
          </table:table-cell>
          <table:table-cell office:value-type="float" office:value="82" calcext:value-type="float">
            <text:p>8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477.50000000001" calcext:value-type="float">
            <text:p>6477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78.10000000001" calcext:value-type="float">
            <text:p>7078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8:15.600</text:p>
          </table:table-cell>
          <table:table-cell office:value-type="string" calcext:value-type="string">
            <text:p>2025-10-08 13:58:15.600</text:p>
          </table:table-cell>
          <table:table-cell office:value-type="string" calcext:value-type="string">
            <text:p>SHORT</text:p>
          </table:table-cell>
          <table:table-cell office:value-type="float" office:value="25269.25" calcext:value-type="float">
            <text:p>25269.25</text:p>
          </table:table-cell>
          <table:table-cell office:value-type="float" office:value="25259.25" calcext:value-type="float">
            <text:p>25259.25</text:p>
          </table:table-cell>
          <table:table-cell office:value-type="float" office:value="25274.25" calcext:value-type="float">
            <text:p>25274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58:16.600</text:p>
          </table:table-cell>
          <table:table-cell office:value-type="float" office:value="74" calcext:value-type="float">
            <text:p>7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661.80000000001" calcext:value-type="float">
            <text:p>6661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62.40000000001" calcext:value-type="float">
            <text:p>7262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8:17.500</text:p>
          </table:table-cell>
          <table:table-cell office:value-type="string" calcext:value-type="string">
            <text:p>2025-10-08 13:58:17.500</text:p>
          </table:table-cell>
          <table:table-cell office:value-type="string" calcext:value-type="string">
            <text:p>LONG</text:p>
          </table:table-cell>
          <table:table-cell office:value-type="float" office:value="25269.5" calcext:value-type="float">
            <text:p>25269.5</text:p>
          </table:table-cell>
          <table:table-cell office:value-type="float" office:value="25279.5" calcext:value-type="float">
            <text:p>25279.5</text:p>
          </table:table-cell>
          <table:table-cell office:value-type="float" office:value="25264.5" calcext:value-type="float">
            <text:p>2526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58:18.500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541.10000000001" calcext:value-type="float">
            <text:p>6541.10000000001</text:p>
          </table:table-cell>
          <table:table-cell office:value-type="float" office:value="1" calcext:value-type="float">
            <text:p>1</text:p>
          </table:table-cell>
          <table:table-cell office:value-type="float" office:value="7141.70000000001" calcext:value-type="float">
            <text:p>7141.70000000001</text:p>
          </table:table-cell>
          <table:table-cell office:value-type="float" office:value="7262.40000000001" calcext:value-type="float">
            <text:p>7262.4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8:19.000</text:p>
          </table:table-cell>
          <table:table-cell office:value-type="string" calcext:value-type="string">
            <text:p>2025-10-08 13:58:19.000</text:p>
          </table:table-cell>
          <table:table-cell office:value-type="string" calcext:value-type="string">
            <text:p>SHORT</text:p>
          </table:table-cell>
          <table:table-cell office:value-type="float" office:value="25269.5" calcext:value-type="float">
            <text:p>25269.5</text:p>
          </table:table-cell>
          <table:table-cell office:value-type="float" office:value="25259.5" calcext:value-type="float">
            <text:p>25259.5</text:p>
          </table:table-cell>
          <table:table-cell office:value-type="float" office:value="25274.5" calcext:value-type="float">
            <text:p>2527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58:20.000</text:p>
          </table:table-cell>
          <table:table-cell office:value-type="float" office:value="96" calcext:value-type="float">
            <text:p>96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725.40000000001" calcext:value-type="float">
            <text:p>6725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26.00000000001" calcext:value-type="float">
            <text:p>7326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7:59:00.700</text:p>
          </table:table-cell>
          <table:table-cell office:value-type="string" calcext:value-type="string">
            <text:p>2025-10-08 13:59:00.700</text:p>
          </table:table-cell>
          <table:table-cell office:value-type="string" calcext:value-type="string">
            <text:p>LONG</text:p>
          </table:table-cell>
          <table:table-cell office:value-type="float" office:value="25269.25" calcext:value-type="float">
            <text:p>25269.25</text:p>
          </table:table-cell>
          <table:table-cell office:value-type="float" office:value="25279.25" calcext:value-type="float">
            <text:p>25279.25</text:p>
          </table:table-cell>
          <table:table-cell office:value-type="float" office:value="25264.25" calcext:value-type="float">
            <text:p>25264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7:59:01.70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609.70000000001" calcext:value-type="float">
            <text:p>6609.70000000001</text:p>
          </table:table-cell>
          <table:table-cell office:value-type="float" office:value="1" calcext:value-type="float">
            <text:p>1</text:p>
          </table:table-cell>
          <table:table-cell office:value-type="float" office:value="7210.30000000001" calcext:value-type="float">
            <text:p>7210.30000000001</text:p>
          </table:table-cell>
          <table:table-cell office:value-type="float" office:value="7326.00000000001" calcext:value-type="float">
            <text:p>7326.0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01:54.600</text:p>
          </table:table-cell>
          <table:table-cell office:value-type="string" calcext:value-type="string">
            <text:p>2025-10-08 14:01:54.600</text:p>
          </table:table-cell>
          <table:table-cell office:value-type="string" calcext:value-type="string">
            <text:p>LONG</text:p>
          </table:table-cell>
          <table:table-cell office:value-type="float" office:value="25273.75" calcext:value-type="float">
            <text:p>25273.75</text:p>
          </table:table-cell>
          <table:table-cell office:value-type="float" office:value="25283.75" calcext:value-type="float">
            <text:p>25283.75</text:p>
          </table:table-cell>
          <table:table-cell office:value-type="float" office:value="25268.75" calcext:value-type="float">
            <text:p>2526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01:55.60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8 18:04:13.2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794.00000000001" calcext:value-type="float">
            <text:p>6794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94.60000000001" calcext:value-type="float">
            <text:p>7394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09:37.100</text:p>
          </table:table-cell>
          <table:table-cell office:value-type="string" calcext:value-type="string">
            <text:p>2025-10-08 14:09:37.100</text:p>
          </table:table-cell>
          <table:table-cell office:value-type="string" calcext:value-type="string">
            <text:p>SHORT</text:p>
          </table:table-cell>
          <table:table-cell office:value-type="float" office:value="25284.75" calcext:value-type="float">
            <text:p>25284.75</text:p>
          </table:table-cell>
          <table:table-cell office:value-type="float" office:value="25274.75" calcext:value-type="float">
            <text:p>25274.75</text:p>
          </table:table-cell>
          <table:table-cell office:value-type="float" office:value="25289.75" calcext:value-type="float">
            <text:p>2528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09:38.300</text:p>
          </table:table-cell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983.30000000001" calcext:value-type="float">
            <text:p>6983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83.90000000001" calcext:value-type="float">
            <text:p>7583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11:21.900</text:p>
          </table:table-cell>
          <table:table-cell office:value-type="string" calcext:value-type="string">
            <text:p>2025-10-08 14:11:21.900</text:p>
          </table:table-cell>
          <table:table-cell office:value-type="string" calcext:value-type="string">
            <text:p>LONG</text:p>
          </table:table-cell>
          <table:table-cell office:value-type="float" office:value="25286.25" calcext:value-type="float">
            <text:p>25286.25</text:p>
          </table:table-cell>
          <table:table-cell office:value-type="float" office:value="25296.25" calcext:value-type="float">
            <text:p>25296.25</text:p>
          </table:table-cell>
          <table:table-cell office:value-type="float" office:value="25281.25" calcext:value-type="float">
            <text:p>2528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11:22.900</text:p>
          </table:table-cell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862.60000000001" calcext:value-type="float">
            <text:p>6862.60000000001</text:p>
          </table:table-cell>
          <table:table-cell office:value-type="float" office:value="1" calcext:value-type="float">
            <text:p>1</text:p>
          </table:table-cell>
          <table:table-cell office:value-type="float" office:value="7463.20000000001" calcext:value-type="float">
            <text:p>7463.2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11:33.600</text:p>
          </table:table-cell>
          <table:table-cell office:value-type="string" calcext:value-type="string">
            <text:p>2025-10-08 14:11:33.600</text:p>
          </table:table-cell>
          <table:table-cell office:value-type="string" calcext:value-type="string">
            <text:p>LONG</text:p>
          </table:table-cell>
          <table:table-cell office:value-type="float" office:value="25285.75" calcext:value-type="float">
            <text:p>25285.75</text:p>
          </table:table-cell>
          <table:table-cell office:value-type="float" office:value="25295.75" calcext:value-type="float">
            <text:p>25295.75</text:p>
          </table:table-cell>
          <table:table-cell office:value-type="float" office:value="25280.75" calcext:value-type="float">
            <text:p>2528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11:35.6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751.90000000001" calcext:value-type="float">
            <text:p>6751.90000000001</text:p>
          </table:table-cell>
          <table:table-cell office:value-type="float" office:value="2" calcext:value-type="float">
            <text:p>2</text:p>
          </table:table-cell>
          <table:table-cell office:value-type="float" office:value="7352.50000000001" calcext:value-type="float">
            <text:p>7352.5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13:58.600</text:p>
          </table:table-cell>
          <table:table-cell office:value-type="string" calcext:value-type="string">
            <text:p>2025-10-08 14:13:58.600</text:p>
          </table:table-cell>
          <table:table-cell office:value-type="string" calcext:value-type="string">
            <text:p>SHORT</text:p>
          </table:table-cell>
          <table:table-cell office:value-type="float" office:value="25294" calcext:value-type="float">
            <text:p>25294</text:p>
          </table:table-cell>
          <table:table-cell office:value-type="float" office:value="25284" calcext:value-type="float">
            <text:p>25284</text:p>
          </table:table-cell>
          <table:table-cell office:value-type="float" office:value="25299" calcext:value-type="float">
            <text:p>2529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14:02.200</text:p>
          </table:table-cell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641.20000000001" calcext:value-type="float">
            <text:p>6641.20000000001</text:p>
          </table:table-cell>
          <table:table-cell office:value-type="float" office:value="3" calcext:value-type="float">
            <text:p>3</text:p>
          </table:table-cell>
          <table:table-cell office:value-type="float" office:value="7241.80000000001" calcext:value-type="float">
            <text:p>7241.8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342.099999999999" calcext:value-type="float">
            <text:p>-342.0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14:10.200</text:p>
          </table:table-cell>
          <table:table-cell office:value-type="string" calcext:value-type="string">
            <text:p>2025-10-08 14:14:10.200</text:p>
          </table:table-cell>
          <table:table-cell office:value-type="string" calcext:value-type="string">
            <text:p>LONG</text:p>
          </table:table-cell>
          <table:table-cell office:value-type="float" office:value="25293.75" calcext:value-type="float">
            <text:p>25293.75</text:p>
          </table:table-cell>
          <table:table-cell office:value-type="float" office:value="25303.75" calcext:value-type="float">
            <text:p>25303.75</text:p>
          </table:table-cell>
          <table:table-cell office:value-type="float" office:value="25288.75" calcext:value-type="float">
            <text:p>2528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14:10.800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830.50000000001" calcext:value-type="float">
            <text:p>6830.50000000001</text:p>
          </table:table-cell>
          <table:table-cell office:value-type="float" office:value="0" calcext:value-type="float">
            <text:p>0</text:p>
          </table:table-cell>
          <table:table-cell office:value-type="float" office:value="7431.10000000001" calcext:value-type="float">
            <text:p>7431.1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152.799999999999" calcext:value-type="float">
            <text:p>-152.7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17:30.000</text:p>
          </table:table-cell>
          <table:table-cell office:value-type="string" calcext:value-type="string">
            <text:p>2025-10-08 14:17:30.000</text:p>
          </table:table-cell>
          <table:table-cell office:value-type="string" calcext:value-type="string">
            <text:p>SHORT</text:p>
          </table:table-cell>
          <table:table-cell office:value-type="float" office:value="25294.5" calcext:value-type="float">
            <text:p>25294.5</text:p>
          </table:table-cell>
          <table:table-cell office:value-type="float" office:value="25284.5" calcext:value-type="float">
            <text:p>25284.5</text:p>
          </table:table-cell>
          <table:table-cell office:value-type="float" office:value="25299.5" calcext:value-type="float">
            <text:p>2529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17:30.200</text:p>
          </table:table-cell>
          <table:table-cell office:value-type="float" office:value="247" calcext:value-type="float">
            <text:p>24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719.80000000001" calcext:value-type="float">
            <text:p>6719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7320.40000000001" calcext:value-type="float">
            <text:p>7320.4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263.499999999999" calcext:value-type="float">
            <text:p>-263.4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21:37.400</text:p>
          </table:table-cell>
          <table:table-cell office:value-type="string" calcext:value-type="string">
            <text:p>2025-10-08 14:21:37.400</text:p>
          </table:table-cell>
          <table:table-cell office:value-type="string" calcext:value-type="string">
            <text:p>SHORT</text:p>
          </table:table-cell>
          <table:table-cell office:value-type="float" office:value="25290" calcext:value-type="float">
            <text:p>25290</text:p>
          </table:table-cell>
          <table:table-cell office:value-type="float" office:value="25280" calcext:value-type="float">
            <text:p>25280</text:p>
          </table:table-cell>
          <table:table-cell office:value-type="float" office:value="25295" calcext:value-type="float">
            <text:p>2529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21:38.400</text:p>
          </table:table-cell>
          <table:table-cell office:value-type="float" office:value="268" calcext:value-type="float">
            <text:p>26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889.10000000001" calcext:value-type="float">
            <text:p>6889.10000000001</text:p>
          </table:table-cell>
          <table:table-cell office:value-type="float" office:value="0" calcext:value-type="float">
            <text:p>0</text:p>
          </table:table-cell>
          <table:table-cell office:value-type="float" office:value="7489.70000000001" calcext:value-type="float">
            <text:p>7489.7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94.1999999999989" calcext:value-type="float">
            <text:p>-94.199999999998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32:01.200</text:p>
          </table:table-cell>
          <table:table-cell office:value-type="string" calcext:value-type="string">
            <text:p>2025-10-08 14:32:01.200</text:p>
          </table:table-cell>
          <table:table-cell office:value-type="string" calcext:value-type="string">
            <text:p>LONG</text:p>
          </table:table-cell>
          <table:table-cell office:value-type="float" office:value="25281" calcext:value-type="float">
            <text:p>25281</text:p>
          </table:table-cell>
          <table:table-cell office:value-type="float" office:value="25291" calcext:value-type="float">
            <text:p>25291</text:p>
          </table:table-cell>
          <table:table-cell office:value-type="float" office:value="25276" calcext:value-type="float">
            <text:p>2527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32:05.20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778.40000000001" calcext:value-type="float">
            <text:p>6778.40000000001</text:p>
          </table:table-cell>
          <table:table-cell office:value-type="float" office:value="1" calcext:value-type="float">
            <text:p>1</text:p>
          </table:table-cell>
          <table:table-cell office:value-type="float" office:value="7379.00000000001" calcext:value-type="float">
            <text:p>7379.0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204.899999999999" calcext:value-type="float">
            <text:p>-204.8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41:52.400</text:p>
          </table:table-cell>
          <table:table-cell office:value-type="string" calcext:value-type="string">
            <text:p>2025-10-08 14:41:52.400</text:p>
          </table:table-cell>
          <table:table-cell office:value-type="string" calcext:value-type="string">
            <text:p>LONG</text:p>
          </table:table-cell>
          <table:table-cell office:value-type="float" office:value="25281.25" calcext:value-type="float">
            <text:p>25281.25</text:p>
          </table:table-cell>
          <table:table-cell office:value-type="float" office:value="25291.25" calcext:value-type="float">
            <text:p>25291.25</text:p>
          </table:table-cell>
          <table:table-cell office:value-type="float" office:value="25276.25" calcext:value-type="float">
            <text:p>2527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41:53.40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962.70000000001" calcext:value-type="float">
            <text:p>6962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7563.30000000001" calcext:value-type="float">
            <text:p>7563.30000000001</text:p>
          </table:table-cell>
          <table:table-cell office:value-type="float" office:value="7583.90000000001" calcext:value-type="float">
            <text:p>7583.90000000001</text:p>
          </table:table-cell>
          <table:table-cell office:value-type="float" office:value="-20.5999999999985" calcext:value-type="float">
            <text:p>-20.5999999999985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43:03.800</text:p>
          </table:table-cell>
          <table:table-cell office:value-type="string" calcext:value-type="string">
            <text:p>2025-10-08 14:43:03.800</text:p>
          </table:table-cell>
          <table:table-cell office:value-type="string" calcext:value-type="string">
            <text:p>LONG</text:p>
          </table:table-cell>
          <table:table-cell office:value-type="float" office:value="25279" calcext:value-type="float">
            <text:p>25279</text:p>
          </table:table-cell>
          <table:table-cell office:value-type="float" office:value="25289" calcext:value-type="float">
            <text:p>25289</text:p>
          </table:table-cell>
          <table:table-cell office:value-type="float" office:value="25274" calcext:value-type="float">
            <text:p>2527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43:04.80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147.00000000001" calcext:value-type="float">
            <text:p>7147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47.60000000001" calcext:value-type="float">
            <text:p>7747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43:48.900</text:p>
          </table:table-cell>
          <table:table-cell office:value-type="string" calcext:value-type="string">
            <text:p>2025-10-08 14:43:48.900</text:p>
          </table:table-cell>
          <table:table-cell office:value-type="string" calcext:value-type="string">
            <text:p>SHORT</text:p>
          </table:table-cell>
          <table:table-cell office:value-type="float" office:value="25277.5" calcext:value-type="float">
            <text:p>25277.5</text:p>
          </table:table-cell>
          <table:table-cell office:value-type="float" office:value="25267.5" calcext:value-type="float">
            <text:p>25267.5</text:p>
          </table:table-cell>
          <table:table-cell office:value-type="float" office:value="25282.5" calcext:value-type="float">
            <text:p>2528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43:49.900</text:p>
          </table:table-cell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40.7" calcext:value-type="float">
            <text:p>-14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006.30000000001" calcext:value-type="float">
            <text:p>7006.30000000001</text:p>
          </table:table-cell>
          <table:table-cell office:value-type="float" office:value="1" calcext:value-type="float">
            <text:p>1</text:p>
          </table:table-cell>
          <table:table-cell office:value-type="float" office:value="7606.90000000001" calcext:value-type="float">
            <text:p>7606.90000000001</text:p>
          </table:table-cell>
          <table:table-cell office:value-type="float" office:value="7747.60000000001" calcext:value-type="float">
            <text:p>7747.60000000001</text:p>
          </table:table-cell>
          <table:table-cell office:value-type="float" office:value="-140.7" calcext:value-type="float">
            <text:p>-14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50:28.500</text:p>
          </table:table-cell>
          <table:table-cell office:value-type="string" calcext:value-type="string">
            <text:p>2025-10-08 14:50:28.500</text:p>
          </table:table-cell>
          <table:table-cell office:value-type="string" calcext:value-type="string">
            <text:p>SHORT</text:p>
          </table:table-cell>
          <table:table-cell office:value-type="float" office:value="25274.5" calcext:value-type="float">
            <text:p>25274.5</text:p>
          </table:table-cell>
          <table:table-cell office:value-type="float" office:value="25264.5" calcext:value-type="float">
            <text:p>25264.5</text:p>
          </table:table-cell>
          <table:table-cell office:value-type="float" office:value="25279.5" calcext:value-type="float">
            <text:p>2527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8:50:29.500</text:p>
          </table:table-cell>
          <table:table-cell office:value-type="float" office:value="170" calcext:value-type="float">
            <text:p>17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185.60000000001" calcext:value-type="float">
            <text:p>7185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86.20000000001" calcext:value-type="float">
            <text:p>7786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52:58.700</text:p>
          </table:table-cell>
          <table:table-cell office:value-type="string" calcext:value-type="string">
            <text:p>2025-10-08 14:52:58.700</text:p>
          </table:table-cell>
          <table:table-cell office:value-type="string" calcext:value-type="string">
            <text:p>LONG</text:p>
          </table:table-cell>
          <table:table-cell office:value-type="float" office:value="25278.25" calcext:value-type="float">
            <text:p>25278.25</text:p>
          </table:table-cell>
          <table:table-cell office:value-type="float" office:value="25288.25" calcext:value-type="float">
            <text:p>25288.25</text:p>
          </table:table-cell>
          <table:table-cell office:value-type="float" office:value="25273.25" calcext:value-type="float">
            <text:p>2527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53:00.800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374.90000000001" calcext:value-type="float">
            <text:p>7374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75.50000000001" calcext:value-type="float">
            <text:p>7975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53:46.500</text:p>
          </table:table-cell>
          <table:table-cell office:value-type="string" calcext:value-type="string">
            <text:p>2025-10-08 14:53:46.500</text:p>
          </table:table-cell>
          <table:table-cell office:value-type="string" calcext:value-type="string">
            <text:p>SHORT</text:p>
          </table:table-cell>
          <table:table-cell office:value-type="float" office:value="25270.25" calcext:value-type="float">
            <text:p>25270.25</text:p>
          </table:table-cell>
          <table:table-cell office:value-type="float" office:value="25260.25" calcext:value-type="float">
            <text:p>25260.25</text:p>
          </table:table-cell>
          <table:table-cell office:value-type="float" office:value="25275.25" calcext:value-type="float">
            <text:p>2527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53:47.300</text:p>
          </table:table-cell>
          <table:table-cell office:value-type="float" office:value="176" calcext:value-type="float">
            <text:p>176</text:p>
          </table:table-cell>
          <table:table-cell office:value-type="float" office:value="-84" calcext:value-type="float">
            <text:p>-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564.20000000001" calcext:value-type="float">
            <text:p>7564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64.80000000001" calcext:value-type="float">
            <text:p>8164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53:46.800</text:p>
          </table:table-cell>
          <table:table-cell office:value-type="string" calcext:value-type="string">
            <text:p>2025-10-08 14:53:46.800</text:p>
          </table:table-cell>
          <table:table-cell office:value-type="string" calcext:value-type="string">
            <text:p>LONG</text:p>
          </table:table-cell>
          <table:table-cell office:value-type="float" office:value="25270" calcext:value-type="float">
            <text:p>25270</text:p>
          </table:table-cell>
          <table:table-cell office:value-type="float" office:value="25280" calcext:value-type="float">
            <text:p>25280</text:p>
          </table:table-cell>
          <table:table-cell office:value-type="float" office:value="25265" calcext:value-type="float">
            <text:p>2526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53:47.30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453.50000000001" calcext:value-type="float">
            <text:p>7453.50000000001</text:p>
          </table:table-cell>
          <table:table-cell office:value-type="float" office:value="1" calcext:value-type="float">
            <text:p>1</text:p>
          </table:table-cell>
          <table:table-cell office:value-type="float" office:value="8054.10000000001" calcext:value-type="float">
            <text:p>8054.10000000001</text:p>
          </table:table-cell>
          <table:table-cell office:value-type="float" office:value="8164.80000000001" calcext:value-type="float">
            <text:p>8164.8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59:24.800</text:p>
          </table:table-cell>
          <table:table-cell office:value-type="string" calcext:value-type="string">
            <text:p>2025-10-08 14:59:24.800</text:p>
          </table:table-cell>
          <table:table-cell office:value-type="string" calcext:value-type="string">
            <text:p>LONG</text:p>
          </table:table-cell>
          <table:table-cell office:value-type="float" office:value="25272.5" calcext:value-type="float">
            <text:p>25272.5</text:p>
          </table:table-cell>
          <table:table-cell office:value-type="float" office:value="25282.5" calcext:value-type="float">
            <text:p>25282.5</text:p>
          </table:table-cell>
          <table:table-cell office:value-type="float" office:value="25267.5" calcext:value-type="float">
            <text:p>2526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59:26.90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342.80000000001" calcext:value-type="float">
            <text:p>7342.80000000001</text:p>
          </table:table-cell>
          <table:table-cell office:value-type="float" office:value="2" calcext:value-type="float">
            <text:p>2</text:p>
          </table:table-cell>
          <table:table-cell office:value-type="float" office:value="7943.40000000001" calcext:value-type="float">
            <text:p>7943.40000000001</text:p>
          </table:table-cell>
          <table:table-cell office:value-type="float" office:value="8164.80000000001" calcext:value-type="float">
            <text:p>8164.8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8:59:35.000</text:p>
          </table:table-cell>
          <table:table-cell office:value-type="string" calcext:value-type="string">
            <text:p>2025-10-08 14:59:35.000</text:p>
          </table:table-cell>
          <table:table-cell office:value-type="string" calcext:value-type="string">
            <text:p>LONG</text:p>
          </table:table-cell>
          <table:table-cell office:value-type="float" office:value="25272.75" calcext:value-type="float">
            <text:p>25272.75</text:p>
          </table:table-cell>
          <table:table-cell office:value-type="float" office:value="25282.75" calcext:value-type="float">
            <text:p>25282.75</text:p>
          </table:table-cell>
          <table:table-cell office:value-type="float" office:value="25267.75" calcext:value-type="float">
            <text:p>2526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8:59:39.20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232.10000000001" calcext:value-type="float">
            <text:p>7232.10000000001</text:p>
          </table:table-cell>
          <table:table-cell office:value-type="float" office:value="3" calcext:value-type="float">
            <text:p>3</text:p>
          </table:table-cell>
          <table:table-cell office:value-type="float" office:value="7832.70000000001" calcext:value-type="float">
            <text:p>7832.70000000001</text:p>
          </table:table-cell>
          <table:table-cell office:value-type="float" office:value="8164.80000000001" calcext:value-type="float">
            <text:p>8164.80000000001</text:p>
          </table:table-cell>
          <table:table-cell office:value-type="float" office:value="-332.099999999999" calcext:value-type="float">
            <text:p>-332.0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00:01.100</text:p>
          </table:table-cell>
          <table:table-cell office:value-type="string" calcext:value-type="string">
            <text:p>2025-10-08 15:00:01.100</text:p>
          </table:table-cell>
          <table:table-cell office:value-type="string" calcext:value-type="string">
            <text:p>SHORT</text:p>
          </table:table-cell>
          <table:table-cell office:value-type="float" office:value="25270.5" calcext:value-type="float">
            <text:p>25270.5</text:p>
          </table:table-cell>
          <table:table-cell office:value-type="float" office:value="25260.5" calcext:value-type="float">
            <text:p>25260.5</text:p>
          </table:table-cell>
          <table:table-cell office:value-type="float" office:value="25275.5" calcext:value-type="float">
            <text:p>2527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00:01.5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305.70000000001" calcext:value-type="float">
            <text:p>7305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8022.00000000001" calcext:value-type="float">
            <text:p>8022.00000000001</text:p>
          </table:table-cell>
          <table:table-cell office:value-type="float" office:value="8164.80000000001" calcext:value-type="float">
            <text:p>8164.80000000001</text:p>
          </table:table-cell>
          <table:table-cell office:value-type="float" office:value="-142.799999999999" calcext:value-type="float">
            <text:p>-142.799999999999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00:14.500</text:p>
          </table:table-cell>
          <table:table-cell office:value-type="string" calcext:value-type="string">
            <text:p>2025-10-08 15:00:14.500</text:p>
          </table:table-cell>
          <table:table-cell office:value-type="string" calcext:value-type="string">
            <text:p>SHORT</text:p>
          </table:table-cell>
          <table:table-cell office:value-type="float" office:value="25273.75" calcext:value-type="float">
            <text:p>25273.75</text:p>
          </table:table-cell>
          <table:table-cell office:value-type="float" office:value="25263.75" calcext:value-type="float">
            <text:p>25263.75</text:p>
          </table:table-cell>
          <table:table-cell office:value-type="float" office:value="25278.75" calcext:value-type="float">
            <text:p>2527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9:00:15.500</text:p>
          </table:table-cell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490.00000000001" calcext:value-type="float">
            <text:p>7490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06.30000000001" calcext:value-type="float">
            <text:p>8206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07:23.700</text:p>
          </table:table-cell>
          <table:table-cell office:value-type="string" calcext:value-type="string">
            <text:p>2025-10-08 15:07:23.700</text:p>
          </table:table-cell>
          <table:table-cell office:value-type="string" calcext:value-type="string">
            <text:p>SHORT</text:p>
          </table:table-cell>
          <table:table-cell office:value-type="float" office:value="25284.75" calcext:value-type="float">
            <text:p>25284.75</text:p>
          </table:table-cell>
          <table:table-cell office:value-type="float" office:value="25274.75" calcext:value-type="float">
            <text:p>25274.75</text:p>
          </table:table-cell>
          <table:table-cell office:value-type="float" office:value="25289.75" calcext:value-type="float">
            <text:p>2528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9:07:24.700</text:p>
          </table:table-cell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674.30000000001" calcext:value-type="float">
            <text:p>7674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90.60000000001" calcext:value-type="float">
            <text:p>8390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15:03.600</text:p>
          </table:table-cell>
          <table:table-cell office:value-type="string" calcext:value-type="string">
            <text:p>2025-10-08 15:15:03.600</text:p>
          </table:table-cell>
          <table:table-cell office:value-type="string" calcext:value-type="string">
            <text:p>LONG</text:p>
          </table:table-cell>
          <table:table-cell office:value-type="float" office:value="25295.75" calcext:value-type="float">
            <text:p>25295.75</text:p>
          </table:table-cell>
          <table:table-cell office:value-type="float" office:value="25305.75" calcext:value-type="float">
            <text:p>25305.75</text:p>
          </table:table-cell>
          <table:table-cell office:value-type="float" office:value="25290.75" calcext:value-type="float">
            <text:p>2529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15:07.10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563.60000000001" calcext:value-type="float">
            <text:p>7563.60000000001</text:p>
          </table:table-cell>
          <table:table-cell office:value-type="float" office:value="1" calcext:value-type="float">
            <text:p>1</text:p>
          </table:table-cell>
          <table:table-cell office:value-type="float" office:value="8279.90000000001" calcext:value-type="float">
            <text:p>8279.90000000001</text:p>
          </table:table-cell>
          <table:table-cell office:value-type="float" office:value="8390.60000000001" calcext:value-type="float">
            <text:p>8390.60000000001</text:p>
          </table:table-cell>
          <table:table-cell office:value-type="float" office:value="-110.700000000001" calcext:value-type="float">
            <text:p>-110.70000000000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17:12.000</text:p>
          </table:table-cell>
          <table:table-cell office:value-type="string" calcext:value-type="string">
            <text:p>2025-10-08 15:17:12.000</text:p>
          </table:table-cell>
          <table:table-cell office:value-type="string" calcext:value-type="string">
            <text:p>SHORT</text:p>
          </table:table-cell>
          <table:table-cell office:value-type="float" office:value="25300" calcext:value-type="float">
            <text:p>25300</text:p>
          </table:table-cell>
          <table:table-cell office:value-type="float" office:value="25290" calcext:value-type="float">
            <text:p>25290</text:p>
          </table:table-cell>
          <table:table-cell office:value-type="float" office:value="25305" calcext:value-type="float">
            <text:p>2530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9:17:13.000</text:p>
          </table:table-cell>
          <table:table-cell office:value-type="float" office:value="87" calcext:value-type="float">
            <text:p>87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747.90000000001" calcext:value-type="float">
            <text:p>7747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64.20000000001" calcext:value-type="float">
            <text:p>8464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19:01.100</text:p>
          </table:table-cell>
          <table:table-cell office:value-type="string" calcext:value-type="string">
            <text:p>2025-10-08 15:19:01.100</text:p>
          </table:table-cell>
          <table:table-cell office:value-type="string" calcext:value-type="string">
            <text:p>SHORT</text:p>
          </table:table-cell>
          <table:table-cell office:value-type="float" office:value="25302.75" calcext:value-type="float">
            <text:p>25302.75</text:p>
          </table:table-cell>
          <table:table-cell office:value-type="float" office:value="25292.75" calcext:value-type="float">
            <text:p>25292.75</text:p>
          </table:table-cell>
          <table:table-cell office:value-type="float" office:value="25307.75" calcext:value-type="float">
            <text:p>2530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19:02.200</text:p>
          </table:table-cell>
          <table:table-cell office:value-type="float" office:value="1242" calcext:value-type="float">
            <text:p>12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937.20000000001" calcext:value-type="float">
            <text:p>7937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53.50000000001" calcext:value-type="float">
            <text:p>8653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22:09.000</text:p>
          </table:table-cell>
          <table:table-cell office:value-type="string" calcext:value-type="string">
            <text:p>2025-10-08 15:22:09.000</text:p>
          </table:table-cell>
          <table:table-cell office:value-type="string" calcext:value-type="string">
            <text:p>SHORT</text:p>
          </table:table-cell>
          <table:table-cell office:value-type="float" office:value="25303.25" calcext:value-type="float">
            <text:p>25303.25</text:p>
          </table:table-cell>
          <table:table-cell office:value-type="float" office:value="25293.25" calcext:value-type="float">
            <text:p>25293.25</text:p>
          </table:table-cell>
          <table:table-cell office:value-type="float" office:value="25308.25" calcext:value-type="float">
            <text:p>2530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22:11.700</text:p>
          </table:table-cell>
          <table:table-cell office:value-type="float" office:value="83" calcext:value-type="float">
            <text:p>83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8126.50000000001" calcext:value-type="float">
            <text:p>8126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42.80000000001" calcext:value-type="float">
            <text:p>8842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22:14.100</text:p>
          </table:table-cell>
          <table:table-cell office:value-type="string" calcext:value-type="string">
            <text:p>2025-10-08 15:22:14.100</text:p>
          </table:table-cell>
          <table:table-cell office:value-type="string" calcext:value-type="string">
            <text:p>LONG</text:p>
          </table:table-cell>
          <table:table-cell office:value-type="float" office:value="25303.75" calcext:value-type="float">
            <text:p>25303.75</text:p>
          </table:table-cell>
          <table:table-cell office:value-type="float" office:value="25313.75" calcext:value-type="float">
            <text:p>25313.75</text:p>
          </table:table-cell>
          <table:table-cell office:value-type="float" office:value="25298.75" calcext:value-type="float">
            <text:p>2529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22:14.60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8015.80000000001" calcext:value-type="float">
            <text:p>8015.80000000001</text:p>
          </table:table-cell>
          <table:table-cell office:value-type="float" office:value="1" calcext:value-type="float">
            <text:p>1</text:p>
          </table:table-cell>
          <table:table-cell office:value-type="float" office:value="8732.10000000001" calcext:value-type="float">
            <text:p>8732.10000000001</text:p>
          </table:table-cell>
          <table:table-cell office:value-type="float" office:value="8842.80000000001" calcext:value-type="float">
            <text:p>8842.80000000001</text:p>
          </table:table-cell>
          <table:table-cell office:value-type="float" office:value="-110.700000000001" calcext:value-type="float">
            <text:p>-110.70000000000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22:40.200</text:p>
          </table:table-cell>
          <table:table-cell office:value-type="string" calcext:value-type="string">
            <text:p>2025-10-08 15:22:40.200</text:p>
          </table:table-cell>
          <table:table-cell office:value-type="string" calcext:value-type="string">
            <text:p>LONG</text:p>
          </table:table-cell>
          <table:table-cell office:value-type="float" office:value="25307" calcext:value-type="float">
            <text:p>25307</text:p>
          </table:table-cell>
          <table:table-cell office:value-type="float" office:value="25317" calcext:value-type="float">
            <text:p>25317</text:p>
          </table:table-cell>
          <table:table-cell office:value-type="float" office:value="25302" calcext:value-type="float">
            <text:p>2530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22:41.200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08 19:23:29.7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905.10000000001" calcext:value-type="float">
            <text:p>7905.10000000001</text:p>
          </table:table-cell>
          <table:table-cell office:value-type="float" office:value="2" calcext:value-type="float">
            <text:p>2</text:p>
          </table:table-cell>
          <table:table-cell office:value-type="float" office:value="8621.40000000001" calcext:value-type="float">
            <text:p>8621.40000000001</text:p>
          </table:table-cell>
          <table:table-cell office:value-type="float" office:value="8842.80000000001" calcext:value-type="float">
            <text:p>8842.80000000001</text:p>
          </table:table-cell>
          <table:table-cell office:value-type="float" office:value="-221.400000000001" calcext:value-type="float">
            <text:p>-221.40000000000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23:52.200</text:p>
          </table:table-cell>
          <table:table-cell office:value-type="string" calcext:value-type="string">
            <text:p>2025-10-08 15:23:52.200</text:p>
          </table:table-cell>
          <table:table-cell office:value-type="string" calcext:value-type="string">
            <text:p>LONG</text:p>
          </table:table-cell>
          <table:table-cell office:value-type="float" office:value="25302" calcext:value-type="float">
            <text:p>25302</text:p>
          </table:table-cell>
          <table:table-cell office:value-type="float" office:value="25312" calcext:value-type="float">
            <text:p>25312</text:p>
          </table:table-cell>
          <table:table-cell office:value-type="float" office:value="25297" calcext:value-type="float">
            <text:p>2529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9:23:53.2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789.40000000001" calcext:value-type="float">
            <text:p>7789.40000000001</text:p>
          </table:table-cell>
          <table:table-cell office:value-type="float" office:value="3" calcext:value-type="float">
            <text:p>3</text:p>
          </table:table-cell>
          <table:table-cell office:value-type="float" office:value="8505.70000000001" calcext:value-type="float">
            <text:p>8505.70000000001</text:p>
          </table:table-cell>
          <table:table-cell office:value-type="float" office:value="8842.80000000001" calcext:value-type="float">
            <text:p>8842.80000000001</text:p>
          </table:table-cell>
          <table:table-cell office:value-type="float" office:value="-337.100000000002" calcext:value-type="float">
            <text:p>-337.100000000002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39:15.200</text:p>
          </table:table-cell>
          <table:table-cell office:value-type="string" calcext:value-type="string">
            <text:p>2025-10-08 15:39:15.200</text:p>
          </table:table-cell>
          <table:table-cell office:value-type="string" calcext:value-type="string">
            <text:p>LONG</text:p>
          </table:table-cell>
          <table:table-cell office:value-type="float" office:value="25311.25" calcext:value-type="float">
            <text:p>25311.25</text:p>
          </table:table-cell>
          <table:table-cell office:value-type="float" office:value="25321.25" calcext:value-type="float">
            <text:p>25321.25</text:p>
          </table:table-cell>
          <table:table-cell office:value-type="float" office:value="25306.25" calcext:value-type="float">
            <text:p>2530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39:17.5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7978.70000000001" calcext:value-type="float">
            <text:p>7978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8695.00000000001" calcext:value-type="float">
            <text:p>8695.00000000001</text:p>
          </table:table-cell>
          <table:table-cell office:value-type="float" office:value="8842.80000000001" calcext:value-type="float">
            <text:p>8842.80000000001</text:p>
          </table:table-cell>
          <table:table-cell office:value-type="float" office:value="-147.800000000003" calcext:value-type="float">
            <text:p>-147.800000000003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55:20.800</text:p>
          </table:table-cell>
          <table:table-cell office:value-type="string" calcext:value-type="string">
            <text:p>2025-10-08 15:55:20.800</text:p>
          </table:table-cell>
          <table:table-cell office:value-type="string" calcext:value-type="string">
            <text:p>LONG</text:p>
          </table:table-cell>
          <table:table-cell office:value-type="float" office:value="25329.75" calcext:value-type="float">
            <text:p>25329.75</text:p>
          </table:table-cell>
          <table:table-cell office:value-type="float" office:value="25339.75" calcext:value-type="float">
            <text:p>25339.75</text:p>
          </table:table-cell>
          <table:table-cell office:value-type="float" office:value="25324.75" calcext:value-type="float">
            <text:p>2532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08 19:55:21.800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08 19:57:25.1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8163.00000000002" calcext:value-type="float">
            <text:p>8163.0000000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79.30000000001" calcext:value-type="float">
            <text:p>8879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58:58.100</text:p>
          </table:table-cell>
          <table:table-cell office:value-type="string" calcext:value-type="string">
            <text:p>2025-10-08 15:58:58.100</text:p>
          </table:table-cell>
          <table:table-cell office:value-type="string" calcext:value-type="string">
            <text:p>LONG</text:p>
          </table:table-cell>
          <table:table-cell office:value-type="float" office:value="25338" calcext:value-type="float">
            <text:p>25338</text:p>
          </table:table-cell>
          <table:table-cell office:value-type="float" office:value="25348" calcext:value-type="float">
            <text:p>25348</text:p>
          </table:table-cell>
          <table:table-cell office:value-type="float" office:value="25333" calcext:value-type="float">
            <text:p>2533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58:59.00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8352.30000000001" calcext:value-type="float">
            <text:p>8352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68.6" calcext:value-type="float">
            <text:p>906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2025-10-08 19:59:37.900</text:p>
          </table:table-cell>
          <table:table-cell office:value-type="string" calcext:value-type="string">
            <text:p>2025-10-08 15:59:37.900</text:p>
          </table:table-cell>
          <table:table-cell office:value-type="string" calcext:value-type="string">
            <text:p>LONG</text:p>
          </table:table-cell>
          <table:table-cell office:value-type="float" office:value="25334.5" calcext:value-type="float">
            <text:p>25334.5</text:p>
          </table:table-cell>
          <table:table-cell office:value-type="float" office:value="25344.5" calcext:value-type="float">
            <text:p>25344.5</text:p>
          </table:table-cell>
          <table:table-cell office:value-type="float" office:value="25329.5" calcext:value-type="float">
            <text:p>2532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08 19:59:39.00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122.5" calcext:value-type="float">
            <text:p>25122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8541.60000000001" calcext:value-type="float">
            <text:p>8541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57.9" calcext:value-type="float">
            <text:p>92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3:44:31.000</text:p>
          </table:table-cell>
          <table:table-cell office:value-type="string" calcext:value-type="string">
            <text:p>2025-10-10 09:44:31.000</text:p>
          </table:table-cell>
          <table:table-cell office:value-type="string" calcext:value-type="string">
            <text:p>LONG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78.75" calcext:value-type="float">
            <text:p>25378.75</text:p>
          </table:table-cell>
          <table:table-cell office:value-type="float" office:value="25363.75" calcext:value-type="float">
            <text:p>2536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3:44:32.000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3:45:17.6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3:56:10.600</text:p>
          </table:table-cell>
          <table:table-cell office:value-type="string" calcext:value-type="string">
            <text:p>2025-10-10 09:56:10.600</text:p>
          </table:table-cell>
          <table:table-cell office:value-type="string" calcext:value-type="string">
            <text:p>SHORT</text:p>
          </table:table-cell>
          <table:table-cell office:value-type="float" office:value="25342.75" calcext:value-type="float">
            <text:p>25342.75</text:p>
          </table:table-cell>
          <table:table-cell office:value-type="float" office:value="25332.75" calcext:value-type="float">
            <text:p>25332.75</text:p>
          </table:table-cell>
          <table:table-cell office:value-type="float" office:value="25347.75" calcext:value-type="float">
            <text:p>2534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3:56:11.600</text:p>
          </table:table-cell>
          <table:table-cell office:value-type="float" office:value="187" calcext:value-type="float">
            <text:p>187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3:56:53.6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8.6" calcext:value-type="float">
            <text:p>58.6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office:value-type="float" office:value="179.3" calcext:value-type="float">
            <text:p>179.3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3:58:41.600</text:p>
          </table:table-cell>
          <table:table-cell office:value-type="string" calcext:value-type="string">
            <text:p>2025-10-10 09:58:41.600</text:p>
          </table:table-cell>
          <table:table-cell office:value-type="string" calcext:value-type="string">
            <text:p>SHORT</text:p>
          </table:table-cell>
          <table:table-cell office:value-type="float" office:value="25358" calcext:value-type="float">
            <text:p>25358</text:p>
          </table:table-cell>
          <table:table-cell office:value-type="float" office:value="25348" calcext:value-type="float">
            <text:p>25348</text:p>
          </table:table-cell>
          <table:table-cell office:value-type="float" office:value="25363" calcext:value-type="float">
            <text:p>2536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3:58:42.900</text:p>
          </table:table-cell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3:59:25.4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-52.1" calcext:value-type="float">
            <text:p>-52.1</text:p>
          </table:table-cell>
          <table:table-cell office:value-type="float" office:value="2" calcext:value-type="float">
            <text:p>2</text:p>
          </table:table-cell>
          <table:table-cell office:value-type="float" office:value="-52.1" calcext:value-type="float">
            <text:p>-52.1</text:p>
          </table:table-cell>
          <table:table-cell office:value-type="float" office:value="179.3" calcext:value-type="float">
            <text:p>179.3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09:55.200</text:p>
          </table:table-cell>
          <table:table-cell office:value-type="string" calcext:value-type="string">
            <text:p>2025-10-10 10:09:55.200</text:p>
          </table:table-cell>
          <table:table-cell office:value-type="string" calcext:value-type="string">
            <text:p>LONG</text:p>
          </table:table-cell>
          <table:table-cell office:value-type="float" office:value="25350" calcext:value-type="float">
            <text:p>25350</text:p>
          </table:table-cell>
          <table:table-cell office:value-type="float" office:value="25360" calcext:value-type="float">
            <text:p>25360</text:p>
          </table:table-cell>
          <table:table-cell office:value-type="float" office:value="25345" calcext:value-type="float">
            <text:p>2534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09:56.200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office:value-type="float" office:value="179.3" calcext:value-type="float">
            <text:p>179.3</text:p>
          </table:table-cell>
          <table:table-cell office:value-type="float" office:value="-52.1" calcext:value-type="float">
            <text:p>-52.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16:53.000</text:p>
          </table:table-cell>
          <table:table-cell office:value-type="string" calcext:value-type="string">
            <text:p>2025-10-10 10:16:53.000</text:p>
          </table:table-cell>
          <table:table-cell office:value-type="string" calcext:value-type="string">
            <text:p>SHORT</text:p>
          </table:table-cell>
          <table:table-cell office:value-type="float" office:value="25309.75" calcext:value-type="float">
            <text:p>25309.75</text:p>
          </table:table-cell>
          <table:table-cell office:value-type="float" office:value="25299.75" calcext:value-type="float">
            <text:p>25299.75</text:p>
          </table:table-cell>
          <table:table-cell office:value-type="float" office:value="25314.75" calcext:value-type="float">
            <text:p>2531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16:54.00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195.8" calcext:value-type="float">
            <text:p>195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16:53.800</text:p>
          </table:table-cell>
          <table:table-cell office:value-type="string" calcext:value-type="string">
            <text:p>2025-10-10 10:16:53.800</text:p>
          </table:table-cell>
          <table:table-cell office:value-type="string" calcext:value-type="string">
            <text:p>SHORT</text:p>
          </table:table-cell>
          <table:table-cell office:value-type="float" office:value="25309.5" calcext:value-type="float">
            <text:p>25309.5</text:p>
          </table:table-cell>
          <table:table-cell office:value-type="float" office:value="25299.5" calcext:value-type="float">
            <text:p>25299.5</text:p>
          </table:table-cell>
          <table:table-cell office:value-type="float" office:value="25314.5" calcext:value-type="float">
            <text:p>2531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16:54.000</text:p>
          </table:table-cell>
          <table:table-cell office:value-type="float" office:value="92" calcext:value-type="float">
            <text:p>92</text:p>
          </table:table-cell>
          <table:table-cell office:value-type="float" office:value="-55" calcext:value-type="float">
            <text:p>-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85.1" calcext:value-type="float">
            <text:p>38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5.8" calcext:value-type="float">
            <text:p>50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16:57.100</text:p>
          </table:table-cell>
          <table:table-cell office:value-type="string" calcext:value-type="string">
            <text:p>2025-10-10 10:16:57.100</text:p>
          </table:table-cell>
          <table:table-cell office:value-type="string" calcext:value-type="string">
            <text:p>LONG</text:p>
          </table:table-cell>
          <table:table-cell office:value-type="float" office:value="25311.75" calcext:value-type="float">
            <text:p>25311.75</text:p>
          </table:table-cell>
          <table:table-cell office:value-type="float" office:value="25321.75" calcext:value-type="float">
            <text:p>25321.75</text:p>
          </table:table-cell>
          <table:table-cell office:value-type="float" office:value="25306.75" calcext:value-type="float">
            <text:p>2530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17:00.00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4:17:06.2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274.4" calcext:value-type="float">
            <text:p>274.4</text:p>
          </table:table-cell>
          <table:table-cell office:value-type="float" office:value="1" calcext:value-type="float">
            <text:p>1</text:p>
          </table:table-cell>
          <table:table-cell office:value-type="float" office:value="395.1" calcext:value-type="float">
            <text:p>395.1</text:p>
          </table:table-cell>
          <table:table-cell office:value-type="float" office:value="505.8" calcext:value-type="float">
            <text:p>505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17:45.900</text:p>
          </table:table-cell>
          <table:table-cell office:value-type="string" calcext:value-type="string">
            <text:p>2025-10-10 10:17:45.900</text:p>
          </table:table-cell>
          <table:table-cell office:value-type="string" calcext:value-type="string">
            <text:p>SHORT</text:p>
          </table:table-cell>
          <table:table-cell office:value-type="float" office:value="25310" calcext:value-type="float">
            <text:p>25310</text:p>
          </table:table-cell>
          <table:table-cell office:value-type="float" office:value="25300" calcext:value-type="float">
            <text:p>25300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17:46.800</text:p>
          </table:table-cell>
          <table:table-cell office:value-type="float" office:value="816" calcext:value-type="float">
            <text:p>8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63.7" calcext:value-type="float">
            <text:p>46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4.4" calcext:value-type="float">
            <text:p>58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18:50.700</text:p>
          </table:table-cell>
          <table:table-cell office:value-type="string" calcext:value-type="string">
            <text:p>2025-10-10 10:18:50.700</text:p>
          </table:table-cell>
          <table:table-cell office:value-type="string" calcext:value-type="string">
            <text:p>LONG</text:p>
          </table:table-cell>
          <table:table-cell office:value-type="float" office:value="25319.5" calcext:value-type="float">
            <text:p>25319.5</text:p>
          </table:table-cell>
          <table:table-cell office:value-type="float" office:value="25329.5" calcext:value-type="float">
            <text:p>25329.5</text:p>
          </table:table-cell>
          <table:table-cell office:value-type="float" office:value="25314.5" calcext:value-type="float">
            <text:p>2531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18:51.700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4:18:56.800</text:p>
          </table:table-cell>
          <table:table-cell office:value-type="float" office:value="-130.7" calcext:value-type="float">
            <text:p>-13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453.7" calcext:value-type="float">
            <text:p>453.7</text:p>
          </table:table-cell>
          <table:table-cell office:value-type="float" office:value="584.4" calcext:value-type="float">
            <text:p>584.4</text:p>
          </table:table-cell>
          <table:table-cell office:value-type="float" office:value="-130.7" calcext:value-type="float">
            <text:p>-13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20:31.600</text:p>
          </table:table-cell>
          <table:table-cell office:value-type="string" calcext:value-type="string">
            <text:p>2025-10-10 10:20:31.600</text:p>
          </table:table-cell>
          <table:table-cell office:value-type="string" calcext:value-type="string">
            <text:p>SHORT</text:p>
          </table:table-cell>
          <table:table-cell office:value-type="float" office:value="25326.25" calcext:value-type="float">
            <text:p>25326.25</text:p>
          </table:table-cell>
          <table:table-cell office:value-type="float" office:value="25316.25" calcext:value-type="float">
            <text:p>25316.25</text:p>
          </table:table-cell>
          <table:table-cell office:value-type="float" office:value="25331.25" calcext:value-type="float">
            <text:p>2533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20:32.6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02.3" calcext:value-type="float">
            <text:p>502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21:38.900</text:p>
          </table:table-cell>
          <table:table-cell office:value-type="string" calcext:value-type="string">
            <text:p>2025-10-10 10:21:38.900</text:p>
          </table:table-cell>
          <table:table-cell office:value-type="string" calcext:value-type="string">
            <text:p>LONG</text:p>
          </table:table-cell>
          <table:table-cell office:value-type="float" office:value="25338" calcext:value-type="float">
            <text:p>25338</text:p>
          </table:table-cell>
          <table:table-cell office:value-type="float" office:value="25348" calcext:value-type="float">
            <text:p>25348</text:p>
          </table:table-cell>
          <table:table-cell office:value-type="float" office:value="25333" calcext:value-type="float">
            <text:p>2533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21:39.9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4:22:45.5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86.6" calcext:value-type="float">
            <text:p>386.6</text:p>
          </table:table-cell>
          <table:table-cell office:value-type="float" office:value="1" calcext:value-type="float">
            <text:p>1</text:p>
          </table:table-cell>
          <table:table-cell office:value-type="float" office:value="507.3" calcext:value-type="float">
            <text:p>507.3</text:p>
          </table:table-cell>
          <table:table-cell office:value-type="float" office:value="623" calcext:value-type="float">
            <text:p>623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26:06.700</text:p>
          </table:table-cell>
          <table:table-cell office:value-type="string" calcext:value-type="string">
            <text:p>2025-10-10 10:26:06.700</text:p>
          </table:table-cell>
          <table:table-cell office:value-type="string" calcext:value-type="string">
            <text:p>LONG</text:p>
          </table:table-cell>
          <table:table-cell office:value-type="float" office:value="25344.5" calcext:value-type="float">
            <text:p>25344.5</text:p>
          </table:table-cell>
          <table:table-cell office:value-type="float" office:value="25354.5" calcext:value-type="float">
            <text:p>25354.5</text:p>
          </table:table-cell>
          <table:table-cell office:value-type="float" office:value="25339.5" calcext:value-type="float">
            <text:p>2533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26:07.700</text:p>
          </table:table-cell>
          <table:table-cell office:value-type="float" office:value="220" calcext:value-type="float">
            <text:p>220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55.9" calcext:value-type="float">
            <text:p>55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6.6" calcext:value-type="float">
            <text:p>67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26:25.200</text:p>
          </table:table-cell>
          <table:table-cell office:value-type="string" calcext:value-type="string">
            <text:p>2025-10-10 10:26:25.200</text:p>
          </table:table-cell>
          <table:table-cell office:value-type="string" calcext:value-type="string">
            <text:p>LONG</text:p>
          </table:table-cell>
          <table:table-cell office:value-type="float" office:value="25347.5" calcext:value-type="float">
            <text:p>25347.5</text:p>
          </table:table-cell>
          <table:table-cell office:value-type="float" office:value="25357.5" calcext:value-type="float">
            <text:p>25357.5</text:p>
          </table:table-cell>
          <table:table-cell office:value-type="float" office:value="25342.5" calcext:value-type="float">
            <text:p>2534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26:28.700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745.2" calcext:value-type="float">
            <text:p>745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5.9" calcext:value-type="float">
            <text:p>86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27:56.300</text:p>
          </table:table-cell>
          <table:table-cell office:value-type="string" calcext:value-type="string">
            <text:p>2025-10-10 10:27:56.300</text:p>
          </table:table-cell>
          <table:table-cell office:value-type="string" calcext:value-type="string">
            <text:p>SHORT</text:p>
          </table:table-cell>
          <table:table-cell office:value-type="float" office:value="25343.25" calcext:value-type="float">
            <text:p>25343.25</text:p>
          </table:table-cell>
          <table:table-cell office:value-type="float" office:value="25333.25" calcext:value-type="float">
            <text:p>25333.25</text:p>
          </table:table-cell>
          <table:table-cell office:value-type="float" office:value="25348.25" calcext:value-type="float">
            <text:p>2534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27:57.30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30.7" calcext:value-type="float">
            <text:p>-13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614.5" calcext:value-type="float">
            <text:p>614.5</text:p>
          </table:table-cell>
          <table:table-cell office:value-type="float" office:value="1" calcext:value-type="float">
            <text:p>1</text:p>
          </table:table-cell>
          <table:table-cell office:value-type="float" office:value="735.2" calcext:value-type="float">
            <text:p>735.2</text:p>
          </table:table-cell>
          <table:table-cell office:value-type="float" office:value="865.9" calcext:value-type="float">
            <text:p>865.9</text:p>
          </table:table-cell>
          <table:table-cell office:value-type="float" office:value="-130.7" calcext:value-type="float">
            <text:p>-13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29:38.700</text:p>
          </table:table-cell>
          <table:table-cell office:value-type="string" calcext:value-type="string">
            <text:p>2025-10-10 10:29:38.700</text:p>
          </table:table-cell>
          <table:table-cell office:value-type="string" calcext:value-type="string">
            <text:p>SHORT</text:p>
          </table:table-cell>
          <table:table-cell office:value-type="float" office:value="25337" calcext:value-type="float">
            <text:p>25337</text:p>
          </table:table-cell>
          <table:table-cell office:value-type="float" office:value="25327" calcext:value-type="float">
            <text:p>25327</text:p>
          </table:table-cell>
          <table:table-cell office:value-type="float" office:value="25342" calcext:value-type="float">
            <text:p>2534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29:39.700</text:p>
          </table:table-cell>
          <table:table-cell office:value-type="float" office:value="111" calcext:value-type="float">
            <text:p>111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4:30:40.4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93.8" calcext:value-type="float">
            <text:p>493.8</text:p>
          </table:table-cell>
          <table:table-cell office:value-type="float" office:value="2" calcext:value-type="float">
            <text:p>2</text:p>
          </table:table-cell>
          <table:table-cell office:value-type="float" office:value="614.5" calcext:value-type="float">
            <text:p>614.5</text:p>
          </table:table-cell>
          <table:table-cell office:value-type="float" office:value="865.9" calcext:value-type="float">
            <text:p>865.9</text:p>
          </table:table-cell>
          <table:table-cell office:value-type="float" office:value="-251.4" calcext:value-type="float">
            <text:p>-251.4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39:11.700</text:p>
          </table:table-cell>
          <table:table-cell office:value-type="string" calcext:value-type="string">
            <text:p>2025-10-10 10:39:11.700</text:p>
          </table:table-cell>
          <table:table-cell office:value-type="string" calcext:value-type="string">
            <text:p>LONG</text:p>
          </table:table-cell>
          <table:table-cell office:value-type="float" office:value="25335.75" calcext:value-type="float">
            <text:p>25335.75</text:p>
          </table:table-cell>
          <table:table-cell office:value-type="float" office:value="25345.75" calcext:value-type="float">
            <text:p>25345.75</text:p>
          </table:table-cell>
          <table:table-cell office:value-type="float" office:value="25330.75" calcext:value-type="float">
            <text:p>2533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39:13.900</text:p>
          </table:table-cell>
          <table:table-cell office:value-type="float" office:value="215" calcext:value-type="float">
            <text:p>215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4:40:20.3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3.1" calcext:value-type="float">
            <text:p>383.1</text:p>
          </table:table-cell>
          <table:table-cell office:value-type="float" office:value="3" calcext:value-type="float">
            <text:p>3</text:p>
          </table:table-cell>
          <table:table-cell office:value-type="float" office:value="503.8" calcext:value-type="float">
            <text:p>503.8</text:p>
          </table:table-cell>
          <table:table-cell office:value-type="float" office:value="865.9" calcext:value-type="float">
            <text:p>865.9</text:p>
          </table:table-cell>
          <table:table-cell office:value-type="float" office:value="-362.1" calcext:value-type="float">
            <text:p>-362.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40:27.900</text:p>
          </table:table-cell>
          <table:table-cell office:value-type="string" calcext:value-type="string">
            <text:p>2025-10-10 10:40:27.900</text:p>
          </table:table-cell>
          <table:table-cell office:value-type="string" calcext:value-type="string">
            <text:p>SHORT</text:p>
          </table:table-cell>
          <table:table-cell office:value-type="float" office:value="25329" calcext:value-type="float">
            <text:p>25329</text:p>
          </table:table-cell>
          <table:table-cell office:value-type="float" office:value="25319" calcext:value-type="float">
            <text:p>25319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40:28.900</text:p>
          </table:table-cell>
          <table:table-cell office:value-type="float" office:value="208" calcext:value-type="float">
            <text:p>208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4:41:4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52.4" calcext:value-type="float">
            <text:p>552.4</text:p>
          </table:table-cell>
          <table:table-cell office:value-type="float" office:value="0" calcext:value-type="float">
            <text:p>0</text:p>
          </table:table-cell>
          <table:table-cell office:value-type="float" office:value="673.1" calcext:value-type="float">
            <text:p>673.1</text:p>
          </table:table-cell>
          <table:table-cell office:value-type="float" office:value="865.9" calcext:value-type="float">
            <text:p>865.9</text:p>
          </table:table-cell>
          <table:table-cell office:value-type="float" office:value="-192.8" calcext:value-type="float">
            <text:p>-192.8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42:04.000</text:p>
          </table:table-cell>
          <table:table-cell office:value-type="string" calcext:value-type="string">
            <text:p>2025-10-10 10:42:04.000</text:p>
          </table:table-cell>
          <table:table-cell office:value-type="string" calcext:value-type="string">
            <text:p>LONG</text:p>
          </table:table-cell>
          <table:table-cell office:value-type="float" office:value="25322.25" calcext:value-type="float">
            <text:p>25322.25</text:p>
          </table:table-cell>
          <table:table-cell office:value-type="float" office:value="25332.25" calcext:value-type="float">
            <text:p>25332.25</text:p>
          </table:table-cell>
          <table:table-cell office:value-type="float" office:value="25317.25" calcext:value-type="float">
            <text:p>2531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42:07.10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4:42:15.1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41.7" calcext:value-type="float">
            <text:p>441.7</text:p>
          </table:table-cell>
          <table:table-cell office:value-type="float" office:value="1" calcext:value-type="float">
            <text:p>1</text:p>
          </table:table-cell>
          <table:table-cell office:value-type="float" office:value="562.4" calcext:value-type="float">
            <text:p>562.4</text:p>
          </table:table-cell>
          <table:table-cell office:value-type="float" office:value="865.9" calcext:value-type="float">
            <text:p>865.9</text:p>
          </table:table-cell>
          <table:table-cell office:value-type="float" office:value="-303.5" calcext:value-type="float">
            <text:p>-303.5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44:49.300</text:p>
          </table:table-cell>
          <table:table-cell office:value-type="string" calcext:value-type="string">
            <text:p>2025-10-10 10:44:49.300</text:p>
          </table:table-cell>
          <table:table-cell office:value-type="string" calcext:value-type="string">
            <text:p>LONG</text:p>
          </table:table-cell>
          <table:table-cell office:value-type="float" office:value="25338" calcext:value-type="float">
            <text:p>25338</text:p>
          </table:table-cell>
          <table:table-cell office:value-type="float" office:value="25348" calcext:value-type="float">
            <text:p>25348</text:p>
          </table:table-cell>
          <table:table-cell office:value-type="float" office:value="25333" calcext:value-type="float">
            <text:p>2533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4:44:54.100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4:47:47.9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751.7" calcext:value-type="float">
            <text:p>751.7</text:p>
          </table:table-cell>
          <table:table-cell office:value-type="float" office:value="865.9" calcext:value-type="float">
            <text:p>865.9</text:p>
          </table:table-cell>
          <table:table-cell office:value-type="float" office:value="-114.2" calcext:value-type="float">
            <text:p>-114.2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50:47.000</text:p>
          </table:table-cell>
          <table:table-cell office:value-type="string" calcext:value-type="string">
            <text:p>2025-10-10 10:50:47.000</text:p>
          </table:table-cell>
          <table:table-cell office:value-type="string" calcext:value-type="string">
            <text:p>LONG</text:p>
          </table:table-cell>
          <table:table-cell office:value-type="float" office:value="25345.25" calcext:value-type="float">
            <text:p>25345.25</text:p>
          </table:table-cell>
          <table:table-cell office:value-type="float" office:value="25355.25" calcext:value-type="float">
            <text:p>25355.25</text:p>
          </table:table-cell>
          <table:table-cell office:value-type="float" office:value="25340.25" calcext:value-type="float">
            <text:p>2534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50:48.00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10.3" calcext:value-type="float">
            <text:p>81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4:57:09.700</text:p>
          </table:table-cell>
          <table:table-cell office:value-type="string" calcext:value-type="string">
            <text:p>2025-10-10 10:57:09.700</text:p>
          </table:table-cell>
          <table:table-cell office:value-type="string" calcext:value-type="string">
            <text:p>LONG</text:p>
          </table:table-cell>
          <table:table-cell office:value-type="float" office:value="25340.5" calcext:value-type="float">
            <text:p>25340.5</text:p>
          </table:table-cell>
          <table:table-cell office:value-type="float" office:value="25350.5" calcext:value-type="float">
            <text:p>25350.5</text:p>
          </table:table-cell>
          <table:table-cell office:value-type="float" office:value="25335.5" calcext:value-type="float">
            <text:p>2533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4:57:10.700</text:p>
          </table:table-cell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89.6" calcext:value-type="float">
            <text:p>989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0.3" calcext:value-type="float">
            <text:p>11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11:23.100</text:p>
          </table:table-cell>
          <table:table-cell office:value-type="string" calcext:value-type="string">
            <text:p>2025-10-10 12:11:23.100</text:p>
          </table:table-cell>
          <table:table-cell office:value-type="string" calcext:value-type="string">
            <text:p>SHORT</text:p>
          </table:table-cell>
          <table:table-cell office:value-type="float" office:value="24766.5" calcext:value-type="float">
            <text:p>24766.5</text:p>
          </table:table-cell>
          <table:table-cell office:value-type="float" office:value="24756.5" calcext:value-type="float">
            <text:p>24756.5</text:p>
          </table:table-cell>
          <table:table-cell office:value-type="float" office:value="24771.5" calcext:value-type="float">
            <text:p>2477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11:24.600</text:p>
          </table:table-cell>
          <table:table-cell office:value-type="float" office:value="83" calcext:value-type="float">
            <text:p>83</text:p>
          </table:table-cell>
          <table:table-cell office:value-type="float" office:value="-49" calcext:value-type="float">
            <text:p>-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11:31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78.9" calcext:value-type="float">
            <text:p>878.9</text:p>
          </table:table-cell>
          <table:table-cell office:value-type="float" office:value="1" calcext:value-type="float">
            <text:p>1</text:p>
          </table:table-cell>
          <table:table-cell office:value-type="float" office:value="999.6" calcext:value-type="float">
            <text:p>999.6</text:p>
          </table:table-cell>
          <table:table-cell office:value-type="float" office:value="1110.3" calcext:value-type="float">
            <text:p>1110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14:12.200</text:p>
          </table:table-cell>
          <table:table-cell office:value-type="string" calcext:value-type="string">
            <text:p>2025-10-10 12:14:12.200</text:p>
          </table:table-cell>
          <table:table-cell office:value-type="string" calcext:value-type="string">
            <text:p>SHORT</text:p>
          </table:table-cell>
          <table:table-cell office:value-type="float" office:value="24812.75" calcext:value-type="float">
            <text:p>24812.75</text:p>
          </table:table-cell>
          <table:table-cell office:value-type="float" office:value="24802.75" calcext:value-type="float">
            <text:p>24802.75</text:p>
          </table:table-cell>
          <table:table-cell office:value-type="float" office:value="24817.75" calcext:value-type="float">
            <text:p>2481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14:13.200</text:p>
          </table:table-cell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14:23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63.2" calcext:value-type="float">
            <text:p>763.2</text:p>
          </table:table-cell>
          <table:table-cell office:value-type="float" office:value="2" calcext:value-type="float">
            <text:p>2</text:p>
          </table:table-cell>
          <table:table-cell office:value-type="float" office:value="883.9" calcext:value-type="float">
            <text:p>883.9</text:p>
          </table:table-cell>
          <table:table-cell office:value-type="float" office:value="1110.3" calcext:value-type="float">
            <text:p>1110.3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14:27.200</text:p>
          </table:table-cell>
          <table:table-cell office:value-type="string" calcext:value-type="string">
            <text:p>2025-10-10 12:14:27.200</text:p>
          </table:table-cell>
          <table:table-cell office:value-type="string" calcext:value-type="string">
            <text:p>SHORT</text:p>
          </table:table-cell>
          <table:table-cell office:value-type="float" office:value="24815" calcext:value-type="float">
            <text:p>24815</text:p>
          </table:table-cell>
          <table:table-cell office:value-type="float" office:value="24805" calcext:value-type="float">
            <text:p>24805</text:p>
          </table:table-cell>
          <table:table-cell office:value-type="float" office:value="24820" calcext:value-type="float">
            <text:p>2482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14:28.200</text:p>
          </table:table-cell>
          <table:table-cell office:value-type="float" office:value="114" calcext:value-type="float">
            <text:p>114</text:p>
          </table:table-cell>
          <table:table-cell office:value-type="float" office:value="-35" calcext:value-type="float">
            <text:p>-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15:07.5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42.5" calcext:value-type="float">
            <text:p>642.5</text:p>
          </table:table-cell>
          <table:table-cell office:value-type="float" office:value="3" calcext:value-type="float">
            <text:p>3</text:p>
          </table:table-cell>
          <table:table-cell office:value-type="float" office:value="763.2" calcext:value-type="float">
            <text:p>763.2</text:p>
          </table:table-cell>
          <table:table-cell office:value-type="float" office:value="1110.3" calcext:value-type="float">
            <text:p>1110.3</text:p>
          </table:table-cell>
          <table:table-cell office:value-type="float" office:value="-347.1" calcext:value-type="float">
            <text:p>-347.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39:07.900</text:p>
          </table:table-cell>
          <table:table-cell office:value-type="string" calcext:value-type="string">
            <text:p>2025-10-10 12:39:07.900</text:p>
          </table:table-cell>
          <table:table-cell office:value-type="string" calcext:value-type="string">
            <text:p>LONG</text:p>
          </table:table-cell>
          <table:table-cell office:value-type="float" office:value="24782.5" calcext:value-type="float">
            <text:p>24782.5</text:p>
          </table:table-cell>
          <table:table-cell office:value-type="float" office:value="24792.5" calcext:value-type="float">
            <text:p>24792.5</text:p>
          </table:table-cell>
          <table:table-cell office:value-type="float" office:value="24777.5" calcext:value-type="float">
            <text:p>2477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39:08.90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26.8" calcext:value-type="float">
            <text:p>826.8</text:p>
          </table:table-cell>
          <table:table-cell office:value-type="float" office:value="0" calcext:value-type="float">
            <text:p>0</text:p>
          </table:table-cell>
          <table:table-cell office:value-type="float" office:value="947.5" calcext:value-type="float">
            <text:p>947.5</text:p>
          </table:table-cell>
          <table:table-cell office:value-type="float" office:value="1110.3" calcext:value-type="float">
            <text:p>1110.3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39:28.000</text:p>
          </table:table-cell>
          <table:table-cell office:value-type="string" calcext:value-type="string">
            <text:p>2025-10-10 12:39:28.000</text:p>
          </table:table-cell>
          <table:table-cell office:value-type="string" calcext:value-type="string">
            <text:p>LONG</text:p>
          </table:table-cell>
          <table:table-cell office:value-type="float" office:value="24778" calcext:value-type="float">
            <text:p>24778</text:p>
          </table:table-cell>
          <table:table-cell office:value-type="float" office:value="24788" calcext:value-type="float">
            <text:p>24788</text:p>
          </table:table-cell>
          <table:table-cell office:value-type="float" office:value="24773" calcext:value-type="float">
            <text:p>2477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39:29.000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6:40:15.7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06.1" calcext:value-type="float">
            <text:p>1006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6.8" calcext:value-type="float">
            <text:p>11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23.300</text:p>
          </table:table-cell>
          <table:table-cell office:value-type="string" calcext:value-type="string">
            <text:p>2025-10-10 12:40:23.300</text:p>
          </table:table-cell>
          <table:table-cell office:value-type="string" calcext:value-type="string">
            <text:p>LONG</text:p>
          </table:table-cell>
          <table:table-cell office:value-type="float" office:value="24785.5" calcext:value-type="float">
            <text:p>24785.5</text:p>
          </table:table-cell>
          <table:table-cell office:value-type="float" office:value="24795.5" calcext:value-type="float">
            <text:p>24795.5</text:p>
          </table:table-cell>
          <table:table-cell office:value-type="float" office:value="24780.5" calcext:value-type="float">
            <text:p>2478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0:27.400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195.4" calcext:value-type="float">
            <text:p>1195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6.1" calcext:value-type="float">
            <text:p>13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25.000</text:p>
          </table:table-cell>
          <table:table-cell office:value-type="string" calcext:value-type="string">
            <text:p>2025-10-10 12:40:25.000</text:p>
          </table:table-cell>
          <table:table-cell office:value-type="string" calcext:value-type="string">
            <text:p>LONG</text:p>
          </table:table-cell>
          <table:table-cell office:value-type="float" office:value="24785" calcext:value-type="float">
            <text:p>24785</text:p>
          </table:table-cell>
          <table:table-cell office:value-type="float" office:value="24795" calcext:value-type="float">
            <text:p>24795</text:p>
          </table:table-cell>
          <table:table-cell office:value-type="float" office:value="24780" calcext:value-type="float">
            <text:p>2478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0:28.300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84.7" calcext:value-type="float">
            <text:p>138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5.4" calcext:value-type="float">
            <text:p>150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31.500</text:p>
          </table:table-cell>
          <table:table-cell office:value-type="string" calcext:value-type="string">
            <text:p>2025-10-10 12:40:31.500</text:p>
          </table:table-cell>
          <table:table-cell office:value-type="string" calcext:value-type="string">
            <text:p>LONG</text:p>
          </table:table-cell>
          <table:table-cell office:value-type="float" office:value="24788.25" calcext:value-type="float">
            <text:p>24788.25</text:p>
          </table:table-cell>
          <table:table-cell office:value-type="float" office:value="24798.25" calcext:value-type="float">
            <text:p>24798.25</text:p>
          </table:table-cell>
          <table:table-cell office:value-type="float" office:value="24783.25" calcext:value-type="float">
            <text:p>2478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0:34.70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4.7" calcext:value-type="float">
            <text:p>169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48.100</text:p>
          </table:table-cell>
          <table:table-cell office:value-type="string" calcext:value-type="string">
            <text:p>2025-10-10 12:40:48.100</text:p>
          </table:table-cell>
          <table:table-cell office:value-type="string" calcext:value-type="string">
            <text:p>LONG</text:p>
          </table:table-cell>
          <table:table-cell office:value-type="float" office:value="24783.25" calcext:value-type="float">
            <text:p>24783.25</text:p>
          </table:table-cell>
          <table:table-cell office:value-type="float" office:value="24793.25" calcext:value-type="float">
            <text:p>24793.25</text:p>
          </table:table-cell>
          <table:table-cell office:value-type="float" office:value="24778.25" calcext:value-type="float">
            <text:p>2477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0:49.100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753.3" calcext:value-type="float">
            <text:p>175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50.900</text:p>
          </table:table-cell>
          <table:table-cell office:value-type="string" calcext:value-type="string">
            <text:p>2025-10-10 12:40:50.900</text:p>
          </table:table-cell>
          <table:table-cell office:value-type="string" calcext:value-type="string">
            <text:p>LONG</text:p>
          </table:table-cell>
          <table:table-cell office:value-type="float" office:value="24784.5" calcext:value-type="float">
            <text:p>24784.5</text:p>
          </table:table-cell>
          <table:table-cell office:value-type="float" office:value="24794.5" calcext:value-type="float">
            <text:p>24794.5</text:p>
          </table:table-cell>
          <table:table-cell office:value-type="float" office:value="24779.5" calcext:value-type="float">
            <text:p>2477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0:51.900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32.6" calcext:value-type="float">
            <text:p>1932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53.3" calcext:value-type="float">
            <text:p>205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51.900</text:p>
          </table:table-cell>
          <table:table-cell office:value-type="string" calcext:value-type="string">
            <text:p>2025-10-10 12:40:51.900</text:p>
          </table:table-cell>
          <table:table-cell office:value-type="string" calcext:value-type="string">
            <text:p>LONG</text:p>
          </table:table-cell>
          <table:table-cell office:value-type="float" office:value="24785" calcext:value-type="float">
            <text:p>24785</text:p>
          </table:table-cell>
          <table:table-cell office:value-type="float" office:value="24795" calcext:value-type="float">
            <text:p>24795</text:p>
          </table:table-cell>
          <table:table-cell office:value-type="float" office:value="24780" calcext:value-type="float">
            <text:p>2478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0:52.900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111.9" calcext:value-type="float">
            <text:p>2111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32.6" calcext:value-type="float">
            <text:p>22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0:57.700</text:p>
          </table:table-cell>
          <table:table-cell office:value-type="string" calcext:value-type="string">
            <text:p>2025-10-10 12:40:57.700</text:p>
          </table:table-cell>
          <table:table-cell office:value-type="string" calcext:value-type="string">
            <text:p>LONG</text:p>
          </table:table-cell>
          <table:table-cell office:value-type="float" office:value="24779" calcext:value-type="float">
            <text:p>24779</text:p>
          </table:table-cell>
          <table:table-cell office:value-type="float" office:value="24789" calcext:value-type="float">
            <text:p>24789</text:p>
          </table:table-cell>
          <table:table-cell office:value-type="float" office:value="24774" calcext:value-type="float">
            <text:p>2477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0:58.70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291.2" calcext:value-type="float">
            <text:p>229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1.9" calcext:value-type="float">
            <text:p>24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06.600</text:p>
          </table:table-cell>
          <table:table-cell office:value-type="string" calcext:value-type="string">
            <text:p>2025-10-10 12:41:06.600</text:p>
          </table:table-cell>
          <table:table-cell office:value-type="string" calcext:value-type="string">
            <text:p>LONG</text:p>
          </table:table-cell>
          <table:table-cell office:value-type="float" office:value="24777.5" calcext:value-type="float">
            <text:p>24777.5</text:p>
          </table:table-cell>
          <table:table-cell office:value-type="float" office:value="24787.5" calcext:value-type="float">
            <text:p>24787.5</text:p>
          </table:table-cell>
          <table:table-cell office:value-type="float" office:value="24772.5" calcext:value-type="float">
            <text:p>2477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1:07.600</text:p>
          </table:table-cell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475.5" calcext:value-type="float">
            <text:p>247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6.2" calcext:value-type="float">
            <text:p>259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15.200</text:p>
          </table:table-cell>
          <table:table-cell office:value-type="string" calcext:value-type="string">
            <text:p>2025-10-10 12:41:15.200</text:p>
          </table:table-cell>
          <table:table-cell office:value-type="string" calcext:value-type="string">
            <text:p>LONG</text:p>
          </table:table-cell>
          <table:table-cell office:value-type="float" office:value="24772.25" calcext:value-type="float">
            <text:p>24772.25</text:p>
          </table:table-cell>
          <table:table-cell office:value-type="float" office:value="24782.25" calcext:value-type="float">
            <text:p>24782.25</text:p>
          </table:table-cell>
          <table:table-cell office:value-type="float" office:value="24767.25" calcext:value-type="float">
            <text:p>2476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1:17.000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64.8" calcext:value-type="float">
            <text:p>266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85.5" calcext:value-type="float">
            <text:p>27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18.900</text:p>
          </table:table-cell>
          <table:table-cell office:value-type="string" calcext:value-type="string">
            <text:p>2025-10-10 12:41:18.900</text:p>
          </table:table-cell>
          <table:table-cell office:value-type="string" calcext:value-type="string">
            <text:p>LONG</text:p>
          </table:table-cell>
          <table:table-cell office:value-type="float" office:value="24773.5" calcext:value-type="float">
            <text:p>24773.5</text:p>
          </table:table-cell>
          <table:table-cell office:value-type="float" office:value="24783.5" calcext:value-type="float">
            <text:p>24783.5</text:p>
          </table:table-cell>
          <table:table-cell office:value-type="float" office:value="24768.5" calcext:value-type="float">
            <text:p>2476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1:21.800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854.1" calcext:value-type="float">
            <text:p>285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74.8" calcext:value-type="float">
            <text:p>297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20.500</text:p>
          </table:table-cell>
          <table:table-cell office:value-type="string" calcext:value-type="string">
            <text:p>2025-10-10 12:41:20.500</text:p>
          </table:table-cell>
          <table:table-cell office:value-type="string" calcext:value-type="string">
            <text:p>LONG</text:p>
          </table:table-cell>
          <table:table-cell office:value-type="float" office:value="24774.25" calcext:value-type="float">
            <text:p>24774.25</text:p>
          </table:table-cell>
          <table:table-cell office:value-type="float" office:value="24784.25" calcext:value-type="float">
            <text:p>24784.25</text:p>
          </table:table-cell>
          <table:table-cell office:value-type="float" office:value="24769.25" calcext:value-type="float">
            <text:p>24769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1:21.50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033.4" calcext:value-type="float">
            <text:p>303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4.1" calcext:value-type="float">
            <text:p>315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25.400</text:p>
          </table:table-cell>
          <table:table-cell office:value-type="string" calcext:value-type="string">
            <text:p>2025-10-10 12:41:25.400</text:p>
          </table:table-cell>
          <table:table-cell office:value-type="string" calcext:value-type="string">
            <text:p>LONG</text:p>
          </table:table-cell>
          <table:table-cell office:value-type="float" office:value="24770.5" calcext:value-type="float">
            <text:p>24770.5</text:p>
          </table:table-cell>
          <table:table-cell office:value-type="float" office:value="24780.5" calcext:value-type="float">
            <text:p>24780.5</text:p>
          </table:table-cell>
          <table:table-cell office:value-type="float" office:value="24765.5" calcext:value-type="float">
            <text:p>2476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1:27.00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22.7" calcext:value-type="float">
            <text:p>3222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43.4" calcext:value-type="float">
            <text:p>334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35.100</text:p>
          </table:table-cell>
          <table:table-cell office:value-type="string" calcext:value-type="string">
            <text:p>2025-10-10 12:41:35.100</text:p>
          </table:table-cell>
          <table:table-cell office:value-type="string" calcext:value-type="string">
            <text:p>LONG</text:p>
          </table:table-cell>
          <table:table-cell office:value-type="float" office:value="24770" calcext:value-type="float">
            <text:p>24770</text:p>
          </table:table-cell>
          <table:table-cell office:value-type="float" office:value="24780" calcext:value-type="float">
            <text:p>24780</text:p>
          </table:table-cell>
          <table:table-cell office:value-type="float" office:value="24765" calcext:value-type="float">
            <text:p>2476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1:36.100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41:39.5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102" calcext:value-type="float">
            <text:p>3102</text:p>
          </table:table-cell>
          <table:table-cell office:value-type="float" office:value="1" calcext:value-type="float">
            <text:p>1</text:p>
          </table:table-cell>
          <table:table-cell office:value-type="float" office:value="3222.7" calcext:value-type="float">
            <text:p>3222.7</text:p>
          </table:table-cell>
          <table:table-cell office:value-type="float" office:value="3343.4" calcext:value-type="float">
            <text:p>3343.4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1:41.800</text:p>
          </table:table-cell>
          <table:table-cell office:value-type="string" calcext:value-type="string">
            <text:p>2025-10-10 12:41:41.800</text:p>
          </table:table-cell>
          <table:table-cell office:value-type="string" calcext:value-type="string">
            <text:p>LONG</text:p>
          </table:table-cell>
          <table:table-cell office:value-type="float" office:value="24767.75" calcext:value-type="float">
            <text:p>24767.75</text:p>
          </table:table-cell>
          <table:table-cell office:value-type="float" office:value="24777.75" calcext:value-type="float">
            <text:p>24777.75</text:p>
          </table:table-cell>
          <table:table-cell office:value-type="float" office:value="24762.75" calcext:value-type="float">
            <text:p>2476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1:42.8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6:41:59.1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81.3" calcext:value-type="float">
            <text:p>328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07.100</text:p>
          </table:table-cell>
          <table:table-cell office:value-type="string" calcext:value-type="string">
            <text:p>2025-10-10 12:42:07.100</text:p>
          </table:table-cell>
          <table:table-cell office:value-type="string" calcext:value-type="string">
            <text:p>LONG</text:p>
          </table:table-cell>
          <table:table-cell office:value-type="float" office:value="24772.5" calcext:value-type="float">
            <text:p>24772.5</text:p>
          </table:table-cell>
          <table:table-cell office:value-type="float" office:value="24782.5" calcext:value-type="float">
            <text:p>24782.5</text:p>
          </table:table-cell>
          <table:table-cell office:value-type="float" office:value="24767.5" calcext:value-type="float">
            <text:p>2476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2:10.200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470.6" calcext:value-type="float">
            <text:p>347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91.3" calcext:value-type="float">
            <text:p>359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09.900</text:p>
          </table:table-cell>
          <table:table-cell office:value-type="string" calcext:value-type="string">
            <text:p>2025-10-10 12:42:09.900</text:p>
          </table:table-cell>
          <table:table-cell office:value-type="string" calcext:value-type="string">
            <text:p>LONG</text:p>
          </table:table-cell>
          <table:table-cell office:value-type="float" office:value="24773.5" calcext:value-type="float">
            <text:p>24773.5</text:p>
          </table:table-cell>
          <table:table-cell office:value-type="float" office:value="24783.5" calcext:value-type="float">
            <text:p>24783.5</text:p>
          </table:table-cell>
          <table:table-cell office:value-type="float" office:value="24768.5" calcext:value-type="float">
            <text:p>2476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10.900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649.9" calcext:value-type="float">
            <text:p>3649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70.6" calcext:value-type="float">
            <text:p>377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14.900</text:p>
          </table:table-cell>
          <table:table-cell office:value-type="string" calcext:value-type="string">
            <text:p>2025-10-10 12:42:14.900</text:p>
          </table:table-cell>
          <table:table-cell office:value-type="string" calcext:value-type="string">
            <text:p>LONG</text:p>
          </table:table-cell>
          <table:table-cell office:value-type="float" office:value="24766" calcext:value-type="float">
            <text:p>24766</text:p>
          </table:table-cell>
          <table:table-cell office:value-type="float" office:value="24776" calcext:value-type="float">
            <text:p>24776</text:p>
          </table:table-cell>
          <table:table-cell office:value-type="float" office:value="24761" calcext:value-type="float">
            <text:p>2476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15.900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829.2" calcext:value-type="float">
            <text:p>3829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49.9" calcext:value-type="float">
            <text:p>394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18.600</text:p>
          </table:table-cell>
          <table:table-cell office:value-type="string" calcext:value-type="string">
            <text:p>2025-10-10 12:42:18.600</text:p>
          </table:table-cell>
          <table:table-cell office:value-type="string" calcext:value-type="string">
            <text:p>LONG</text:p>
          </table:table-cell>
          <table:table-cell office:value-type="float" office:value="24769.25" calcext:value-type="float">
            <text:p>24769.25</text:p>
          </table:table-cell>
          <table:table-cell office:value-type="float" office:value="24779.25" calcext:value-type="float">
            <text:p>24779.25</text:p>
          </table:table-cell>
          <table:table-cell office:value-type="float" office:value="24764.25" calcext:value-type="float">
            <text:p>24764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19.600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008.5" calcext:value-type="float">
            <text:p>400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29.2" calcext:value-type="float">
            <text:p>412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19.800</text:p>
          </table:table-cell>
          <table:table-cell office:value-type="string" calcext:value-type="string">
            <text:p>2025-10-10 12:42:19.800</text:p>
          </table:table-cell>
          <table:table-cell office:value-type="string" calcext:value-type="string">
            <text:p>LONG</text:p>
          </table:table-cell>
          <table:table-cell office:value-type="float" office:value="24768.25" calcext:value-type="float">
            <text:p>24768.25</text:p>
          </table:table-cell>
          <table:table-cell office:value-type="float" office:value="24778.25" calcext:value-type="float">
            <text:p>24778.25</text:p>
          </table:table-cell>
          <table:table-cell office:value-type="float" office:value="24763.25" calcext:value-type="float">
            <text:p>2476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2:22.50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197.8" calcext:value-type="float">
            <text:p>4197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18.5" calcext:value-type="float">
            <text:p>43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23.100</text:p>
          </table:table-cell>
          <table:table-cell office:value-type="string" calcext:value-type="string">
            <text:p>2025-10-10 12:42:23.100</text:p>
          </table:table-cell>
          <table:table-cell office:value-type="string" calcext:value-type="string">
            <text:p>LONG</text:p>
          </table:table-cell>
          <table:table-cell office:value-type="float" office:value="24768.75" calcext:value-type="float">
            <text:p>24768.75</text:p>
          </table:table-cell>
          <table:table-cell office:value-type="float" office:value="24778.75" calcext:value-type="float">
            <text:p>24778.75</text:p>
          </table:table-cell>
          <table:table-cell office:value-type="float" office:value="24763.75" calcext:value-type="float">
            <text:p>2476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24.10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382.1" calcext:value-type="float">
            <text:p>438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02.8" calcext:value-type="float">
            <text:p>450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24.300</text:p>
          </table:table-cell>
          <table:table-cell office:value-type="string" calcext:value-type="string">
            <text:p>2025-10-10 12:42:24.300</text:p>
          </table:table-cell>
          <table:table-cell office:value-type="string" calcext:value-type="string">
            <text:p>LONG</text:p>
          </table:table-cell>
          <table:table-cell office:value-type="float" office:value="24770.5" calcext:value-type="float">
            <text:p>24770.5</text:p>
          </table:table-cell>
          <table:table-cell office:value-type="float" office:value="24780.5" calcext:value-type="float">
            <text:p>24780.5</text:p>
          </table:table-cell>
          <table:table-cell office:value-type="float" office:value="24765.5" calcext:value-type="float">
            <text:p>24765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2:28.500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571.4" calcext:value-type="float">
            <text:p>4571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92.1" calcext:value-type="float">
            <text:p>469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29.600</text:p>
          </table:table-cell>
          <table:table-cell office:value-type="string" calcext:value-type="string">
            <text:p>2025-10-10 12:42:29.600</text:p>
          </table:table-cell>
          <table:table-cell office:value-type="string" calcext:value-type="string">
            <text:p>LONG</text:p>
          </table:table-cell>
          <table:table-cell office:value-type="float" office:value="24769" calcext:value-type="float">
            <text:p>24769</text:p>
          </table:table-cell>
          <table:table-cell office:value-type="float" office:value="24779" calcext:value-type="float">
            <text:p>24779</text:p>
          </table:table-cell>
          <table:table-cell office:value-type="float" office:value="24764" calcext:value-type="float">
            <text:p>2476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30.600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740.7" calcext:value-type="float">
            <text:p>474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61.4" calcext:value-type="float">
            <text:p>48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30.600</text:p>
          </table:table-cell>
          <table:table-cell office:value-type="string" calcext:value-type="string">
            <text:p>2025-10-10 12:42:30.600</text:p>
          </table:table-cell>
          <table:table-cell office:value-type="string" calcext:value-type="string">
            <text:p>LONG</text:p>
          </table:table-cell>
          <table:table-cell office:value-type="float" office:value="24769.75" calcext:value-type="float">
            <text:p>24769.75</text:p>
          </table:table-cell>
          <table:table-cell office:value-type="float" office:value="24779.75" calcext:value-type="float">
            <text:p>24779.75</text:p>
          </table:table-cell>
          <table:table-cell office:value-type="float" office:value="24764.75" calcext:value-type="float">
            <text:p>2476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2:35.100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50.7" calcext:value-type="float">
            <text:p>505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31.600</text:p>
          </table:table-cell>
          <table:table-cell office:value-type="string" calcext:value-type="string">
            <text:p>2025-10-10 12:42:31.600</text:p>
          </table:table-cell>
          <table:table-cell office:value-type="string" calcext:value-type="string">
            <text:p>LONG</text:p>
          </table:table-cell>
          <table:table-cell office:value-type="float" office:value="24771.5" calcext:value-type="float">
            <text:p>24771.5</text:p>
          </table:table-cell>
          <table:table-cell office:value-type="float" office:value="24781.5" calcext:value-type="float">
            <text:p>24781.5</text:p>
          </table:table-cell>
          <table:table-cell office:value-type="float" office:value="24766.5" calcext:value-type="float">
            <text:p>2476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32.600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109.3" calcext:value-type="float">
            <text:p>510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34.500</text:p>
          </table:table-cell>
          <table:table-cell office:value-type="string" calcext:value-type="string">
            <text:p>2025-10-10 12:42:34.500</text:p>
          </table:table-cell>
          <table:table-cell office:value-type="string" calcext:value-type="string">
            <text:p>LONG</text:p>
          </table:table-cell>
          <table:table-cell office:value-type="float" office:value="24771.25" calcext:value-type="float">
            <text:p>24771.25</text:p>
          </table:table-cell>
          <table:table-cell office:value-type="float" office:value="24781.25" calcext:value-type="float">
            <text:p>24781.25</text:p>
          </table:table-cell>
          <table:table-cell office:value-type="float" office:value="24766.25" calcext:value-type="float">
            <text:p>2476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35.50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293.6" calcext:value-type="float">
            <text:p>529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14.3" calcext:value-type="float">
            <text:p>54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35.300</text:p>
          </table:table-cell>
          <table:table-cell office:value-type="string" calcext:value-type="string">
            <text:p>2025-10-10 12:42:35.300</text:p>
          </table:table-cell>
          <table:table-cell office:value-type="string" calcext:value-type="string">
            <text:p>LONG</text:p>
          </table:table-cell>
          <table:table-cell office:value-type="float" office:value="24769.75" calcext:value-type="float">
            <text:p>24769.75</text:p>
          </table:table-cell>
          <table:table-cell office:value-type="float" office:value="24779.75" calcext:value-type="float">
            <text:p>24779.75</text:p>
          </table:table-cell>
          <table:table-cell office:value-type="float" office:value="24764.75" calcext:value-type="float">
            <text:p>2476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36.30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477.9" calcext:value-type="float">
            <text:p>547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98.6" calcext:value-type="float">
            <text:p>559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45.700</text:p>
          </table:table-cell>
          <table:table-cell office:value-type="string" calcext:value-type="string">
            <text:p>2025-10-10 12:42:45.700</text:p>
          </table:table-cell>
          <table:table-cell office:value-type="string" calcext:value-type="string">
            <text:p>LONG</text:p>
          </table:table-cell>
          <table:table-cell office:value-type="float" office:value="24764" calcext:value-type="float">
            <text:p>24764</text:p>
          </table:table-cell>
          <table:table-cell office:value-type="float" office:value="24774" calcext:value-type="float">
            <text:p>24774</text:p>
          </table:table-cell>
          <table:table-cell office:value-type="float" office:value="24759" calcext:value-type="float">
            <text:p>2475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2:46.800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667.2" calcext:value-type="float">
            <text:p>566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87.9" calcext:value-type="float">
            <text:p>578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2:46.200</text:p>
          </table:table-cell>
          <table:table-cell office:value-type="string" calcext:value-type="string">
            <text:p>2025-10-10 12:42:46.200</text:p>
          </table:table-cell>
          <table:table-cell office:value-type="string" calcext:value-type="string">
            <text:p>LONG</text:p>
          </table:table-cell>
          <table:table-cell office:value-type="float" office:value="24764" calcext:value-type="float">
            <text:p>24764</text:p>
          </table:table-cell>
          <table:table-cell office:value-type="float" office:value="24774" calcext:value-type="float">
            <text:p>24774</text:p>
          </table:table-cell>
          <table:table-cell office:value-type="float" office:value="24759" calcext:value-type="float">
            <text:p>2475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42:47.200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846.5" calcext:value-type="float">
            <text:p>584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67.2" calcext:value-type="float">
            <text:p>59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3:04.500</text:p>
          </table:table-cell>
          <table:table-cell office:value-type="string" calcext:value-type="string">
            <text:p>2025-10-10 12:43:04.500</text:p>
          </table:table-cell>
          <table:table-cell office:value-type="string" calcext:value-type="string">
            <text:p>LONG</text:p>
          </table:table-cell>
          <table:table-cell office:value-type="float" office:value="24749.5" calcext:value-type="float">
            <text:p>24749.5</text:p>
          </table:table-cell>
          <table:table-cell office:value-type="float" office:value="24759.5" calcext:value-type="float">
            <text:p>24759.5</text:p>
          </table:table-cell>
          <table:table-cell office:value-type="float" office:value="24744.5" calcext:value-type="float">
            <text:p>2474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3:06.10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035.8" calcext:value-type="float">
            <text:p>6035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56.5" calcext:value-type="float">
            <text:p>615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48:56.600</text:p>
          </table:table-cell>
          <table:table-cell office:value-type="string" calcext:value-type="string">
            <text:p>2025-10-10 12:48:56.600</text:p>
          </table:table-cell>
          <table:table-cell office:value-type="string" calcext:value-type="string">
            <text:p>SHORT</text:p>
          </table:table-cell>
          <table:table-cell office:value-type="float" office:value="24702" calcext:value-type="float">
            <text:p>24702</text:p>
          </table:table-cell>
          <table:table-cell office:value-type="float" office:value="24692" calcext:value-type="float">
            <text:p>24692</text:p>
          </table:table-cell>
          <table:table-cell office:value-type="float" office:value="24707" calcext:value-type="float">
            <text:p>2470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48:57.900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925.1" calcext:value-type="float">
            <text:p>5925.1</text:p>
          </table:table-cell>
          <table:table-cell office:value-type="float" office:value="1" calcext:value-type="float">
            <text:p>1</text:p>
          </table:table-cell>
          <table:table-cell office:value-type="float" office:value="6045.8" calcext:value-type="float">
            <text:p>6045.8</text:p>
          </table:table-cell>
          <table:table-cell office:value-type="float" office:value="6156.5" calcext:value-type="float">
            <text:p>6156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2:20.900</text:p>
          </table:table-cell>
          <table:table-cell office:value-type="string" calcext:value-type="string">
            <text:p>2025-10-10 12:52:20.900</text:p>
          </table:table-cell>
          <table:table-cell office:value-type="string" calcext:value-type="string">
            <text:p>SHORT</text:p>
          </table:table-cell>
          <table:table-cell office:value-type="float" office:value="24678" calcext:value-type="float">
            <text:p>24678</text:p>
          </table:table-cell>
          <table:table-cell office:value-type="float" office:value="24668" calcext:value-type="float">
            <text:p>24668</text:p>
          </table:table-cell>
          <table:table-cell office:value-type="float" office:value="24683" calcext:value-type="float">
            <text:p>2468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2:22.700</text:p>
          </table:table-cell>
          <table:table-cell office:value-type="float" office:value="112" calcext:value-type="float">
            <text:p>11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52:25.6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814.4" calcext:value-type="float">
            <text:p>5814.4</text:p>
          </table:table-cell>
          <table:table-cell office:value-type="float" office:value="2" calcext:value-type="float">
            <text:p>2</text:p>
          </table:table-cell>
          <table:table-cell office:value-type="float" office:value="5935.1" calcext:value-type="float">
            <text:p>5935.1</text:p>
          </table:table-cell>
          <table:table-cell office:value-type="float" office:value="6156.5" calcext:value-type="float">
            <text:p>6156.5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39.900</text:p>
          </table:table-cell>
          <table:table-cell office:value-type="string" calcext:value-type="string">
            <text:p>2025-10-10 12:56:39.900</text:p>
          </table:table-cell>
          <table:table-cell office:value-type="string" calcext:value-type="string">
            <text:p>LONG</text:p>
          </table:table-cell>
          <table:table-cell office:value-type="float" office:value="24686" calcext:value-type="float">
            <text:p>24686</text:p>
          </table:table-cell>
          <table:table-cell office:value-type="float" office:value="24696" calcext:value-type="float">
            <text:p>24696</text:p>
          </table:table-cell>
          <table:table-cell office:value-type="float" office:value="24681" calcext:value-type="float">
            <text:p>2468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6:42.400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003.7" calcext:value-type="float">
            <text:p>6003.7</text:p>
          </table:table-cell>
          <table:table-cell office:value-type="float" office:value="0" calcext:value-type="float">
            <text:p>0</text:p>
          </table:table-cell>
          <table:table-cell office:value-type="float" office:value="6124.4" calcext:value-type="float">
            <text:p>6124.4</text:p>
          </table:table-cell>
          <table:table-cell office:value-type="float" office:value="6156.5" calcext:value-type="float">
            <text:p>6156.5</text:p>
          </table:table-cell>
          <table:table-cell office:value-type="float" office:value="-32.0999999999995" calcext:value-type="float">
            <text:p>-32.0999999999995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42.700</text:p>
          </table:table-cell>
          <table:table-cell office:value-type="string" calcext:value-type="string">
            <text:p>2025-10-10 12:56:42.700</text:p>
          </table:table-cell>
          <table:table-cell office:value-type="string" calcext:value-type="string">
            <text:p>LONG</text:p>
          </table:table-cell>
          <table:table-cell office:value-type="float" office:value="24686" calcext:value-type="float">
            <text:p>24686</text:p>
          </table:table-cell>
          <table:table-cell office:value-type="float" office:value="24696" calcext:value-type="float">
            <text:p>24696</text:p>
          </table:table-cell>
          <table:table-cell office:value-type="float" office:value="24681" calcext:value-type="float">
            <text:p>2468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6:44.300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193.00000000001" calcext:value-type="float">
            <text:p>6193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13.7" calcext:value-type="float">
            <text:p>63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45.900</text:p>
          </table:table-cell>
          <table:table-cell office:value-type="string" calcext:value-type="string">
            <text:p>2025-10-10 12:56:45.900</text:p>
          </table:table-cell>
          <table:table-cell office:value-type="string" calcext:value-type="string">
            <text:p>LONG</text:p>
          </table:table-cell>
          <table:table-cell office:value-type="float" office:value="24691.25" calcext:value-type="float">
            <text:p>24691.25</text:p>
          </table:table-cell>
          <table:table-cell office:value-type="float" office:value="24701.25" calcext:value-type="float">
            <text:p>24701.25</text:p>
          </table:table-cell>
          <table:table-cell office:value-type="float" office:value="24686.25" calcext:value-type="float">
            <text:p>2468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6:46.900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372.30000000001" calcext:value-type="float">
            <text:p>6372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93.00000000001" calcext:value-type="float">
            <text:p>6493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49.000</text:p>
          </table:table-cell>
          <table:table-cell office:value-type="string" calcext:value-type="string">
            <text:p>2025-10-10 12:56:49.000</text:p>
          </table:table-cell>
          <table:table-cell office:value-type="string" calcext:value-type="string">
            <text:p>LONG</text:p>
          </table:table-cell>
          <table:table-cell office:value-type="float" office:value="24688.75" calcext:value-type="float">
            <text:p>24688.75</text:p>
          </table:table-cell>
          <table:table-cell office:value-type="float" office:value="24698.75" calcext:value-type="float">
            <text:p>24698.75</text:p>
          </table:table-cell>
          <table:table-cell office:value-type="float" office:value="24683.75" calcext:value-type="float">
            <text:p>2468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6:50.00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551.60000000001" calcext:value-type="float">
            <text:p>6551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2.30000000001" calcext:value-type="float">
            <text:p>6672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50.100</text:p>
          </table:table-cell>
          <table:table-cell office:value-type="string" calcext:value-type="string">
            <text:p>2025-10-10 12:56:50.100</text:p>
          </table:table-cell>
          <table:table-cell office:value-type="string" calcext:value-type="string">
            <text:p>LONG</text:p>
          </table:table-cell>
          <table:table-cell office:value-type="float" office:value="24686.5" calcext:value-type="float">
            <text:p>24686.5</text:p>
          </table:table-cell>
          <table:table-cell office:value-type="float" office:value="24696.5" calcext:value-type="float">
            <text:p>24696.5</text:p>
          </table:table-cell>
          <table:table-cell office:value-type="float" office:value="24681.5" calcext:value-type="float">
            <text:p>2468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6:54.10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740.90000000001" calcext:value-type="float">
            <text:p>6740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61.60000000001" calcext:value-type="float">
            <text:p>6861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53.000</text:p>
          </table:table-cell>
          <table:table-cell office:value-type="string" calcext:value-type="string">
            <text:p>2025-10-10 12:56:53.000</text:p>
          </table:table-cell>
          <table:table-cell office:value-type="string" calcext:value-type="string">
            <text:p>LONG</text:p>
          </table:table-cell>
          <table:table-cell office:value-type="float" office:value="24686.25" calcext:value-type="float">
            <text:p>24686.25</text:p>
          </table:table-cell>
          <table:table-cell office:value-type="float" office:value="24696.25" calcext:value-type="float">
            <text:p>24696.25</text:p>
          </table:table-cell>
          <table:table-cell office:value-type="float" office:value="24681.25" calcext:value-type="float">
            <text:p>2468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6:55.800</text:p>
          </table:table-cell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6930.20000000001" calcext:value-type="float">
            <text:p>6930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50.90000000001" calcext:value-type="float">
            <text:p>7050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6:55.700</text:p>
          </table:table-cell>
          <table:table-cell office:value-type="string" calcext:value-type="string">
            <text:p>2025-10-10 12:56:55.700</text:p>
          </table:table-cell>
          <table:table-cell office:value-type="string" calcext:value-type="string">
            <text:p>LONG</text:p>
          </table:table-cell>
          <table:table-cell office:value-type="float" office:value="24686.5" calcext:value-type="float">
            <text:p>24686.5</text:p>
          </table:table-cell>
          <table:table-cell office:value-type="float" office:value="24696.5" calcext:value-type="float">
            <text:p>24696.5</text:p>
          </table:table-cell>
          <table:table-cell office:value-type="float" office:value="24681.5" calcext:value-type="float">
            <text:p>2468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00.3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119.50000000001" calcext:value-type="float">
            <text:p>7119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40.20000000001" calcext:value-type="float">
            <text:p>7240.2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07.200</text:p>
          </table:table-cell>
          <table:table-cell office:value-type="string" calcext:value-type="string">
            <text:p>2025-10-10 12:57:07.200</text:p>
          </table:table-cell>
          <table:table-cell office:value-type="string" calcext:value-type="string">
            <text:p>LONG</text:p>
          </table:table-cell>
          <table:table-cell office:value-type="float" office:value="24686" calcext:value-type="float">
            <text:p>24686</text:p>
          </table:table-cell>
          <table:table-cell office:value-type="float" office:value="24696" calcext:value-type="float">
            <text:p>24696</text:p>
          </table:table-cell>
          <table:table-cell office:value-type="float" office:value="24681" calcext:value-type="float">
            <text:p>2468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10.900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308.80000000001" calcext:value-type="float">
            <text:p>7308.8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29.50000000001" calcext:value-type="float">
            <text:p>7429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08.600</text:p>
          </table:table-cell>
          <table:table-cell office:value-type="string" calcext:value-type="string">
            <text:p>2025-10-10 12:57:08.600</text:p>
          </table:table-cell>
          <table:table-cell office:value-type="string" calcext:value-type="string">
            <text:p>LONG</text:p>
          </table:table-cell>
          <table:table-cell office:value-type="float" office:value="24689.75" calcext:value-type="float">
            <text:p>24689.75</text:p>
          </table:table-cell>
          <table:table-cell office:value-type="float" office:value="24699.75" calcext:value-type="float">
            <text:p>24699.75</text:p>
          </table:table-cell>
          <table:table-cell office:value-type="float" office:value="24684.75" calcext:value-type="float">
            <text:p>2468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7:09.600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488.10000000001" calcext:value-type="float">
            <text:p>7488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08.80000000001" calcext:value-type="float">
            <text:p>7608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13.400</text:p>
          </table:table-cell>
          <table:table-cell office:value-type="string" calcext:value-type="string">
            <text:p>2025-10-10 12:57:13.400</text:p>
          </table:table-cell>
          <table:table-cell office:value-type="string" calcext:value-type="string">
            <text:p>LONG</text:p>
          </table:table-cell>
          <table:table-cell office:value-type="float" office:value="24683" calcext:value-type="float">
            <text:p>24683</text:p>
          </table:table-cell>
          <table:table-cell office:value-type="float" office:value="24693" calcext:value-type="float">
            <text:p>24693</text:p>
          </table:table-cell>
          <table:table-cell office:value-type="float" office:value="24678" calcext:value-type="float">
            <text:p>2467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17.200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677.40000000001" calcext:value-type="float">
            <text:p>7677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98.10000000001" calcext:value-type="float">
            <text:p>7798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17.300</text:p>
          </table:table-cell>
          <table:table-cell office:value-type="string" calcext:value-type="string">
            <text:p>2025-10-10 12:57:17.300</text:p>
          </table:table-cell>
          <table:table-cell office:value-type="string" calcext:value-type="string">
            <text:p>LONG</text:p>
          </table:table-cell>
          <table:table-cell office:value-type="float" office:value="24682.75" calcext:value-type="float">
            <text:p>24682.75</text:p>
          </table:table-cell>
          <table:table-cell office:value-type="float" office:value="24692.75" calcext:value-type="float">
            <text:p>24692.75</text:p>
          </table:table-cell>
          <table:table-cell office:value-type="float" office:value="24677.75" calcext:value-type="float">
            <text:p>2467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7:18.30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856.70000000001" calcext:value-type="float">
            <text:p>7856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77.40000000001" calcext:value-type="float">
            <text:p>7977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24.000</text:p>
          </table:table-cell>
          <table:table-cell office:value-type="string" calcext:value-type="string">
            <text:p>2025-10-10 12:57:24.000</text:p>
          </table:table-cell>
          <table:table-cell office:value-type="string" calcext:value-type="string">
            <text:p>LONG</text:p>
          </table:table-cell>
          <table:table-cell office:value-type="float" office:value="24681" calcext:value-type="float">
            <text:p>24681</text:p>
          </table:table-cell>
          <table:table-cell office:value-type="float" office:value="24691" calcext:value-type="float">
            <text:p>24691</text:p>
          </table:table-cell>
          <table:table-cell office:value-type="float" office:value="24676" calcext:value-type="float">
            <text:p>2467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7:25.000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036.00000000001" calcext:value-type="float">
            <text:p>8036.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56.70000000001" calcext:value-type="float">
            <text:p>8156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28.300</text:p>
          </table:table-cell>
          <table:table-cell office:value-type="string" calcext:value-type="string">
            <text:p>2025-10-10 12:57:28.300</text:p>
          </table:table-cell>
          <table:table-cell office:value-type="string" calcext:value-type="string">
            <text:p>LONG</text:p>
          </table:table-cell>
          <table:table-cell office:value-type="float" office:value="24676.75" calcext:value-type="float">
            <text:p>24676.75</text:p>
          </table:table-cell>
          <table:table-cell office:value-type="float" office:value="24686.75" calcext:value-type="float">
            <text:p>24686.75</text:p>
          </table:table-cell>
          <table:table-cell office:value-type="float" office:value="24671.75" calcext:value-type="float">
            <text:p>2467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30.500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225.30000000001" calcext:value-type="float">
            <text:p>8225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46.00000000001" calcext:value-type="float">
            <text:p>8346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37.000</text:p>
          </table:table-cell>
          <table:table-cell office:value-type="string" calcext:value-type="string">
            <text:p>2025-10-10 12:57:37.000</text:p>
          </table:table-cell>
          <table:table-cell office:value-type="string" calcext:value-type="string">
            <text:p>LONG</text:p>
          </table:table-cell>
          <table:table-cell office:value-type="float" office:value="24680.25" calcext:value-type="float">
            <text:p>24680.25</text:p>
          </table:table-cell>
          <table:table-cell office:value-type="float" office:value="24690.25" calcext:value-type="float">
            <text:p>24690.25</text:p>
          </table:table-cell>
          <table:table-cell office:value-type="float" office:value="24675.25" calcext:value-type="float">
            <text:p>24675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7:38.000</text:p>
          </table:table-cell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404.60000000001" calcext:value-type="float">
            <text:p>8404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25.30000000001" calcext:value-type="float">
            <text:p>8525.3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38.800</text:p>
          </table:table-cell>
          <table:table-cell office:value-type="string" calcext:value-type="string">
            <text:p>2025-10-10 12:57:38.800</text:p>
          </table:table-cell>
          <table:table-cell office:value-type="string" calcext:value-type="string">
            <text:p>LONG</text:p>
          </table:table-cell>
          <table:table-cell office:value-type="float" office:value="24682.75" calcext:value-type="float">
            <text:p>24682.75</text:p>
          </table:table-cell>
          <table:table-cell office:value-type="float" office:value="24692.75" calcext:value-type="float">
            <text:p>24692.75</text:p>
          </table:table-cell>
          <table:table-cell office:value-type="float" office:value="24677.75" calcext:value-type="float">
            <text:p>2467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40.300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593.90000000001" calcext:value-type="float">
            <text:p>8593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14.6" calcext:value-type="float">
            <text:p>87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40.200</text:p>
          </table:table-cell>
          <table:table-cell office:value-type="string" calcext:value-type="string">
            <text:p>2025-10-10 12:57:40.200</text:p>
          </table:table-cell>
          <table:table-cell office:value-type="string" calcext:value-type="string">
            <text:p>LONG</text:p>
          </table:table-cell>
          <table:table-cell office:value-type="float" office:value="24683.25" calcext:value-type="float">
            <text:p>24683.25</text:p>
          </table:table-cell>
          <table:table-cell office:value-type="float" office:value="24693.25" calcext:value-type="float">
            <text:p>24693.25</text:p>
          </table:table-cell>
          <table:table-cell office:value-type="float" office:value="24678.25" calcext:value-type="float">
            <text:p>2467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41.700</text:p>
          </table:table-cell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783.2" calcext:value-type="float">
            <text:p>878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03.9" calcext:value-type="float">
            <text:p>890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44.400</text:p>
          </table:table-cell>
          <table:table-cell office:value-type="string" calcext:value-type="string">
            <text:p>2025-10-10 12:57:44.400</text:p>
          </table:table-cell>
          <table:table-cell office:value-type="string" calcext:value-type="string">
            <text:p>LONG</text:p>
          </table:table-cell>
          <table:table-cell office:value-type="float" office:value="24678.5" calcext:value-type="float">
            <text:p>24678.5</text:p>
          </table:table-cell>
          <table:table-cell office:value-type="float" office:value="24688.5" calcext:value-type="float">
            <text:p>24688.5</text:p>
          </table:table-cell>
          <table:table-cell office:value-type="float" office:value="24673.5" calcext:value-type="float">
            <text:p>2467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7:44.60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8972.5" calcext:value-type="float">
            <text:p>897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93.2" calcext:value-type="float">
            <text:p>909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51.200</text:p>
          </table:table-cell>
          <table:table-cell office:value-type="string" calcext:value-type="string">
            <text:p>2025-10-10 12:57:51.200</text:p>
          </table:table-cell>
          <table:table-cell office:value-type="string" calcext:value-type="string">
            <text:p>LONG</text:p>
          </table:table-cell>
          <table:table-cell office:value-type="float" office:value="24674.75" calcext:value-type="float">
            <text:p>24674.75</text:p>
          </table:table-cell>
          <table:table-cell office:value-type="float" office:value="24684.75" calcext:value-type="float">
            <text:p>24684.75</text:p>
          </table:table-cell>
          <table:table-cell office:value-type="float" office:value="24669.75" calcext:value-type="float">
            <text:p>2466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7:52.2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151.8" calcext:value-type="float">
            <text:p>915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72.5" calcext:value-type="float">
            <text:p>927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7:53.900</text:p>
          </table:table-cell>
          <table:table-cell office:value-type="string" calcext:value-type="string">
            <text:p>2025-10-10 12:57:53.900</text:p>
          </table:table-cell>
          <table:table-cell office:value-type="string" calcext:value-type="string">
            <text:p>LONG</text:p>
          </table:table-cell>
          <table:table-cell office:value-type="float" office:value="24667.5" calcext:value-type="float">
            <text:p>24667.5</text:p>
          </table:table-cell>
          <table:table-cell office:value-type="float" office:value="24677.5" calcext:value-type="float">
            <text:p>24677.5</text:p>
          </table:table-cell>
          <table:table-cell office:value-type="float" office:value="24662.5" calcext:value-type="float">
            <text:p>2466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7:54.90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58:09.8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031.1" calcext:value-type="float">
            <text:p>9031.1</text:p>
          </table:table-cell>
          <table:table-cell office:value-type="float" office:value="1" calcext:value-type="float">
            <text:p>1</text:p>
          </table:table-cell>
          <table:table-cell office:value-type="float" office:value="9151.8" calcext:value-type="float">
            <text:p>9151.8</text:p>
          </table:table-cell>
          <table:table-cell office:value-type="float" office:value="9272.5" calcext:value-type="float">
            <text:p>9272.5</text:p>
          </table:table-cell>
          <table:table-cell office:value-type="float" office:value="-120.700000000001" calcext:value-type="float">
            <text:p>-120.7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8:29.600</text:p>
          </table:table-cell>
          <table:table-cell office:value-type="string" calcext:value-type="string">
            <text:p>2025-10-10 12:58:29.600</text:p>
          </table:table-cell>
          <table:table-cell office:value-type="string" calcext:value-type="string">
            <text:p>LONG</text:p>
          </table:table-cell>
          <table:table-cell office:value-type="float" office:value="24668.5" calcext:value-type="float">
            <text:p>24668.5</text:p>
          </table:table-cell>
          <table:table-cell office:value-type="float" office:value="24678.5" calcext:value-type="float">
            <text:p>24678.5</text:p>
          </table:table-cell>
          <table:table-cell office:value-type="float" office:value="24663.5" calcext:value-type="float">
            <text:p>2466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8:31.100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220.4" calcext:value-type="float">
            <text:p>922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41.1" calcext:value-type="float">
            <text:p>934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8:33.600</text:p>
          </table:table-cell>
          <table:table-cell office:value-type="string" calcext:value-type="string">
            <text:p>2025-10-10 12:58:33.600</text:p>
          </table:table-cell>
          <table:table-cell office:value-type="string" calcext:value-type="string">
            <text:p>LONG</text:p>
          </table:table-cell>
          <table:table-cell office:value-type="float" office:value="24669" calcext:value-type="float">
            <text:p>24669</text:p>
          </table:table-cell>
          <table:table-cell office:value-type="float" office:value="24679" calcext:value-type="float">
            <text:p>24679</text:p>
          </table:table-cell>
          <table:table-cell office:value-type="float" office:value="24664" calcext:value-type="float">
            <text:p>2466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8:34.60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399.7" calcext:value-type="float">
            <text:p>9399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20.4" calcext:value-type="float">
            <text:p>95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8:40.500</text:p>
          </table:table-cell>
          <table:table-cell office:value-type="string" calcext:value-type="string">
            <text:p>2025-10-10 12:58:40.500</text:p>
          </table:table-cell>
          <table:table-cell office:value-type="string" calcext:value-type="string">
            <text:p>LONG</text:p>
          </table:table-cell>
          <table:table-cell office:value-type="float" office:value="24665" calcext:value-type="float">
            <text:p>24665</text:p>
          </table:table-cell>
          <table:table-cell office:value-type="float" office:value="24675" calcext:value-type="float">
            <text:p>24675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8:41.50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58:50.3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279" calcext:value-type="float">
            <text:p>9279</text:p>
          </table:table-cell>
          <table:table-cell office:value-type="float" office:value="1" calcext:value-type="float">
            <text:p>1</text:p>
          </table:table-cell>
          <table:table-cell office:value-type="float" office:value="9399.7" calcext:value-type="float">
            <text:p>9399.7</text:p>
          </table:table-cell>
          <table:table-cell office:value-type="float" office:value="9520.4" calcext:value-type="float">
            <text:p>9520.4</text:p>
          </table:table-cell>
          <table:table-cell office:value-type="float" office:value="-120.700000000001" calcext:value-type="float">
            <text:p>-120.7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9:02.900</text:p>
          </table:table-cell>
          <table:table-cell office:value-type="string" calcext:value-type="string">
            <text:p>2025-10-10 12:59:02.900</text:p>
          </table:table-cell>
          <table:table-cell office:value-type="string" calcext:value-type="string">
            <text:p>LONG</text:p>
          </table:table-cell>
          <table:table-cell office:value-type="float" office:value="24651.5" calcext:value-type="float">
            <text:p>24651.5</text:p>
          </table:table-cell>
          <table:table-cell office:value-type="float" office:value="24661.5" calcext:value-type="float">
            <text:p>24661.5</text:p>
          </table:table-cell>
          <table:table-cell office:value-type="float" office:value="24646.5" calcext:value-type="float">
            <text:p>2464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6:59:03.5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6:59:21.7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468.3" calcext:value-type="float">
            <text:p>946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89" calcext:value-type="float">
            <text:p>9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9:25.100</text:p>
          </table:table-cell>
          <table:table-cell office:value-type="string" calcext:value-type="string">
            <text:p>2025-10-10 12:59:25.100</text:p>
          </table:table-cell>
          <table:table-cell office:value-type="string" calcext:value-type="string">
            <text:p>LONG</text:p>
          </table:table-cell>
          <table:table-cell office:value-type="float" office:value="24659.5" calcext:value-type="float">
            <text:p>24659.5</text:p>
          </table:table-cell>
          <table:table-cell office:value-type="float" office:value="24669.5" calcext:value-type="float">
            <text:p>24669.5</text:p>
          </table:table-cell>
          <table:table-cell office:value-type="float" office:value="24654.5" calcext:value-type="float">
            <text:p>2465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9:26.100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59:31.8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347.6" calcext:value-type="float">
            <text:p>9347.6</text:p>
          </table:table-cell>
          <table:table-cell office:value-type="float" office:value="1" calcext:value-type="float">
            <text:p>1</text:p>
          </table:table-cell>
          <table:table-cell office:value-type="float" office:value="9468.3" calcext:value-type="float">
            <text:p>9468.3</text:p>
          </table:table-cell>
          <table:table-cell office:value-type="float" office:value="9589" calcext:value-type="float">
            <text:p>9589</text:p>
          </table:table-cell>
          <table:table-cell office:value-type="float" office:value="-120.700000000001" calcext:value-type="float">
            <text:p>-120.7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9:37.300</text:p>
          </table:table-cell>
          <table:table-cell office:value-type="string" calcext:value-type="string">
            <text:p>2025-10-10 12:59:37.300</text:p>
          </table:table-cell>
          <table:table-cell office:value-type="string" calcext:value-type="string">
            <text:p>LONG</text:p>
          </table:table-cell>
          <table:table-cell office:value-type="float" office:value="24655.25" calcext:value-type="float">
            <text:p>24655.25</text:p>
          </table:table-cell>
          <table:table-cell office:value-type="float" office:value="24665.25" calcext:value-type="float">
            <text:p>24665.25</text:p>
          </table:table-cell>
          <table:table-cell office:value-type="float" office:value="24650.25" calcext:value-type="float">
            <text:p>2465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9:38.300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6:59:45.8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526.9" calcext:value-type="float">
            <text:p>9526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47.6" calcext:value-type="float">
            <text:p>964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9:50.900</text:p>
          </table:table-cell>
          <table:table-cell office:value-type="string" calcext:value-type="string">
            <text:p>2025-10-10 12:59:50.900</text:p>
          </table:table-cell>
          <table:table-cell office:value-type="string" calcext:value-type="string">
            <text:p>LONG</text:p>
          </table:table-cell>
          <table:table-cell office:value-type="float" office:value="24664.5" calcext:value-type="float">
            <text:p>24664.5</text:p>
          </table:table-cell>
          <table:table-cell office:value-type="float" office:value="24674.5" calcext:value-type="float">
            <text:p>24674.5</text:p>
          </table:table-cell>
          <table:table-cell office:value-type="float" office:value="24659.5" calcext:value-type="float">
            <text:p>2465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9:51.900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6:59:54.2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406.2" calcext:value-type="float">
            <text:p>9406.2</text:p>
          </table:table-cell>
          <table:table-cell office:value-type="float" office:value="1" calcext:value-type="float">
            <text:p>1</text:p>
          </table:table-cell>
          <table:table-cell office:value-type="float" office:value="9526.9" calcext:value-type="float">
            <text:p>9526.9</text:p>
          </table:table-cell>
          <table:table-cell office:value-type="float" office:value="9647.6" calcext:value-type="float">
            <text:p>9647.6</text:p>
          </table:table-cell>
          <table:table-cell office:value-type="float" office:value="-120.700000000001" calcext:value-type="float">
            <text:p>-120.7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6:59:56.900</text:p>
          </table:table-cell>
          <table:table-cell office:value-type="string" calcext:value-type="string">
            <text:p>2025-10-10 12:59:56.900</text:p>
          </table:table-cell>
          <table:table-cell office:value-type="string" calcext:value-type="string">
            <text:p>LONG</text:p>
          </table:table-cell>
          <table:table-cell office:value-type="float" office:value="24661" calcext:value-type="float">
            <text:p>24661</text:p>
          </table:table-cell>
          <table:table-cell office:value-type="float" office:value="24671" calcext:value-type="float">
            <text:p>24671</text:p>
          </table:table-cell>
          <table:table-cell office:value-type="float" office:value="24656" calcext:value-type="float">
            <text:p>2465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6:59:57.900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7:00:03.3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285.5" calcext:value-type="float">
            <text:p>9285.5</text:p>
          </table:table-cell>
          <table:table-cell office:value-type="float" office:value="2" calcext:value-type="float">
            <text:p>2</text:p>
          </table:table-cell>
          <table:table-cell office:value-type="float" office:value="9406.2" calcext:value-type="float">
            <text:p>9406.2</text:p>
          </table:table-cell>
          <table:table-cell office:value-type="float" office:value="9647.6" calcext:value-type="float">
            <text:p>9647.6</text:p>
          </table:table-cell>
          <table:table-cell office:value-type="float" office:value="-241.400000000001" calcext:value-type="float">
            <text:p>-241.4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7:11:18.600</text:p>
          </table:table-cell>
          <table:table-cell office:value-type="string" calcext:value-type="string">
            <text:p>2025-10-10 13:11:18.600</text:p>
          </table:table-cell>
          <table:table-cell office:value-type="string" calcext:value-type="string">
            <text:p>SHORT</text:p>
          </table:table-cell>
          <table:table-cell office:value-type="float" office:value="24617" calcext:value-type="float">
            <text:p>24617</text:p>
          </table:table-cell>
          <table:table-cell office:value-type="float" office:value="24607" calcext:value-type="float">
            <text:p>24607</text:p>
          </table:table-cell>
          <table:table-cell office:value-type="float" office:value="24622" calcext:value-type="float">
            <text:p>2462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7:11:20.800</text:p>
          </table:table-cell>
          <table:table-cell office:value-type="float" office:value="89" calcext:value-type="float">
            <text:p>89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474.8" calcext:value-type="float">
            <text:p>9474.8</text:p>
          </table:table-cell>
          <table:table-cell office:value-type="float" office:value="0" calcext:value-type="float">
            <text:p>0</text:p>
          </table:table-cell>
          <table:table-cell office:value-type="float" office:value="9595.5" calcext:value-type="float">
            <text:p>9595.5</text:p>
          </table:table-cell>
          <table:table-cell office:value-type="float" office:value="9647.6" calcext:value-type="float">
            <text:p>9647.6</text:p>
          </table:table-cell>
          <table:table-cell office:value-type="float" office:value="-52.1000000000022" calcext:value-type="float">
            <text:p>-52.1000000000022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05:12.500</text:p>
          </table:table-cell>
          <table:table-cell office:value-type="string" calcext:value-type="string">
            <text:p>2025-10-10 14:05:12.500</text:p>
          </table:table-cell>
          <table:table-cell office:value-type="string" calcext:value-type="string">
            <text:p>SHORT</text:p>
          </table:table-cell>
          <table:table-cell office:value-type="float" office:value="24656" calcext:value-type="float">
            <text:p>24656</text:p>
          </table:table-cell>
          <table:table-cell office:value-type="float" office:value="24646" calcext:value-type="float">
            <text:p>24646</text:p>
          </table:table-cell>
          <table:table-cell office:value-type="float" office:value="24661" calcext:value-type="float">
            <text:p>2466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8:05:13.500</text:p>
          </table:table-cell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659.1" calcext:value-type="float">
            <text:p>965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79.79999999999" calcext:value-type="float">
            <text:p>9779.7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32:57.600</text:p>
          </table:table-cell>
          <table:table-cell office:value-type="string" calcext:value-type="string">
            <text:p>2025-10-10 14:32:57.600</text:p>
          </table:table-cell>
          <table:table-cell office:value-type="string" calcext:value-type="string">
            <text:p>LONG</text:p>
          </table:table-cell>
          <table:table-cell office:value-type="float" office:value="24669.5" calcext:value-type="float">
            <text:p>24669.5</text:p>
          </table:table-cell>
          <table:table-cell office:value-type="float" office:value="24679.5" calcext:value-type="float">
            <text:p>24679.5</text:p>
          </table:table-cell>
          <table:table-cell office:value-type="float" office:value="24664.5" calcext:value-type="float">
            <text:p>24664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8:32:59.000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8:33:46.6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848.39999999999" calcext:value-type="float">
            <text:p>9848.399999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69.09999999999" calcext:value-type="float">
            <text:p>9969.0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36:52.900</text:p>
          </table:table-cell>
          <table:table-cell office:value-type="string" calcext:value-type="string">
            <text:p>2025-10-10 14:36:52.900</text:p>
          </table:table-cell>
          <table:table-cell office:value-type="string" calcext:value-type="string">
            <text:p>SHORT</text:p>
          </table:table-cell>
          <table:table-cell office:value-type="float" office:value="24646.5" calcext:value-type="float">
            <text:p>24646.5</text:p>
          </table:table-cell>
          <table:table-cell office:value-type="float" office:value="24636.5" calcext:value-type="float">
            <text:p>24636.5</text:p>
          </table:table-cell>
          <table:table-cell office:value-type="float" office:value="24651.5" calcext:value-type="float">
            <text:p>2465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8:36:56.20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8:37:01.7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737.69999999999" calcext:value-type="float">
            <text:p>9737.69999999999</text:p>
          </table:table-cell>
          <table:table-cell office:value-type="float" office:value="1" calcext:value-type="float">
            <text:p>1</text:p>
          </table:table-cell>
          <table:table-cell office:value-type="float" office:value="9858.39999999999" calcext:value-type="float">
            <text:p>9858.39999999999</text:p>
          </table:table-cell>
          <table:table-cell office:value-type="float" office:value="9969.09999999999" calcext:value-type="float">
            <text:p>9969.09999999999</text:p>
          </table:table-cell>
          <table:table-cell office:value-type="float" office:value="-110.700000000001" calcext:value-type="float">
            <text:p>-110.7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40:31.800</text:p>
          </table:table-cell>
          <table:table-cell office:value-type="string" calcext:value-type="string">
            <text:p>2025-10-10 14:40:31.800</text:p>
          </table:table-cell>
          <table:table-cell office:value-type="string" calcext:value-type="string">
            <text:p>SHORT</text:p>
          </table:table-cell>
          <table:table-cell office:value-type="float" office:value="24651.5" calcext:value-type="float">
            <text:p>24651.5</text:p>
          </table:table-cell>
          <table:table-cell office:value-type="float" office:value="24641.5" calcext:value-type="float">
            <text:p>24641.5</text:p>
          </table:table-cell>
          <table:table-cell office:value-type="float" office:value="24656.5" calcext:value-type="float">
            <text:p>2465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8:40:32.800</text:p>
          </table:table-cell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8:40:50.7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616.99999999999" calcext:value-type="float">
            <text:p>9616.99999999999</text:p>
          </table:table-cell>
          <table:table-cell office:value-type="float" office:value="2" calcext:value-type="float">
            <text:p>2</text:p>
          </table:table-cell>
          <table:table-cell office:value-type="float" office:value="9737.69999999999" calcext:value-type="float">
            <text:p>9737.69999999999</text:p>
          </table:table-cell>
          <table:table-cell office:value-type="float" office:value="9969.09999999999" calcext:value-type="float">
            <text:p>9969.09999999999</text:p>
          </table:table-cell>
          <table:table-cell office:value-type="float" office:value="-231.400000000001" calcext:value-type="float">
            <text:p>-231.4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51:05.600</text:p>
          </table:table-cell>
          <table:table-cell office:value-type="string" calcext:value-type="string">
            <text:p>2025-10-10 14:51:05.600</text:p>
          </table:table-cell>
          <table:table-cell office:value-type="string" calcext:value-type="string">
            <text:p>LONG</text:p>
          </table:table-cell>
          <table:table-cell office:value-type="float" office:value="24610.5" calcext:value-type="float">
            <text:p>24610.5</text:p>
          </table:table-cell>
          <table:table-cell office:value-type="float" office:value="24620.5" calcext:value-type="float">
            <text:p>24620.5</text:p>
          </table:table-cell>
          <table:table-cell office:value-type="float" office:value="24605.5" calcext:value-type="float">
            <text:p>2460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0 18:51:06.60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8:51:07.2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501.29999999999" calcext:value-type="float">
            <text:p>9501.29999999999</text:p>
          </table:table-cell>
          <table:table-cell office:value-type="float" office:value="3" calcext:value-type="float">
            <text:p>3</text:p>
          </table:table-cell>
          <table:table-cell office:value-type="float" office:value="9621.99999999999" calcext:value-type="float">
            <text:p>9621.99999999999</text:p>
          </table:table-cell>
          <table:table-cell office:value-type="float" office:value="9969.09999999999" calcext:value-type="float">
            <text:p>9969.09999999999</text:p>
          </table:table-cell>
          <table:table-cell office:value-type="float" office:value="-347.100000000002" calcext:value-type="float">
            <text:p>-347.100000000002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54:32.300</text:p>
          </table:table-cell>
          <table:table-cell office:value-type="string" calcext:value-type="string">
            <text:p>2025-10-10 14:54:32.300</text:p>
          </table:table-cell>
          <table:table-cell office:value-type="string" calcext:value-type="string">
            <text:p>SHORT</text:p>
          </table:table-cell>
          <table:table-cell office:value-type="float" office:value="24574" calcext:value-type="float">
            <text:p>24574</text:p>
          </table:table-cell>
          <table:table-cell office:value-type="float" office:value="24564" calcext:value-type="float">
            <text:p>24564</text:p>
          </table:table-cell>
          <table:table-cell office:value-type="float" office:value="24579" calcext:value-type="float">
            <text:p>2457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8:54:34.2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690.59999999999" calcext:value-type="float">
            <text:p>9690.59999999999</text:p>
          </table:table-cell>
          <table:table-cell office:value-type="float" office:value="0" calcext:value-type="float">
            <text:p>0</text:p>
          </table:table-cell>
          <table:table-cell office:value-type="float" office:value="9811.29999999999" calcext:value-type="float">
            <text:p>9811.29999999999</text:p>
          </table:table-cell>
          <table:table-cell office:value-type="float" office:value="9969.09999999999" calcext:value-type="float">
            <text:p>9969.09999999999</text:p>
          </table:table-cell>
          <table:table-cell office:value-type="float" office:value="-157.800000000003" calcext:value-type="float">
            <text:p>-157.800000000003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54:49.300</text:p>
          </table:table-cell>
          <table:table-cell office:value-type="string" calcext:value-type="string">
            <text:p>2025-10-10 14:54:49.300</text:p>
          </table:table-cell>
          <table:table-cell office:value-type="string" calcext:value-type="string">
            <text:p>LONG</text:p>
          </table:table-cell>
          <table:table-cell office:value-type="float" office:value="24580" calcext:value-type="float">
            <text:p>24580</text:p>
          </table:table-cell>
          <table:table-cell office:value-type="float" office:value="24590" calcext:value-type="float">
            <text:p>24590</text:p>
          </table:table-cell>
          <table:table-cell office:value-type="float" office:value="24575" calcext:value-type="float">
            <text:p>245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8:54:50.2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8:55:03.4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579.89999999999" calcext:value-type="float">
            <text:p>9579.89999999999</text:p>
          </table:table-cell>
          <table:table-cell office:value-type="float" office:value="1" calcext:value-type="float">
            <text:p>1</text:p>
          </table:table-cell>
          <table:table-cell office:value-type="float" office:value="9700.59999999999" calcext:value-type="float">
            <text:p>9700.59999999999</text:p>
          </table:table-cell>
          <table:table-cell office:value-type="float" office:value="9969.09999999999" calcext:value-type="float">
            <text:p>9969.09999999999</text:p>
          </table:table-cell>
          <table:table-cell office:value-type="float" office:value="-268.500000000004" calcext:value-type="float">
            <text:p>-268.500000000004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8:59:35.700</text:p>
          </table:table-cell>
          <table:table-cell office:value-type="string" calcext:value-type="string">
            <text:p>2025-10-10 14:59:35.700</text:p>
          </table:table-cell>
          <table:table-cell office:value-type="string" calcext:value-type="string">
            <text:p>SHORT</text:p>
          </table:table-cell>
          <table:table-cell office:value-type="float" office:value="24590.25" calcext:value-type="float">
            <text:p>24590.25</text:p>
          </table:table-cell>
          <table:table-cell office:value-type="float" office:value="24580.25" calcext:value-type="float">
            <text:p>24580.25</text:p>
          </table:table-cell>
          <table:table-cell office:value-type="float" office:value="24595.25" calcext:value-type="float">
            <text:p>2459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8:59:38.600</text:p>
          </table:table-cell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769.19999999999" calcext:value-type="float">
            <text:p>9769.19999999999</text:p>
          </table:table-cell>
          <table:table-cell office:value-type="float" office:value="0" calcext:value-type="float">
            <text:p>0</text:p>
          </table:table-cell>
          <table:table-cell office:value-type="float" office:value="9889.89999999999" calcext:value-type="float">
            <text:p>9889.89999999999</text:p>
          </table:table-cell>
          <table:table-cell office:value-type="float" office:value="9969.09999999999" calcext:value-type="float">
            <text:p>9969.09999999999</text:p>
          </table:table-cell>
          <table:table-cell office:value-type="float" office:value="-79.2000000000044" calcext:value-type="float">
            <text:p>-79.2000000000044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9:21:29.300</text:p>
          </table:table-cell>
          <table:table-cell office:value-type="string" calcext:value-type="string">
            <text:p>2025-10-10 15:21:29.300</text:p>
          </table:table-cell>
          <table:table-cell office:value-type="string" calcext:value-type="string">
            <text:p>LONG</text:p>
          </table:table-cell>
          <table:table-cell office:value-type="float" office:value="24571" calcext:value-type="float">
            <text:p>24571</text:p>
          </table:table-cell>
          <table:table-cell office:value-type="float" office:value="24581" calcext:value-type="float">
            <text:p>24581</text:p>
          </table:table-cell>
          <table:table-cell office:value-type="float" office:value="24566" calcext:value-type="float">
            <text:p>2456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9:21:30.900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958.49999999999" calcext:value-type="float">
            <text:p>9958.499999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79.2" calcext:value-type="float">
            <text:p>1007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9:28:18.100</text:p>
          </table:table-cell>
          <table:table-cell office:value-type="string" calcext:value-type="string">
            <text:p>2025-10-10 15:28:18.100</text:p>
          </table:table-cell>
          <table:table-cell office:value-type="string" calcext:value-type="string">
            <text:p>SHORT</text:p>
          </table:table-cell>
          <table:table-cell office:value-type="float" office:value="24525.5" calcext:value-type="float">
            <text:p>24525.5</text:p>
          </table:table-cell>
          <table:table-cell office:value-type="float" office:value="24515.5" calcext:value-type="float">
            <text:p>24515.5</text:p>
          </table:table-cell>
          <table:table-cell office:value-type="float" office:value="24530.5" calcext:value-type="float">
            <text:p>2453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9:28:20.700</text:p>
          </table:table-cell>
          <table:table-cell office:value-type="float" office:value="96" calcext:value-type="float">
            <text:p>96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0 19:28:43.4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0147.8" calcext:value-type="float">
            <text:p>10147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68.5" calcext:value-type="float">
            <text:p>1026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9:37:29.300</text:p>
          </table:table-cell>
          <table:table-cell office:value-type="string" calcext:value-type="string">
            <text:p>2025-10-10 15:37:29.300</text:p>
          </table:table-cell>
          <table:table-cell office:value-type="string" calcext:value-type="string">
            <text:p>SHORT</text:p>
          </table:table-cell>
          <table:table-cell office:value-type="float" office:value="24482.25" calcext:value-type="float">
            <text:p>24482.25</text:p>
          </table:table-cell>
          <table:table-cell office:value-type="float" office:value="24472.25" calcext:value-type="float">
            <text:p>24472.25</text:p>
          </table:table-cell>
          <table:table-cell office:value-type="float" office:value="24487.25" calcext:value-type="float">
            <text:p>2448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9:37:30.900</text:p>
          </table:table-cell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9:37:38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0037.1" calcext:value-type="float">
            <text:p>10037.1</text:p>
          </table:table-cell>
          <table:table-cell office:value-type="float" office:value="1" calcext:value-type="float">
            <text:p>1</text:p>
          </table:table-cell>
          <table:table-cell office:value-type="float" office:value="10157.8" calcext:value-type="float">
            <text:p>10157.8</text:p>
          </table:table-cell>
          <table:table-cell office:value-type="float" office:value="10268.5" calcext:value-type="float">
            <text:p>10268.5</text:p>
          </table:table-cell>
          <table:table-cell office:value-type="float" office:value="-110.700000000001" calcext:value-type="float">
            <text:p>-110.70000000000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2025-10-10 19:58:27.400</text:p>
          </table:table-cell>
          <table:table-cell office:value-type="string" calcext:value-type="string">
            <text:p>2025-10-10 15:58:27.400</text:p>
          </table:table-cell>
          <table:table-cell office:value-type="string" calcext:value-type="string">
            <text:p>SHORT</text:p>
          </table:table-cell>
          <table:table-cell office:value-type="float" office:value="24410.25" calcext:value-type="float">
            <text:p>24410.25</text:p>
          </table:table-cell>
          <table:table-cell office:value-type="float" office:value="24400.25" calcext:value-type="float">
            <text:p>24400.25</text:p>
          </table:table-cell>
          <table:table-cell office:value-type="float" office:value="24415.25" calcext:value-type="float">
            <text:p>2441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0 19:58:32.300</text:p>
          </table:table-cell>
          <table:table-cell office:value-type="float" office:value="181" calcext:value-type="float">
            <text:p>181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0 19:58:39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368.75" calcext:value-type="float">
            <text:p>25368.75</text:p>
          </table:table-cell>
          <table:table-cell office:value-type="float" office:value="25368.25" calcext:value-type="float">
            <text:p>25368.2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9926.39999999999" calcext:value-type="float">
            <text:p>9926.39999999999</text:p>
          </table:table-cell>
          <table:table-cell office:value-type="float" office:value="2" calcext:value-type="float">
            <text:p>2</text:p>
          </table:table-cell>
          <table:table-cell office:value-type="float" office:value="10047.1" calcext:value-type="float">
            <text:p>10047.1</text:p>
          </table:table-cell>
          <table:table-cell office:value-type="float" office:value="10268.5" calcext:value-type="float">
            <text:p>10268.5</text:p>
          </table:table-cell>
          <table:table-cell office:value-type="float" office:value="-221.400000000001" calcext:value-type="float">
            <text:p>-221.400000000001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3:38:14.300</text:p>
          </table:table-cell>
          <table:table-cell office:value-type="string" calcext:value-type="string">
            <text:p>2025-10-16 09:38:14.300</text:p>
          </table:table-cell>
          <table:table-cell office:value-type="string" calcext:value-type="string">
            <text:p>LONG</text:p>
          </table:table-cell>
          <table:table-cell office:value-type="float" office:value="25075" calcext:value-type="float">
            <text:p>25075</text:p>
          </table:table-cell>
          <table:table-cell office:value-type="float" office:value="25085" calcext:value-type="float">
            <text:p>25085</text:p>
          </table:table-cell>
          <table:table-cell office:value-type="float" office:value="25070" calcext:value-type="float">
            <text:p>2507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3:38:15.30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6 13:38:21.6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4:24:20.600</text:p>
          </table:table-cell>
          <table:table-cell office:value-type="string" calcext:value-type="string">
            <text:p>2025-10-16 10:24:20.600</text:p>
          </table:table-cell>
          <table:table-cell office:value-type="string" calcext:value-type="string">
            <text:p>SHORT</text:p>
          </table:table-cell>
          <table:table-cell office:value-type="float" office:value="25106.75" calcext:value-type="float">
            <text:p>25106.75</text:p>
          </table:table-cell>
          <table:table-cell office:value-type="float" office:value="25096.75" calcext:value-type="float">
            <text:p>25096.75</text:p>
          </table:table-cell>
          <table:table-cell office:value-type="float" office:value="25111.75" calcext:value-type="float">
            <text:p>2511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4:24:21.60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58.6" calcext:value-type="float">
            <text:p>58.6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office:value-type="float" office:value="179.3" calcext:value-type="float">
            <text:p>179.3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4:43:47.400</text:p>
          </table:table-cell>
          <table:table-cell office:value-type="string" calcext:value-type="string">
            <text:p>2025-10-16 10:43:47.400</text:p>
          </table:table-cell>
          <table:table-cell office:value-type="string" calcext:value-type="string">
            <text:p>SHORT</text:p>
          </table:table-cell>
          <table:table-cell office:value-type="float" office:value="25173.25" calcext:value-type="float">
            <text:p>25173.25</text:p>
          </table:table-cell>
          <table:table-cell office:value-type="float" office:value="25163.25" calcext:value-type="float">
            <text:p>25163.25</text:p>
          </table:table-cell>
          <table:table-cell office:value-type="float" office:value="25178.25" calcext:value-type="float">
            <text:p>2517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6 14:43:47.600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6 14:45:15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-52.1" calcext:value-type="float">
            <text:p>-52.1</text:p>
          </table:table-cell>
          <table:table-cell office:value-type="float" office:value="2" calcext:value-type="float">
            <text:p>2</text:p>
          </table:table-cell>
          <table:table-cell office:value-type="float" office:value="-52.1" calcext:value-type="float">
            <text:p>-52.1</text:p>
          </table:table-cell>
          <table:table-cell office:value-type="float" office:value="179.3" calcext:value-type="float">
            <text:p>179.3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5:15:00.800</text:p>
          </table:table-cell>
          <table:table-cell office:value-type="string" calcext:value-type="string">
            <text:p>2025-10-16 11:15:00.800</text:p>
          </table:table-cell>
          <table:table-cell office:value-type="string" calcext:value-type="string">
            <text:p>SHORT</text:p>
          </table:table-cell>
          <table:table-cell office:value-type="float" office:value="25121.25" calcext:value-type="float">
            <text:p>25121.25</text:p>
          </table:table-cell>
          <table:table-cell office:value-type="float" office:value="25111.25" calcext:value-type="float">
            <text:p>25111.25</text:p>
          </table:table-cell>
          <table:table-cell office:value-type="float" office:value="25126.25" calcext:value-type="float">
            <text:p>2512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6 15:15:00.90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6 15:15:56.7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37.2" calcext:value-type="float">
            <text:p>137.2</text:p>
          </table:table-cell>
          <table:table-cell office:value-type="float" office:value="0" calcext:value-type="float">
            <text:p>0</text:p>
          </table:table-cell>
          <table:table-cell office:value-type="float" office:value="137.2" calcext:value-type="float">
            <text:p>137.2</text:p>
          </table:table-cell>
          <table:table-cell office:value-type="float" office:value="179.3" calcext:value-type="float">
            <text:p>179.3</text:p>
          </table:table-cell>
          <table:table-cell office:value-type="float" office:value="-42.1" calcext:value-type="float">
            <text:p>-42.1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5:46:24.400</text:p>
          </table:table-cell>
          <table:table-cell office:value-type="string" calcext:value-type="string">
            <text:p>2025-10-16 11:46:24.400</text:p>
          </table:table-cell>
          <table:table-cell office:value-type="string" calcext:value-type="string">
            <text:p>SHORT</text:p>
          </table:table-cell>
          <table:table-cell office:value-type="float" office:value="24981.25" calcext:value-type="float">
            <text:p>24981.25</text:p>
          </table:table-cell>
          <table:table-cell office:value-type="float" office:value="24971.25" calcext:value-type="float">
            <text:p>24971.25</text:p>
          </table:table-cell>
          <table:table-cell office:value-type="float" office:value="24986.25" calcext:value-type="float">
            <text:p>2498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5:46:25.40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6 15:46:27.5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179.3" calcext:value-type="float">
            <text:p>179.3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6:09:16.500</text:p>
          </table:table-cell>
          <table:table-cell office:value-type="string" calcext:value-type="string">
            <text:p>2025-10-16 12:09:16.500</text:p>
          </table:table-cell>
          <table:table-cell office:value-type="string" calcext:value-type="string">
            <text:p>SHORT</text:p>
          </table:table-cell>
          <table:table-cell office:value-type="float" office:value="24975.5" calcext:value-type="float">
            <text:p>24975.5</text:p>
          </table:table-cell>
          <table:table-cell office:value-type="float" office:value="24965.5" calcext:value-type="float">
            <text:p>24965.5</text:p>
          </table:table-cell>
          <table:table-cell office:value-type="float" office:value="24980.5" calcext:value-type="float">
            <text:p>2498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6:09:17.500</text:p>
          </table:table-cell>
          <table:table-cell office:value-type="float" office:value="146" calcext:value-type="float">
            <text:p>146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6 16:10:08.3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95.8" calcext:value-type="float">
            <text:p>195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5.8" calcext:value-type="float">
            <text:p>19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6:17:49.000</text:p>
          </table:table-cell>
          <table:table-cell office:value-type="string" calcext:value-type="string">
            <text:p>2025-10-16 12:17:49.000</text:p>
          </table:table-cell>
          <table:table-cell office:value-type="string" calcext:value-type="string">
            <text:p>SHORT</text:p>
          </table:table-cell>
          <table:table-cell office:value-type="float" office:value="24948.5" calcext:value-type="float">
            <text:p>24948.5</text:p>
          </table:table-cell>
          <table:table-cell office:value-type="float" office:value="24938.5" calcext:value-type="float">
            <text:p>24938.5</text:p>
          </table:table-cell>
          <table:table-cell office:value-type="float" office:value="24953.5" calcext:value-type="float">
            <text:p>2495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6:17:50.000</text:p>
          </table:table-cell>
          <table:table-cell office:value-type="float" office:value="129" calcext:value-type="float">
            <text:p>129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5.1" calcext:value-type="float">
            <text:p>75.1</text:p>
          </table:table-cell>
          <table:table-cell office:value-type="float" office:value="1" calcext:value-type="float">
            <text:p>1</text:p>
          </table:table-cell>
          <table:table-cell office:value-type="float" office:value="75.1" calcext:value-type="float">
            <text:p>75.1</text:p>
          </table:table-cell>
          <table:table-cell office:value-type="float" office:value="195.8" calcext:value-type="float">
            <text:p>195.8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6:27:37.100</text:p>
          </table:table-cell>
          <table:table-cell office:value-type="string" calcext:value-type="string">
            <text:p>2025-10-16 12:27:37.100</text:p>
          </table:table-cell>
          <table:table-cell office:value-type="string" calcext:value-type="string">
            <text:p>SHORT</text:p>
          </table:table-cell>
          <table:table-cell office:value-type="float" office:value="24896.25" calcext:value-type="float">
            <text:p>24896.25</text:p>
          </table:table-cell>
          <table:table-cell office:value-type="float" office:value="24886.25" calcext:value-type="float">
            <text:p>24886.25</text:p>
          </table:table-cell>
          <table:table-cell office:value-type="float" office:value="24901.25" calcext:value-type="float">
            <text:p>2490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6 16:27:37.400</text:p>
          </table:table-cell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-35.6" calcext:value-type="float">
            <text:p>-35.6</text:p>
          </table:table-cell>
          <table:table-cell office:value-type="float" office:value="2" calcext:value-type="float">
            <text:p>2</text:p>
          </table:table-cell>
          <table:table-cell office:value-type="float" office:value="-35.6" calcext:value-type="float">
            <text:p>-35.6</text:p>
          </table:table-cell>
          <table:table-cell office:value-type="float" office:value="195.8" calcext:value-type="float">
            <text:p>195.8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7:19:59.600</text:p>
          </table:table-cell>
          <table:table-cell office:value-type="string" calcext:value-type="string">
            <text:p>2025-10-16 13:19:59.600</text:p>
          </table:table-cell>
          <table:table-cell office:value-type="string" calcext:value-type="string">
            <text:p>LONG</text:p>
          </table:table-cell>
          <table:table-cell office:value-type="float" office:value="24931.5" calcext:value-type="float">
            <text:p>24931.5</text:p>
          </table:table-cell>
          <table:table-cell office:value-type="float" office:value="24941.5" calcext:value-type="float">
            <text:p>24941.5</text:p>
          </table:table-cell>
          <table:table-cell office:value-type="float" office:value="24926.5" calcext:value-type="float">
            <text:p>2492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7:20:00.600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.7</text:p>
          </table:table-cell>
          <table:table-cell office:value-type="float" office:value="195.8" calcext:value-type="float">
            <text:p>195.8</text:p>
          </table:table-cell>
          <table:table-cell office:value-type="float" office:value="-52.1" calcext:value-type="float">
            <text:p>-52.1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8:12:34.100</text:p>
          </table:table-cell>
          <table:table-cell office:value-type="string" calcext:value-type="string">
            <text:p>2025-10-16 14:12:34.100</text:p>
          </table:table-cell>
          <table:table-cell office:value-type="string" calcext:value-type="string">
            <text:p>SHORT</text:p>
          </table:table-cell>
          <table:table-cell office:value-type="float" office:value="24710.25" calcext:value-type="float">
            <text:p>24710.25</text:p>
          </table:table-cell>
          <table:table-cell office:value-type="float" office:value="24700.25" calcext:value-type="float">
            <text:p>24700.25</text:p>
          </table:table-cell>
          <table:table-cell office:value-type="float" office:value="24715.25" calcext:value-type="float">
            <text:p>2471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6 18:12:34.900</text:p>
          </table:table-cell>
          <table:table-cell office:value-type="float" office:value="96" calcext:value-type="float">
            <text:p>96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6 18:13:29.9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.40000000000003" calcext:value-type="float">
            <text:p>7.4000000000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8:41:27.100</text:p>
          </table:table-cell>
          <table:table-cell office:value-type="string" calcext:value-type="string">
            <text:p>2025-10-16 14:41:27.100</text:p>
          </table:table-cell>
          <table:table-cell office:value-type="string" calcext:value-type="string">
            <text:p>SHORT</text:p>
          </table:table-cell>
          <table:table-cell office:value-type="float" office:value="24704" calcext:value-type="float">
            <text:p>24704</text:p>
          </table:table-cell>
          <table:table-cell office:value-type="float" office:value="24694" calcext:value-type="float">
            <text:p>24694</text:p>
          </table:table-cell>
          <table:table-cell office:value-type="float" office:value="24709" calcext:value-type="float">
            <text:p>2470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8:41:28.100</text:p>
          </table:table-cell>
          <table:table-cell office:value-type="float" office:value="98" calcext:value-type="float">
            <text:p>98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7.3" calcext:value-type="float">
            <text:p>5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8:47:07.400</text:p>
          </table:table-cell>
          <table:table-cell office:value-type="string" calcext:value-type="string">
            <text:p>2025-10-16 14:47:07.400</text:p>
          </table:table-cell>
          <table:table-cell office:value-type="string" calcext:value-type="string">
            <text:p>SHORT</text:p>
          </table:table-cell>
          <table:table-cell office:value-type="float" office:value="24775" calcext:value-type="float">
            <text:p>24775</text:p>
          </table:table-cell>
          <table:table-cell office:value-type="float" office:value="24765" calcext:value-type="float">
            <text:p>24765</text:p>
          </table:table-cell>
          <table:table-cell office:value-type="float" office:value="24780" calcext:value-type="float">
            <text:p>2478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8:47:08.400</text:p>
          </table:table-cell>
          <table:table-cell office:value-type="float" office:value="83" calcext:value-type="float">
            <text:p>83</text:p>
          </table:table-cell>
          <table:table-cell office:value-type="float" office:value="-48" calcext:value-type="float">
            <text:p>-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16 18:47:14.1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-44.7" calcext:value-type="float">
            <text:p>-44.7</text:p>
          </table:table-cell>
          <table:table-cell office:value-type="float" office:value="1" calcext:value-type="float">
            <text:p>1</text:p>
          </table:table-cell>
          <table:table-cell office:value-type="float" office:value="401.6" calcext:value-type="float">
            <text:p>401.6</text:p>
          </table:table-cell>
          <table:table-cell office:value-type="float" office:value="517.3" calcext:value-type="float">
            <text:p>517.3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9:06:43.100</text:p>
          </table:table-cell>
          <table:table-cell office:value-type="string" calcext:value-type="string">
            <text:p>2025-10-16 15:06:43.100</text:p>
          </table:table-cell>
          <table:table-cell office:value-type="string" calcext:value-type="string">
            <text:p>SHORT</text:p>
          </table:table-cell>
          <table:table-cell office:value-type="float" office:value="24802.25" calcext:value-type="float">
            <text:p>24802.25</text:p>
          </table:table-cell>
          <table:table-cell office:value-type="float" office:value="24792.25" calcext:value-type="float">
            <text:p>24792.25</text:p>
          </table:table-cell>
          <table:table-cell office:value-type="float" office:value="24807.25" calcext:value-type="float">
            <text:p>2480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6 19:06:45.700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16 19:07:25.9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44.6" calcext:value-type="float">
            <text:p>144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0.9" calcext:value-type="float">
            <text:p>59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9:21:31.600</text:p>
          </table:table-cell>
          <table:table-cell office:value-type="string" calcext:value-type="string">
            <text:p>2025-10-16 15:21:31.600</text:p>
          </table:table-cell>
          <table:table-cell office:value-type="string" calcext:value-type="string">
            <text:p>SHORT</text:p>
          </table:table-cell>
          <table:table-cell office:value-type="float" office:value="24698.75" calcext:value-type="float">
            <text:p>24698.75</text:p>
          </table:table-cell>
          <table:table-cell office:value-type="float" office:value="24688.75" calcext:value-type="float">
            <text:p>24688.75</text:p>
          </table:table-cell>
          <table:table-cell office:value-type="float" office:value="24703.75" calcext:value-type="float">
            <text:p>2470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16 19:21:32.6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23.9" calcext:value-type="float">
            <text:p>323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0.2" calcext:value-type="float">
            <text:p>77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2025-10-16 19:49:08.300</text:p>
          </table:table-cell>
          <table:table-cell office:value-type="string" calcext:value-type="string">
            <text:p>2025-10-16 15:49:08.300</text:p>
          </table:table-cell>
          <table:table-cell office:value-type="string" calcext:value-type="string">
            <text:p>LONG</text:p>
          </table:table-cell>
          <table:table-cell office:value-type="float" office:value="24783.5" calcext:value-type="float">
            <text:p>24783.5</text:p>
          </table:table-cell>
          <table:table-cell office:value-type="float" office:value="24793.5" calcext:value-type="float">
            <text:p>24793.5</text:p>
          </table:table-cell>
          <table:table-cell office:value-type="float" office:value="24778.5" calcext:value-type="float">
            <text:p>2477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16 19:49:08.700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075" calcext:value-type="float">
            <text:p>2507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13.2" calcext:value-type="float">
            <text:p>213.2</text:p>
          </table:table-cell>
          <table:table-cell office:value-type="float" office:value="1" calcext:value-type="float">
            <text:p>1</text:p>
          </table:table-cell>
          <table:table-cell office:value-type="float" office:value="659.5" calcext:value-type="float">
            <text:p>659.5</text:p>
          </table:table-cell>
          <table:table-cell office:value-type="float" office:value="770.2" calcext:value-type="float">
            <text:p>770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05:41.300</text:p>
          </table:table-cell>
          <table:table-cell office:value-type="string" calcext:value-type="string">
            <text:p>2025-10-20 10:05:41.300</text:p>
          </table:table-cell>
          <table:table-cell office:value-type="string" calcext:value-type="string">
            <text:p>LONG</text:p>
          </table:table-cell>
          <table:table-cell office:value-type="float" office:value="25237.75" calcext:value-type="float">
            <text:p>25237.75</text:p>
          </table:table-cell>
          <table:table-cell office:value-type="float" office:value="25247.75" calcext:value-type="float">
            <text:p>25247.75</text:p>
          </table:table-cell>
          <table:table-cell office:value-type="float" office:value="25232.75" calcext:value-type="float">
            <text:p>2523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05:41.900</text:p>
          </table:table-cell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4:06:46.5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09:39.500</text:p>
          </table:table-cell>
          <table:table-cell office:value-type="string" calcext:value-type="string">
            <text:p>2025-10-20 10:09:39.500</text:p>
          </table:table-cell>
          <table:table-cell office:value-type="string" calcext:value-type="string">
            <text:p>LONG</text:p>
          </table:table-cell>
          <table:table-cell office:value-type="float" office:value="25244.25" calcext:value-type="float">
            <text:p>25244.25</text:p>
          </table:table-cell>
          <table:table-cell office:value-type="float" office:value="25254.25" calcext:value-type="float">
            <text:p>25254.25</text:p>
          </table:table-cell>
          <table:table-cell office:value-type="float" office:value="25239.25" calcext:value-type="float">
            <text:p>2523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09:41.40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378.6" calcext:value-type="float">
            <text:p>37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8.6" calcext:value-type="float">
            <text:p>37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10:24.100</text:p>
          </table:table-cell>
          <table:table-cell office:value-type="string" calcext:value-type="string">
            <text:p>2025-10-20 10:10:24.100</text:p>
          </table:table-cell>
          <table:table-cell office:value-type="string" calcext:value-type="string">
            <text:p>LONG</text:p>
          </table:table-cell>
          <table:table-cell office:value-type="float" office:value="25247.5" calcext:value-type="float">
            <text:p>25247.5</text:p>
          </table:table-cell>
          <table:table-cell office:value-type="float" office:value="25257.5" calcext:value-type="float">
            <text:p>25257.5</text:p>
          </table:table-cell>
          <table:table-cell office:value-type="float" office:value="25242.5" calcext:value-type="float">
            <text:p>2524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4:10:25.100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547.9" calcext:value-type="float">
            <text:p>54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7.9" calcext:value-type="float">
            <text:p>5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24:24.800</text:p>
          </table:table-cell>
          <table:table-cell office:value-type="string" calcext:value-type="string">
            <text:p>2025-10-20 10:24:24.800</text:p>
          </table:table-cell>
          <table:table-cell office:value-type="string" calcext:value-type="string">
            <text:p>LONG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8" calcext:value-type="float">
            <text:p>25258</text:p>
          </table:table-cell>
          <table:table-cell office:value-type="float" office:value="25243" calcext:value-type="float">
            <text:p>2524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24:24.900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437.2" calcext:value-type="float">
            <text:p>437.2</text:p>
          </table:table-cell>
          <table:table-cell office:value-type="float" office:value="1" calcext:value-type="float">
            <text:p>1</text:p>
          </table:table-cell>
          <table:table-cell office:value-type="float" office:value="437.2" calcext:value-type="float">
            <text:p>437.2</text:p>
          </table:table-cell>
          <table:table-cell office:value-type="float" office:value="547.9" calcext:value-type="float">
            <text:p>547.9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26:41.400</text:p>
          </table:table-cell>
          <table:table-cell office:value-type="string" calcext:value-type="string">
            <text:p>2025-10-20 10:26:41.400</text:p>
          </table:table-cell>
          <table:table-cell office:value-type="string" calcext:value-type="string">
            <text:p>SHORT</text:p>
          </table:table-cell>
          <table:table-cell office:value-type="float" office:value="25261.5" calcext:value-type="float">
            <text:p>25261.5</text:p>
          </table:table-cell>
          <table:table-cell office:value-type="float" office:value="25251.5" calcext:value-type="float">
            <text:p>25251.5</text:p>
          </table:table-cell>
          <table:table-cell office:value-type="float" office:value="25266.5" calcext:value-type="float">
            <text:p>2526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4:26:42.400</text:p>
          </table:table-cell>
          <table:table-cell office:value-type="float" office:value="1056" calcext:value-type="float">
            <text:p>10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59.3" calcext:value-type="float">
            <text:p>15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596.5" calcext:value-type="float">
            <text:p>59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6.5" calcext:value-type="float">
            <text:p>5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30:03.700</text:p>
          </table:table-cell>
          <table:table-cell office:value-type="string" calcext:value-type="string">
            <text:p>2025-10-20 10:30:03.700</text:p>
          </table:table-cell>
          <table:table-cell office:value-type="string" calcext:value-type="string">
            <text:p>SHORT</text:p>
          </table:table-cell>
          <table:table-cell office:value-type="float" office:value="25283.75" calcext:value-type="float">
            <text:p>25283.75</text:p>
          </table:table-cell>
          <table:table-cell office:value-type="float" office:value="25273.75" calcext:value-type="float">
            <text:p>25273.75</text:p>
          </table:table-cell>
          <table:table-cell office:value-type="float" office:value="25288.75" calcext:value-type="float">
            <text:p>2528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30:04.20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85.8" calcext:value-type="float">
            <text:p>485.8</text:p>
          </table:table-cell>
          <table:table-cell office:value-type="float" office:value="1" calcext:value-type="float">
            <text:p>1</text:p>
          </table:table-cell>
          <table:table-cell office:value-type="float" office:value="485.8" calcext:value-type="float">
            <text:p>485.8</text:p>
          </table:table-cell>
          <table:table-cell office:value-type="float" office:value="596.5" calcext:value-type="float">
            <text:p>596.5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36:43.900</text:p>
          </table:table-cell>
          <table:table-cell office:value-type="string" calcext:value-type="string">
            <text:p>2025-10-20 10:36:43.900</text:p>
          </table:table-cell>
          <table:table-cell office:value-type="string" calcext:value-type="string">
            <text:p>LONG</text:p>
          </table:table-cell>
          <table:table-cell office:value-type="float" office:value="25278.25" calcext:value-type="float">
            <text:p>25278.25</text:p>
          </table:table-cell>
          <table:table-cell office:value-type="float" office:value="25288.25" calcext:value-type="float">
            <text:p>25288.25</text:p>
          </table:table-cell>
          <table:table-cell office:value-type="float" office:value="25273.25" calcext:value-type="float">
            <text:p>25273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36:44.90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4:38:24.9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75.1" calcext:value-type="float">
            <text:p>375.1</text:p>
          </table:table-cell>
          <table:table-cell office:value-type="float" office:value="2" calcext:value-type="float">
            <text:p>2</text:p>
          </table:table-cell>
          <table:table-cell office:value-type="float" office:value="375.1" calcext:value-type="float">
            <text:p>375.1</text:p>
          </table:table-cell>
          <table:table-cell office:value-type="float" office:value="596.5" calcext:value-type="float">
            <text:p>596.5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40:15.900</text:p>
          </table:table-cell>
          <table:table-cell office:value-type="string" calcext:value-type="string">
            <text:p>2025-10-20 10:40:15.900</text:p>
          </table:table-cell>
          <table:table-cell office:value-type="string" calcext:value-type="string">
            <text:p>LONG</text:p>
          </table:table-cell>
          <table:table-cell office:value-type="float" office:value="25287.25" calcext:value-type="float">
            <text:p>25287.25</text:p>
          </table:table-cell>
          <table:table-cell office:value-type="float" office:value="25297.25" calcext:value-type="float">
            <text:p>25297.25</text:p>
          </table:table-cell>
          <table:table-cell office:value-type="float" office:value="25282.25" calcext:value-type="float">
            <text:p>25282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4:40:16.900</text:p>
          </table:table-cell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30.7" calcext:value-type="float">
            <text:p>-13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44.4" calcext:value-type="float">
            <text:p>244.4</text:p>
          </table:table-cell>
          <table:table-cell office:value-type="float" office:value="3" calcext:value-type="float">
            <text:p>3</text:p>
          </table:table-cell>
          <table:table-cell office:value-type="float" office:value="244.4" calcext:value-type="float">
            <text:p>244.4</text:p>
          </table:table-cell>
          <table:table-cell office:value-type="float" office:value="596.5" calcext:value-type="float">
            <text:p>596.5</text:p>
          </table:table-cell>
          <table:table-cell office:value-type="float" office:value="-352.1" calcext:value-type="float">
            <text:p>-352.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42:05.300</text:p>
          </table:table-cell>
          <table:table-cell office:value-type="string" calcext:value-type="string">
            <text:p>2025-10-20 10:42:05.300</text:p>
          </table:table-cell>
          <table:table-cell office:value-type="string" calcext:value-type="string">
            <text:p>SHORT</text:p>
          </table:table-cell>
          <table:table-cell office:value-type="float" office:value="25296.5" calcext:value-type="float">
            <text:p>25296.5</text:p>
          </table:table-cell>
          <table:table-cell office:value-type="float" office:value="25286.5" calcext:value-type="float">
            <text:p>25286.5</text:p>
          </table:table-cell>
          <table:table-cell office:value-type="float" office:value="25301.5" calcext:value-type="float">
            <text:p>25301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4:42:06.300</text:p>
          </table:table-cell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4:42:46.4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3.7" calcext:value-type="float">
            <text:p>423.7</text:p>
          </table:table-cell>
          <table:table-cell office:value-type="float" office:value="0" calcext:value-type="float">
            <text:p>0</text:p>
          </table:table-cell>
          <table:table-cell office:value-type="float" office:value="423.7" calcext:value-type="float">
            <text:p>423.7</text:p>
          </table:table-cell>
          <table:table-cell office:value-type="float" office:value="596.5" calcext:value-type="float">
            <text:p>596.5</text:p>
          </table:table-cell>
          <table:table-cell office:value-type="float" office:value="-172.8" calcext:value-type="float">
            <text:p>-172.8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47:32.100</text:p>
          </table:table-cell>
          <table:table-cell office:value-type="string" calcext:value-type="string">
            <text:p>2025-10-20 10:47:32.100</text:p>
          </table:table-cell>
          <table:table-cell office:value-type="string" calcext:value-type="string">
            <text:p>SHORT</text:p>
          </table:table-cell>
          <table:table-cell office:value-type="float" office:value="25304.5" calcext:value-type="float">
            <text:p>25304.5</text:p>
          </table:table-cell>
          <table:table-cell office:value-type="float" office:value="25294.5" calcext:value-type="float">
            <text:p>25294.5</text:p>
          </table:table-cell>
          <table:table-cell office:value-type="float" office:value="25309.5" calcext:value-type="float">
            <text:p>2530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4:47:33.100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52:47.100</text:p>
          </table:table-cell>
          <table:table-cell office:value-type="string" calcext:value-type="string">
            <text:p>2025-10-20 10:52:47.100</text:p>
          </table:table-cell>
          <table:table-cell office:value-type="string" calcext:value-type="string">
            <text:p>SHORT</text:p>
          </table:table-cell>
          <table:table-cell office:value-type="float" office:value="25312.75" calcext:value-type="float">
            <text:p>25312.75</text:p>
          </table:table-cell>
          <table:table-cell office:value-type="float" office:value="25302.75" calcext:value-type="float">
            <text:p>25302.75</text:p>
          </table:table-cell>
          <table:table-cell office:value-type="float" office:value="25317.75" calcext:value-type="float">
            <text:p>2531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52:47.80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4:53:37.4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92.3" calcext:value-type="float">
            <text:p>492.3</text:p>
          </table:table-cell>
          <table:table-cell office:value-type="float" office:value="1" calcext:value-type="float">
            <text:p>1</text:p>
          </table:table-cell>
          <table:table-cell office:value-type="float" office:value="492.3" calcext:value-type="float">
            <text:p>492.3</text:p>
          </table:table-cell>
          <table:table-cell office:value-type="float" office:value="603" calcext:value-type="float">
            <text:p>60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4:57:33.700</text:p>
          </table:table-cell>
          <table:table-cell office:value-type="string" calcext:value-type="string">
            <text:p>2025-10-20 10:57:33.700</text:p>
          </table:table-cell>
          <table:table-cell office:value-type="string" calcext:value-type="string">
            <text:p>SHORT</text:p>
          </table:table-cell>
          <table:table-cell office:value-type="float" office:value="25315" calcext:value-type="float">
            <text:p>25315</text:p>
          </table:table-cell>
          <table:table-cell office:value-type="float" office:value="25305" calcext:value-type="float">
            <text:p>25305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4:57:36.300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1.6" calcext:value-type="float">
            <text:p>381.6</text:p>
          </table:table-cell>
          <table:table-cell office:value-type="float" office:value="2" calcext:value-type="float">
            <text:p>2</text:p>
          </table:table-cell>
          <table:table-cell office:value-type="float" office:value="381.6" calcext:value-type="float">
            <text:p>381.6</text:p>
          </table:table-cell>
          <table:table-cell office:value-type="float" office:value="603" calcext:value-type="float">
            <text:p>603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01:23.000</text:p>
          </table:table-cell>
          <table:table-cell office:value-type="string" calcext:value-type="string">
            <text:p>2025-10-20 11:01:23.000</text:p>
          </table:table-cell>
          <table:table-cell office:value-type="string" calcext:value-type="string">
            <text:p>LONG</text:p>
          </table:table-cell>
          <table:table-cell office:value-type="float" office:value="25307" calcext:value-type="float">
            <text:p>25307</text:p>
          </table:table-cell>
          <table:table-cell office:value-type="float" office:value="25317" calcext:value-type="float">
            <text:p>25317</text:p>
          </table:table-cell>
          <table:table-cell office:value-type="float" office:value="25302" calcext:value-type="float">
            <text:p>2530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5:01:24.000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65.9" calcext:value-type="float">
            <text:p>265.9</text:p>
          </table:table-cell>
          <table:table-cell office:value-type="float" office:value="3" calcext:value-type="float">
            <text:p>3</text:p>
          </table:table-cell>
          <table:table-cell office:value-type="float" office:value="265.9" calcext:value-type="float">
            <text:p>265.9</text:p>
          </table:table-cell>
          <table:table-cell office:value-type="float" office:value="603" calcext:value-type="float">
            <text:p>603</text:p>
          </table:table-cell>
          <table:table-cell office:value-type="float" office:value="-337.1" calcext:value-type="float">
            <text:p>-337.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03:54.700</text:p>
          </table:table-cell>
          <table:table-cell office:value-type="string" calcext:value-type="string">
            <text:p>2025-10-20 11:03:54.700</text:p>
          </table:table-cell>
          <table:table-cell office:value-type="string" calcext:value-type="string">
            <text:p>LONG</text:p>
          </table:table-cell>
          <table:table-cell office:value-type="float" office:value="25311.5" calcext:value-type="float">
            <text:p>25311.5</text:p>
          </table:table-cell>
          <table:table-cell office:value-type="float" office:value="25321.5" calcext:value-type="float">
            <text:p>25321.5</text:p>
          </table:table-cell>
          <table:table-cell office:value-type="float" office:value="25306.5" calcext:value-type="float">
            <text:p>2530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5:03:55.70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45.2" calcext:value-type="float">
            <text:p>445.2</text:p>
          </table:table-cell>
          <table:table-cell office:value-type="float" office:value="0" calcext:value-type="float">
            <text:p>0</text:p>
          </table:table-cell>
          <table:table-cell office:value-type="float" office:value="445.2" calcext:value-type="float">
            <text:p>445.2</text:p>
          </table:table-cell>
          <table:table-cell office:value-type="float" office:value="603" calcext:value-type="float">
            <text:p>603</text:p>
          </table:table-cell>
          <table:table-cell office:value-type="float" office:value="-157.8" calcext:value-type="float">
            <text:p>-157.8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05:05.300</text:p>
          </table:table-cell>
          <table:table-cell office:value-type="string" calcext:value-type="string">
            <text:p>2025-10-20 11:05:05.300</text:p>
          </table:table-cell>
          <table:table-cell office:value-type="string" calcext:value-type="string">
            <text:p>SHORT</text:p>
          </table:table-cell>
          <table:table-cell office:value-type="float" office:value="25309.5" calcext:value-type="float">
            <text:p>25309.5</text:p>
          </table:table-cell>
          <table:table-cell office:value-type="float" office:value="25299.5" calcext:value-type="float">
            <text:p>25299.5</text:p>
          </table:table-cell>
          <table:table-cell office:value-type="float" office:value="25314.5" calcext:value-type="float">
            <text:p>25314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5:05:06.300</text:p>
          </table:table-cell>
          <table:table-cell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5:06:47.1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9.5" calcext:value-type="float">
            <text:p>329.5</text:p>
          </table:table-cell>
          <table:table-cell office:value-type="float" office:value="1" calcext:value-type="float">
            <text:p>1</text:p>
          </table:table-cell>
          <table:table-cell office:value-type="float" office:value="329.5" calcext:value-type="float">
            <text:p>329.5</text:p>
          </table:table-cell>
          <table:table-cell office:value-type="float" office:value="603" calcext:value-type="float">
            <text:p>603</text:p>
          </table:table-cell>
          <table:table-cell office:value-type="float" office:value="-273.5" calcext:value-type="float">
            <text:p>-273.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08:12.600</text:p>
          </table:table-cell>
          <table:table-cell office:value-type="string" calcext:value-type="string">
            <text:p>2025-10-20 11:08:12.600</text:p>
          </table:table-cell>
          <table:table-cell office:value-type="string" calcext:value-type="string">
            <text:p>LONG</text:p>
          </table:table-cell>
          <table:table-cell office:value-type="float" office:value="25319" calcext:value-type="float">
            <text:p>25319</text:p>
          </table:table-cell>
          <table:table-cell office:value-type="float" office:value="25329" calcext:value-type="float">
            <text:p>25329</text:p>
          </table:table-cell>
          <table:table-cell office:value-type="float" office:value="25314" calcext:value-type="float">
            <text:p>2531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08:15.900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18.8" calcext:value-type="float">
            <text:p>518.8</text:p>
          </table:table-cell>
          <table:table-cell office:value-type="float" office:value="0" calcext:value-type="float">
            <text:p>0</text:p>
          </table:table-cell>
          <table:table-cell office:value-type="float" office:value="518.8" calcext:value-type="float">
            <text:p>518.8</text:p>
          </table:table-cell>
          <table:table-cell office:value-type="float" office:value="603" calcext:value-type="float">
            <text:p>603</text:p>
          </table:table-cell>
          <table:table-cell office:value-type="float" office:value="-84.1999999999999" calcext:value-type="float">
            <text:p>-84.19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12:53.900</text:p>
          </table:table-cell>
          <table:table-cell office:value-type="string" calcext:value-type="string">
            <text:p>2025-10-20 11:12:53.900</text:p>
          </table:table-cell>
          <table:table-cell office:value-type="string" calcext:value-type="string">
            <text:p>LONG</text:p>
          </table:table-cell>
          <table:table-cell office:value-type="float" office:value="25309.25" calcext:value-type="float">
            <text:p>25309.25</text:p>
          </table:table-cell>
          <table:table-cell office:value-type="float" office:value="25319.25" calcext:value-type="float">
            <text:p>25319.25</text:p>
          </table:table-cell>
          <table:table-cell office:value-type="float" office:value="25304.25" calcext:value-type="float">
            <text:p>2530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12:57.5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5:13:26.1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08.1" calcext:value-type="float">
            <text:p>408.1</text:p>
          </table:table-cell>
          <table:table-cell office:value-type="float" office:value="1" calcext:value-type="float">
            <text:p>1</text:p>
          </table:table-cell>
          <table:table-cell office:value-type="float" office:value="408.1" calcext:value-type="float">
            <text:p>408.1</text:p>
          </table:table-cell>
          <table:table-cell office:value-type="float" office:value="603" calcext:value-type="float">
            <text:p>603</text:p>
          </table:table-cell>
          <table:table-cell office:value-type="float" office:value="-194.9" calcext:value-type="float">
            <text:p>-194.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16:12.000</text:p>
          </table:table-cell>
          <table:table-cell office:value-type="string" calcext:value-type="string">
            <text:p>2025-10-20 11:16:12.000</text:p>
          </table:table-cell>
          <table:table-cell office:value-type="string" calcext:value-type="string">
            <text:p>SHORT</text:p>
          </table:table-cell>
          <table:table-cell office:value-type="float" office:value="25301" calcext:value-type="float">
            <text:p>25301</text:p>
          </table:table-cell>
          <table:table-cell office:value-type="float" office:value="25291" calcext:value-type="float">
            <text:p>25291</text:p>
          </table:table-cell>
          <table:table-cell office:value-type="float" office:value="25306" calcext:value-type="float">
            <text:p>2530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16:12.700</text:p>
          </table:table-cell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597.4" calcext:value-type="float">
            <text:p>597.4</text:p>
          </table:table-cell>
          <table:table-cell office:value-type="float" office:value="0" calcext:value-type="float">
            <text:p>0</text:p>
          </table:table-cell>
          <table:table-cell office:value-type="float" office:value="597.4" calcext:value-type="float">
            <text:p>597.4</text:p>
          </table:table-cell>
          <table:table-cell office:value-type="float" office:value="603" calcext:value-type="float">
            <text:p>603</text:p>
          </table:table-cell>
          <table:table-cell office:value-type="float" office:value="-5.59999999999991" calcext:value-type="float">
            <text:p>-5.5999999999999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18:22.800</text:p>
          </table:table-cell>
          <table:table-cell office:value-type="string" calcext:value-type="string">
            <text:p>2025-10-20 11:18:22.800</text:p>
          </table:table-cell>
          <table:table-cell office:value-type="string" calcext:value-type="string">
            <text:p>LONG</text:p>
          </table:table-cell>
          <table:table-cell office:value-type="float" office:value="25314.25" calcext:value-type="float">
            <text:p>25314.25</text:p>
          </table:table-cell>
          <table:table-cell office:value-type="float" office:value="25324.25" calcext:value-type="float">
            <text:p>25324.25</text:p>
          </table:table-cell>
          <table:table-cell office:value-type="float" office:value="25309.25" calcext:value-type="float">
            <text:p>2530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18:23.30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86.7" calcext:value-type="float">
            <text:p>486.7</text:p>
          </table:table-cell>
          <table:table-cell office:value-type="float" office:value="1" calcext:value-type="float">
            <text:p>1</text:p>
          </table:table-cell>
          <table:table-cell office:value-type="float" office:value="486.7" calcext:value-type="float">
            <text:p>486.7</text:p>
          </table:table-cell>
          <table:table-cell office:value-type="float" office:value="603" calcext:value-type="float">
            <text:p>603</text:p>
          </table:table-cell>
          <table:table-cell office:value-type="float" office:value="-116.3" calcext:value-type="float">
            <text:p>-116.3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36:57.800</text:p>
          </table:table-cell>
          <table:table-cell office:value-type="string" calcext:value-type="string">
            <text:p>2025-10-20 11:36:57.800</text:p>
          </table:table-cell>
          <table:table-cell office:value-type="string" calcext:value-type="string">
            <text:p>LONG</text:p>
          </table:table-cell>
          <table:table-cell office:value-type="float" office:value="25315.5" calcext:value-type="float">
            <text:p>25315.5</text:p>
          </table:table-cell>
          <table:table-cell office:value-type="float" office:value="25325.5" calcext:value-type="float">
            <text:p>25325.5</text:p>
          </table:table-cell>
          <table:table-cell office:value-type="float" office:value="25310.5" calcext:value-type="float">
            <text:p>253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36:58.10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38:22.700</text:p>
          </table:table-cell>
          <table:table-cell office:value-type="string" calcext:value-type="string">
            <text:p>2025-10-20 11:38:22.700</text:p>
          </table:table-cell>
          <table:table-cell office:value-type="string" calcext:value-type="string">
            <text:p>SHORT</text:p>
          </table:table-cell>
          <table:table-cell office:value-type="float" office:value="25311.25" calcext:value-type="float">
            <text:p>25311.25</text:p>
          </table:table-cell>
          <table:table-cell office:value-type="float" office:value="25301.25" calcext:value-type="float">
            <text:p>25301.25</text:p>
          </table:table-cell>
          <table:table-cell office:value-type="float" office:value="25316.25" calcext:value-type="float">
            <text:p>2531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38:23.200</text:p>
          </table:table-cell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865.3" calcext:value-type="float">
            <text:p>86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5.3" calcext:value-type="float">
            <text:p>86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38:28.600</text:p>
          </table:table-cell>
          <table:table-cell office:value-type="string" calcext:value-type="string">
            <text:p>2025-10-20 11:38:28.600</text:p>
          </table:table-cell>
          <table:table-cell office:value-type="string" calcext:value-type="string">
            <text:p>LONG</text:p>
          </table:table-cell>
          <table:table-cell office:value-type="float" office:value="25312.75" calcext:value-type="float">
            <text:p>25312.75</text:p>
          </table:table-cell>
          <table:table-cell office:value-type="float" office:value="25322.75" calcext:value-type="float">
            <text:p>25322.75</text:p>
          </table:table-cell>
          <table:table-cell office:value-type="float" office:value="25307.75" calcext:value-type="float">
            <text:p>2530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38:31.6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5:40:12.6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54.6" calcext:value-type="float">
            <text:p>1054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4.6" calcext:value-type="float">
            <text:p>10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42:11.300</text:p>
          </table:table-cell>
          <table:table-cell office:value-type="string" calcext:value-type="string">
            <text:p>2025-10-20 11:42:11.300</text:p>
          </table:table-cell>
          <table:table-cell office:value-type="string" calcext:value-type="string">
            <text:p>LONG</text:p>
          </table:table-cell>
          <table:table-cell office:value-type="float" office:value="25311.25" calcext:value-type="float">
            <text:p>25311.25</text:p>
          </table:table-cell>
          <table:table-cell office:value-type="float" office:value="25321.25" calcext:value-type="float">
            <text:p>25321.25</text:p>
          </table:table-cell>
          <table:table-cell office:value-type="float" office:value="25306.25" calcext:value-type="float">
            <text:p>2530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42:14.800</text:p>
          </table:table-cell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943.9" calcext:value-type="float">
            <text:p>943.9</text:p>
          </table:table-cell>
          <table:table-cell office:value-type="float" office:value="1" calcext:value-type="float">
            <text:p>1</text:p>
          </table:table-cell>
          <table:table-cell office:value-type="float" office:value="943.9" calcext:value-type="float">
            <text:p>943.9</text:p>
          </table:table-cell>
          <table:table-cell office:value-type="float" office:value="1054.6" calcext:value-type="float">
            <text:p>1054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42:30.000</text:p>
          </table:table-cell>
          <table:table-cell office:value-type="string" calcext:value-type="string">
            <text:p>2025-10-20 11:42:30.000</text:p>
          </table:table-cell>
          <table:table-cell office:value-type="string" calcext:value-type="string">
            <text:p>SHORT</text:p>
          </table:table-cell>
          <table:table-cell office:value-type="float" office:value="25309.75" calcext:value-type="float">
            <text:p>25309.75</text:p>
          </table:table-cell>
          <table:table-cell office:value-type="float" office:value="25299.75" calcext:value-type="float">
            <text:p>25299.75</text:p>
          </table:table-cell>
          <table:table-cell office:value-type="float" office:value="25314.75" calcext:value-type="float">
            <text:p>2531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5:42:31.000</text:p>
          </table:table-cell>
          <table:table-cell office:value-type="float" office:value="145" calcext:value-type="float">
            <text:p>145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123.2" calcext:value-type="float">
            <text:p>112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3.2" calcext:value-type="float">
            <text:p>112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52:55.100</text:p>
          </table:table-cell>
          <table:table-cell office:value-type="string" calcext:value-type="string">
            <text:p>2025-10-20 11:52:55.100</text:p>
          </table:table-cell>
          <table:table-cell office:value-type="string" calcext:value-type="string">
            <text:p>SHORT</text:p>
          </table:table-cell>
          <table:table-cell office:value-type="float" office:value="25327.75" calcext:value-type="float">
            <text:p>25327.75</text:p>
          </table:table-cell>
          <table:table-cell office:value-type="float" office:value="25317.75" calcext:value-type="float">
            <text:p>25317.75</text:p>
          </table:table-cell>
          <table:table-cell office:value-type="float" office:value="25332.75" calcext:value-type="float">
            <text:p>2533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52:56.200</text:p>
          </table:table-cell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12.5" calcext:value-type="float">
            <text:p>1012.5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.5</text:p>
          </table:table-cell>
          <table:table-cell office:value-type="float" office:value="1123.2" calcext:value-type="float">
            <text:p>1123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58:44.700</text:p>
          </table:table-cell>
          <table:table-cell office:value-type="string" calcext:value-type="string">
            <text:p>2025-10-20 11:58:44.700</text:p>
          </table:table-cell>
          <table:table-cell office:value-type="string" calcext:value-type="string">
            <text:p>LONG</text:p>
          </table:table-cell>
          <table:table-cell office:value-type="float" office:value="25326.75" calcext:value-type="float">
            <text:p>25326.75</text:p>
          </table:table-cell>
          <table:table-cell office:value-type="float" office:value="25336.75" calcext:value-type="float">
            <text:p>25336.75</text:p>
          </table:table-cell>
          <table:table-cell office:value-type="float" office:value="25321.75" calcext:value-type="float">
            <text:p>2532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58:49.70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201.8" calcext:value-type="float">
            <text:p>120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1.8" calcext:value-type="float">
            <text:p>120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58:49.400</text:p>
          </table:table-cell>
          <table:table-cell office:value-type="string" calcext:value-type="string">
            <text:p>2025-10-20 11:58:49.400</text:p>
          </table:table-cell>
          <table:table-cell office:value-type="string" calcext:value-type="string">
            <text:p>LONG</text:p>
          </table:table-cell>
          <table:table-cell office:value-type="float" office:value="25326" calcext:value-type="float">
            <text:p>25326</text:p>
          </table:table-cell>
          <table:table-cell office:value-type="float" office:value="25336" calcext:value-type="float">
            <text:p>25336</text:p>
          </table:table-cell>
          <table:table-cell office:value-type="float" office:value="25321" calcext:value-type="float">
            <text:p>2532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5:58:50.40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386.1" calcext:value-type="float">
            <text:p>1386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86.1" calcext:value-type="float">
            <text:p>13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5:59:51.600</text:p>
          </table:table-cell>
          <table:table-cell office:value-type="string" calcext:value-type="string">
            <text:p>2025-10-20 11:59:51.600</text:p>
          </table:table-cell>
          <table:table-cell office:value-type="string" calcext:value-type="string">
            <text:p>LONG</text:p>
          </table:table-cell>
          <table:table-cell office:value-type="float" office:value="25314.75" calcext:value-type="float">
            <text:p>25314.75</text:p>
          </table:table-cell>
          <table:table-cell office:value-type="float" office:value="25324.75" calcext:value-type="float">
            <text:p>25324.75</text:p>
          </table:table-cell>
          <table:table-cell office:value-type="float" office:value="25309.75" calcext:value-type="float">
            <text:p>2530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5:59:55.90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01:25.2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275.4" calcext:value-type="float">
            <text:p>1275.4</text:p>
          </table:table-cell>
          <table:table-cell office:value-type="float" office:value="1" calcext:value-type="float">
            <text:p>1</text:p>
          </table:table-cell>
          <table:table-cell office:value-type="float" office:value="1275.4" calcext:value-type="float">
            <text:p>1275.4</text:p>
          </table:table-cell>
          <table:table-cell office:value-type="float" office:value="1386.1" calcext:value-type="float">
            <text:p>1386.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03:21.700</text:p>
          </table:table-cell>
          <table:table-cell office:value-type="string" calcext:value-type="string">
            <text:p>2025-10-20 12:03:21.700</text:p>
          </table:table-cell>
          <table:table-cell office:value-type="string" calcext:value-type="string">
            <text:p>SHORT</text:p>
          </table:table-cell>
          <table:table-cell office:value-type="float" office:value="25311.75" calcext:value-type="float">
            <text:p>25311.75</text:p>
          </table:table-cell>
          <table:table-cell office:value-type="float" office:value="25301.75" calcext:value-type="float">
            <text:p>25301.75</text:p>
          </table:table-cell>
          <table:table-cell office:value-type="float" office:value="25316.75" calcext:value-type="float">
            <text:p>2531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03:22.700</text:p>
          </table:table-cell>
          <table:table-cell office:value-type="float" office:value="129" calcext:value-type="float">
            <text:p>129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04:17.8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154.7" calcext:value-type="float">
            <text:p>1154.7</text:p>
          </table:table-cell>
          <table:table-cell office:value-type="float" office:value="2" calcext:value-type="float">
            <text:p>2</text:p>
          </table:table-cell>
          <table:table-cell office:value-type="float" office:value="1154.7" calcext:value-type="float">
            <text:p>1154.7</text:p>
          </table:table-cell>
          <table:table-cell office:value-type="float" office:value="1386.1" calcext:value-type="float">
            <text:p>1386.1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04:23.900</text:p>
          </table:table-cell>
          <table:table-cell office:value-type="string" calcext:value-type="string">
            <text:p>2025-10-20 12:04:23.900</text:p>
          </table:table-cell>
          <table:table-cell office:value-type="string" calcext:value-type="string">
            <text:p>LONG</text:p>
          </table:table-cell>
          <table:table-cell office:value-type="float" office:value="25316.5" calcext:value-type="float">
            <text:p>25316.5</text:p>
          </table:table-cell>
          <table:table-cell office:value-type="float" office:value="25326.5" calcext:value-type="float">
            <text:p>25326.5</text:p>
          </table:table-cell>
          <table:table-cell office:value-type="float" office:value="25311.5" calcext:value-type="float">
            <text:p>25311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04:24.90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6:07:06.1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1386.1" calcext:value-type="float">
            <text:p>1386.1</text:p>
          </table:table-cell>
          <table:table-cell office:value-type="float" office:value="-47.1000000000001" calcext:value-type="float">
            <text:p>-47.100000000000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07:40.200</text:p>
          </table:table-cell>
          <table:table-cell office:value-type="string" calcext:value-type="string">
            <text:p>2025-10-20 12:07:40.200</text:p>
          </table:table-cell>
          <table:table-cell office:value-type="string" calcext:value-type="string">
            <text:p>LONG</text:p>
          </table:table-cell>
          <table:table-cell office:value-type="float" office:value="25321.5" calcext:value-type="float">
            <text:p>25321.5</text:p>
          </table:table-cell>
          <table:table-cell office:value-type="float" office:value="25331.5" calcext:value-type="float">
            <text:p>25331.5</text:p>
          </table:table-cell>
          <table:table-cell office:value-type="float" office:value="25316.5" calcext:value-type="float">
            <text:p>2531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6:07:41.700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528.3" calcext:value-type="float">
            <text:p>152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8.3" calcext:value-type="float">
            <text:p>15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08:25.700</text:p>
          </table:table-cell>
          <table:table-cell office:value-type="string" calcext:value-type="string">
            <text:p>2025-10-20 12:08:25.700</text:p>
          </table:table-cell>
          <table:table-cell office:value-type="string" calcext:value-type="string">
            <text:p>LONG</text:p>
          </table:table-cell>
          <table:table-cell office:value-type="float" office:value="25317.75" calcext:value-type="float">
            <text:p>25317.75</text:p>
          </table:table-cell>
          <table:table-cell office:value-type="float" office:value="25327.75" calcext:value-type="float">
            <text:p>25327.75</text:p>
          </table:table-cell>
          <table:table-cell office:value-type="float" office:value="25312.75" calcext:value-type="float">
            <text:p>2531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08:26.70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712.6" calcext:value-type="float">
            <text:p>1712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2.6" calcext:value-type="float">
            <text:p>17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08:59.900</text:p>
          </table:table-cell>
          <table:table-cell office:value-type="string" calcext:value-type="string">
            <text:p>2025-10-20 12:08:59.900</text:p>
          </table:table-cell>
          <table:table-cell office:value-type="string" calcext:value-type="string">
            <text:p>SHORT</text:p>
          </table:table-cell>
          <table:table-cell office:value-type="float" office:value="25313.5" calcext:value-type="float">
            <text:p>25313.5</text:p>
          </table:table-cell>
          <table:table-cell office:value-type="float" office:value="25303.5" calcext:value-type="float">
            <text:p>25303.5</text:p>
          </table:table-cell>
          <table:table-cell office:value-type="float" office:value="25318.5" calcext:value-type="float">
            <text:p>25318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6:09:00.400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01.9" calcext:value-type="float">
            <text:p>1601.9</text:p>
          </table:table-cell>
          <table:table-cell office:value-type="float" office:value="1" calcext:value-type="float">
            <text:p>1</text:p>
          </table:table-cell>
          <table:table-cell office:value-type="float" office:value="1601.9" calcext:value-type="float">
            <text:p>1601.9</text:p>
          </table:table-cell>
          <table:table-cell office:value-type="float" office:value="1712.6" calcext:value-type="float">
            <text:p>1712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10:48.400</text:p>
          </table:table-cell>
          <table:table-cell office:value-type="string" calcext:value-type="string">
            <text:p>2025-10-20 12:10:48.400</text:p>
          </table:table-cell>
          <table:table-cell office:value-type="string" calcext:value-type="string">
            <text:p>SHORT</text:p>
          </table:table-cell>
          <table:table-cell office:value-type="float" office:value="25311" calcext:value-type="float">
            <text:p>25311</text:p>
          </table:table-cell>
          <table:table-cell office:value-type="float" office:value="25301" calcext:value-type="float">
            <text:p>25301</text:p>
          </table:table-cell>
          <table:table-cell office:value-type="float" office:value="25316" calcext:value-type="float">
            <text:p>2531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10:49.400</text:p>
          </table:table-cell>
          <table:table-cell office:value-type="float" office:value="121" calcext:value-type="float">
            <text:p>121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11:02.7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481.2" calcext:value-type="float">
            <text:p>1481.2</text:p>
          </table:table-cell>
          <table:table-cell office:value-type="float" office:value="2" calcext:value-type="float">
            <text:p>2</text:p>
          </table:table-cell>
          <table:table-cell office:value-type="float" office:value="1481.2" calcext:value-type="float">
            <text:p>1481.2</text:p>
          </table:table-cell>
          <table:table-cell office:value-type="float" office:value="1712.6" calcext:value-type="float">
            <text:p>1712.6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11:14.600</text:p>
          </table:table-cell>
          <table:table-cell office:value-type="string" calcext:value-type="string">
            <text:p>2025-10-20 12:11:14.600</text:p>
          </table:table-cell>
          <table:table-cell office:value-type="string" calcext:value-type="string">
            <text:p>LONG</text:p>
          </table:table-cell>
          <table:table-cell office:value-type="float" office:value="25314" calcext:value-type="float">
            <text:p>25314</text:p>
          </table:table-cell>
          <table:table-cell office:value-type="float" office:value="25324" calcext:value-type="float">
            <text:p>25324</text:p>
          </table:table-cell>
          <table:table-cell office:value-type="float" office:value="25309" calcext:value-type="float">
            <text:p>2530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11:15.6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65.5" calcext:value-type="float">
            <text:p>1665.5</text:p>
          </table:table-cell>
          <table:table-cell office:value-type="float" office:value="0" calcext:value-type="float">
            <text:p>0</text:p>
          </table:table-cell>
          <table:table-cell office:value-type="float" office:value="1665.5" calcext:value-type="float">
            <text:p>1665.5</text:p>
          </table:table-cell>
          <table:table-cell office:value-type="float" office:value="1712.6" calcext:value-type="float">
            <text:p>1712.6</text:p>
          </table:table-cell>
          <table:table-cell office:value-type="float" office:value="-47.1000000000001" calcext:value-type="float">
            <text:p>-47.100000000000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11:17.000</text:p>
          </table:table-cell>
          <table:table-cell office:value-type="string" calcext:value-type="string">
            <text:p>2025-10-20 12:11:17.000</text:p>
          </table:table-cell>
          <table:table-cell office:value-type="string" calcext:value-type="string">
            <text:p>LONG</text:p>
          </table:table-cell>
          <table:table-cell office:value-type="float" office:value="25313.5" calcext:value-type="float">
            <text:p>25313.5</text:p>
          </table:table-cell>
          <table:table-cell office:value-type="float" office:value="25323.5" calcext:value-type="float">
            <text:p>25323.5</text:p>
          </table:table-cell>
          <table:table-cell office:value-type="float" office:value="25308.5" calcext:value-type="float">
            <text:p>2530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11:18.00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49.8" calcext:value-type="float">
            <text:p>1849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49.8" calcext:value-type="float">
            <text:p>184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11:29.700</text:p>
          </table:table-cell>
          <table:table-cell office:value-type="string" calcext:value-type="string">
            <text:p>2025-10-20 12:11:29.700</text:p>
          </table:table-cell>
          <table:table-cell office:value-type="string" calcext:value-type="string">
            <text:p>LONG</text:p>
          </table:table-cell>
          <table:table-cell office:value-type="float" office:value="25308.25" calcext:value-type="float">
            <text:p>25308.25</text:p>
          </table:table-cell>
          <table:table-cell office:value-type="float" office:value="25318.25" calcext:value-type="float">
            <text:p>25318.25</text:p>
          </table:table-cell>
          <table:table-cell office:value-type="float" office:value="25303.25" calcext:value-type="float">
            <text:p>25303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11:30.70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11:54.4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734.1" calcext:value-type="float">
            <text:p>1734.1</text:p>
          </table:table-cell>
          <table:table-cell office:value-type="float" office:value="1" calcext:value-type="float">
            <text:p>1</text:p>
          </table:table-cell>
          <table:table-cell office:value-type="float" office:value="1734.1" calcext:value-type="float">
            <text:p>1734.1</text:p>
          </table:table-cell>
          <table:table-cell office:value-type="float" office:value="1849.8" calcext:value-type="float">
            <text:p>1849.8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12:48.400</text:p>
          </table:table-cell>
          <table:table-cell office:value-type="string" calcext:value-type="string">
            <text:p>2025-10-20 12:12:48.400</text:p>
          </table:table-cell>
          <table:table-cell office:value-type="string" calcext:value-type="string">
            <text:p>LONG</text:p>
          </table:table-cell>
          <table:table-cell office:value-type="float" office:value="25303.75" calcext:value-type="float">
            <text:p>25303.75</text:p>
          </table:table-cell>
          <table:table-cell office:value-type="float" office:value="25313.75" calcext:value-type="float">
            <text:p>25313.75</text:p>
          </table:table-cell>
          <table:table-cell office:value-type="float" office:value="25298.75" calcext:value-type="float">
            <text:p>2529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12:49.40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13:1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18.4" calcext:value-type="float">
            <text:p>1618.4</text:p>
          </table:table-cell>
          <table:table-cell office:value-type="float" office:value="2" calcext:value-type="float">
            <text:p>2</text:p>
          </table:table-cell>
          <table:table-cell office:value-type="float" office:value="1618.4" calcext:value-type="float">
            <text:p>1618.4</text:p>
          </table:table-cell>
          <table:table-cell office:value-type="float" office:value="1849.8" calcext:value-type="float">
            <text:p>1849.8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17:14.000</text:p>
          </table:table-cell>
          <table:table-cell office:value-type="string" calcext:value-type="string">
            <text:p>2025-10-20 12:17:14.000</text:p>
          </table:table-cell>
          <table:table-cell office:value-type="string" calcext:value-type="string">
            <text:p>LONG</text:p>
          </table:table-cell>
          <table:table-cell office:value-type="float" office:value="25304.25" calcext:value-type="float">
            <text:p>25304.25</text:p>
          </table:table-cell>
          <table:table-cell office:value-type="float" office:value="25314.25" calcext:value-type="float">
            <text:p>25314.25</text:p>
          </table:table-cell>
          <table:table-cell office:value-type="float" office:value="25299.25" calcext:value-type="float">
            <text:p>2529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6:17:15.00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17:33.2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507.7" calcext:value-type="float">
            <text:p>1507.7</text:p>
          </table:table-cell>
          <table:table-cell office:value-type="float" office:value="3" calcext:value-type="float">
            <text:p>3</text:p>
          </table:table-cell>
          <table:table-cell office:value-type="float" office:value="1507.7" calcext:value-type="float">
            <text:p>1507.7</text:p>
          </table:table-cell>
          <table:table-cell office:value-type="float" office:value="1849.8" calcext:value-type="float">
            <text:p>1849.8</text:p>
          </table:table-cell>
          <table:table-cell office:value-type="float" office:value="-342.1" calcext:value-type="float">
            <text:p>-342.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22:01.600</text:p>
          </table:table-cell>
          <table:table-cell office:value-type="string" calcext:value-type="string">
            <text:p>2025-10-20 12:22:01.600</text:p>
          </table:table-cell>
          <table:table-cell office:value-type="string" calcext:value-type="string">
            <text:p>SHORT</text:p>
          </table:table-cell>
          <table:table-cell office:value-type="float" office:value="25306.5" calcext:value-type="float">
            <text:p>25306.5</text:p>
          </table:table-cell>
          <table:table-cell office:value-type="float" office:value="25296.5" calcext:value-type="float">
            <text:p>25296.5</text:p>
          </table:table-cell>
          <table:table-cell office:value-type="float" office:value="25311.5" calcext:value-type="float">
            <text:p>25311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22:02.600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1849.8" calcext:value-type="float">
            <text:p>1849.8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23:45.200</text:p>
          </table:table-cell>
          <table:table-cell office:value-type="string" calcext:value-type="string">
            <text:p>2025-10-20 12:23:45.200</text:p>
          </table:table-cell>
          <table:table-cell office:value-type="string" calcext:value-type="string">
            <text:p>LONG</text:p>
          </table:table-cell>
          <table:table-cell office:value-type="float" office:value="25304.75" calcext:value-type="float">
            <text:p>25304.75</text:p>
          </table:table-cell>
          <table:table-cell office:value-type="float" office:value="25314.75" calcext:value-type="float">
            <text:p>25314.75</text:p>
          </table:table-cell>
          <table:table-cell office:value-type="float" office:value="25299.75" calcext:value-type="float">
            <text:p>2529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23:46.20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6:24:50.9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571.3" calcext:value-type="float">
            <text:p>1571.3</text:p>
          </table:table-cell>
          <table:table-cell office:value-type="float" office:value="1" calcext:value-type="float">
            <text:p>1</text:p>
          </table:table-cell>
          <table:table-cell office:value-type="float" office:value="1571.3" calcext:value-type="float">
            <text:p>1571.3</text:p>
          </table:table-cell>
          <table:table-cell office:value-type="float" office:value="1849.8" calcext:value-type="float">
            <text:p>1849.8</text:p>
          </table:table-cell>
          <table:table-cell office:value-type="float" office:value="-278.5" calcext:value-type="float">
            <text:p>-278.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28:03.000</text:p>
          </table:table-cell>
          <table:table-cell office:value-type="string" calcext:value-type="string">
            <text:p>2025-10-20 12:28:03.000</text:p>
          </table:table-cell>
          <table:table-cell office:value-type="string" calcext:value-type="string">
            <text:p>SHORT</text:p>
          </table:table-cell>
          <table:table-cell office:value-type="float" office:value="25313" calcext:value-type="float">
            <text:p>25313</text:p>
          </table:table-cell>
          <table:table-cell office:value-type="float" office:value="25303" calcext:value-type="float">
            <text:p>25303</text:p>
          </table:table-cell>
          <table:table-cell office:value-type="float" office:value="25318" calcext:value-type="float">
            <text:p>2531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28:04.000</text:p>
          </table:table-cell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450.6" calcext:value-type="float">
            <text:p>1450.6</text:p>
          </table:table-cell>
          <table:table-cell office:value-type="float" office:value="2" calcext:value-type="float">
            <text:p>2</text:p>
          </table:table-cell>
          <table:table-cell office:value-type="float" office:value="1450.6" calcext:value-type="float">
            <text:p>1450.6</text:p>
          </table:table-cell>
          <table:table-cell office:value-type="float" office:value="1849.8" calcext:value-type="float">
            <text:p>1849.8</text:p>
          </table:table-cell>
          <table:table-cell office:value-type="float" office:value="-399.2" calcext:value-type="float">
            <text:p>-399.2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28:53.300</text:p>
          </table:table-cell>
          <table:table-cell office:value-type="string" calcext:value-type="string">
            <text:p>2025-10-20 12:28:53.300</text:p>
          </table:table-cell>
          <table:table-cell office:value-type="string" calcext:value-type="string">
            <text:p>LONG</text:p>
          </table:table-cell>
          <table:table-cell office:value-type="float" office:value="25314.25" calcext:value-type="float">
            <text:p>25314.25</text:p>
          </table:table-cell>
          <table:table-cell office:value-type="float" office:value="25324.25" calcext:value-type="float">
            <text:p>25324.25</text:p>
          </table:table-cell>
          <table:table-cell office:value-type="float" office:value="25309.25" calcext:value-type="float">
            <text:p>25309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28:54.30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629.9" calcext:value-type="float">
            <text:p>1629.9</text:p>
          </table:table-cell>
          <table:table-cell office:value-type="float" office:value="0" calcext:value-type="float">
            <text:p>0</text:p>
          </table:table-cell>
          <table:table-cell office:value-type="float" office:value="1629.9" calcext:value-type="float">
            <text:p>1629.9</text:p>
          </table:table-cell>
          <table:table-cell office:value-type="float" office:value="1849.8" calcext:value-type="float">
            <text:p>1849.8</text:p>
          </table:table-cell>
          <table:table-cell office:value-type="float" office:value="-219.9" calcext:value-type="float">
            <text:p>-219.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31:16.000</text:p>
          </table:table-cell>
          <table:table-cell office:value-type="string" calcext:value-type="string">
            <text:p>2025-10-20 12:31:16.000</text:p>
          </table:table-cell>
          <table:table-cell office:value-type="string" calcext:value-type="string">
            <text:p>LONG</text:p>
          </table:table-cell>
          <table:table-cell office:value-type="float" office:value="25312" calcext:value-type="float">
            <text:p>25312</text:p>
          </table:table-cell>
          <table:table-cell office:value-type="float" office:value="25322" calcext:value-type="float">
            <text:p>25322</text:p>
          </table:table-cell>
          <table:table-cell office:value-type="float" office:value="25307" calcext:value-type="float">
            <text:p>2530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31:17.000</text:p>
          </table:table-cell>
          <table:table-cell office:value-type="float" office:value="136" calcext:value-type="float">
            <text:p>136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09.2" calcext:value-type="float">
            <text:p>1809.2</text:p>
          </table:table-cell>
          <table:table-cell office:value-type="float" office:value="0" calcext:value-type="float">
            <text:p>0</text:p>
          </table:table-cell>
          <table:table-cell office:value-type="float" office:value="1809.2" calcext:value-type="float">
            <text:p>1809.2</text:p>
          </table:table-cell>
          <table:table-cell office:value-type="float" office:value="1849.8" calcext:value-type="float">
            <text:p>1849.8</text:p>
          </table:table-cell>
          <table:table-cell office:value-type="float" office:value="-40.6000000000004" calcext:value-type="float">
            <text:p>-40.600000000000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34:29.800</text:p>
          </table:table-cell>
          <table:table-cell office:value-type="string" calcext:value-type="string">
            <text:p>2025-10-20 12:34:29.800</text:p>
          </table:table-cell>
          <table:table-cell office:value-type="string" calcext:value-type="string">
            <text:p>SHORT</text:p>
          </table:table-cell>
          <table:table-cell office:value-type="float" office:value="25301.5" calcext:value-type="float">
            <text:p>25301.5</text:p>
          </table:table-cell>
          <table:table-cell office:value-type="float" office:value="25291.5" calcext:value-type="float">
            <text:p>25291.5</text:p>
          </table:table-cell>
          <table:table-cell office:value-type="float" office:value="25306.5" calcext:value-type="float">
            <text:p>2530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34:30.800</text:p>
          </table:table-cell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6:36:21.2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993.5" calcext:value-type="float">
            <text:p>199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3.5" calcext:value-type="float">
            <text:p>199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39:24.000</text:p>
          </table:table-cell>
          <table:table-cell office:value-type="string" calcext:value-type="string">
            <text:p>2025-10-20 12:39:24.000</text:p>
          </table:table-cell>
          <table:table-cell office:value-type="string" calcext:value-type="string">
            <text:p>LONG</text:p>
          </table:table-cell>
          <table:table-cell office:value-type="float" office:value="25304" calcext:value-type="float">
            <text:p>25304</text:p>
          </table:table-cell>
          <table:table-cell office:value-type="float" office:value="25314" calcext:value-type="float">
            <text:p>25314</text:p>
          </table:table-cell>
          <table:table-cell office:value-type="float" office:value="25299" calcext:value-type="float">
            <text:p>25299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39:25.000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6:42:33.7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72.8" calcext:value-type="float">
            <text:p>2172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2.8" calcext:value-type="float">
            <text:p>217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46:51.000</text:p>
          </table:table-cell>
          <table:table-cell office:value-type="string" calcext:value-type="string">
            <text:p>2025-10-20 12:46:51.000</text:p>
          </table:table-cell>
          <table:table-cell office:value-type="string" calcext:value-type="string">
            <text:p>SHORT</text:p>
          </table:table-cell>
          <table:table-cell office:value-type="float" office:value="25297.5" calcext:value-type="float">
            <text:p>25297.5</text:p>
          </table:table-cell>
          <table:table-cell office:value-type="float" office:value="25287.5" calcext:value-type="float">
            <text:p>25287.5</text:p>
          </table:table-cell>
          <table:table-cell office:value-type="float" office:value="25302.5" calcext:value-type="float">
            <text:p>2530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46:52.000</text:p>
          </table:table-cell>
          <table:table-cell office:value-type="float" office:value="65" calcext:value-type="float">
            <text:p>6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357.1" calcext:value-type="float">
            <text:p>2357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57.1" calcext:value-type="float">
            <text:p>235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47:18.500</text:p>
          </table:table-cell>
          <table:table-cell office:value-type="string" calcext:value-type="string">
            <text:p>2025-10-20 12:47:18.500</text:p>
          </table:table-cell>
          <table:table-cell office:value-type="string" calcext:value-type="string">
            <text:p>LONG</text:p>
          </table:table-cell>
          <table:table-cell office:value-type="float" office:value="25303" calcext:value-type="float">
            <text:p>25303</text:p>
          </table:table-cell>
          <table:table-cell office:value-type="float" office:value="25313" calcext:value-type="float">
            <text:p>25313</text:p>
          </table:table-cell>
          <table:table-cell office:value-type="float" office:value="25298" calcext:value-type="float">
            <text:p>2529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6:47:19.6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246.4" calcext:value-type="float">
            <text:p>2246.4</text:p>
          </table:table-cell>
          <table:table-cell office:value-type="float" office:value="1" calcext:value-type="float">
            <text:p>1</text:p>
          </table:table-cell>
          <table:table-cell office:value-type="float" office:value="2246.4" calcext:value-type="float">
            <text:p>2246.4</text:p>
          </table:table-cell>
          <table:table-cell office:value-type="float" office:value="2357.1" calcext:value-type="float">
            <text:p>2357.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0:55.300</text:p>
          </table:table-cell>
          <table:table-cell office:value-type="string" calcext:value-type="string">
            <text:p>2025-10-20 12:50:55.300</text:p>
          </table:table-cell>
          <table:table-cell office:value-type="string" calcext:value-type="string">
            <text:p>SHORT</text:p>
          </table:table-cell>
          <table:table-cell office:value-type="float" office:value="25313" calcext:value-type="float">
            <text:p>25313</text:p>
          </table:table-cell>
          <table:table-cell office:value-type="float" office:value="25303" calcext:value-type="float">
            <text:p>25303</text:p>
          </table:table-cell>
          <table:table-cell office:value-type="float" office:value="25318" calcext:value-type="float">
            <text:p>2531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6:50:57.500</text:p>
          </table:table-cell>
          <table:table-cell office:value-type="float" office:value="99" calcext:value-type="float">
            <text:p>99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435.7" calcext:value-type="float">
            <text:p>2435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5.7" calcext:value-type="float">
            <text:p>243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4:23.000</text:p>
          </table:table-cell>
          <table:table-cell office:value-type="string" calcext:value-type="string">
            <text:p>2025-10-20 12:54:23.000</text:p>
          </table:table-cell>
          <table:table-cell office:value-type="string" calcext:value-type="string">
            <text:p>SHORT</text:p>
          </table:table-cell>
          <table:table-cell office:value-type="float" office:value="25309.75" calcext:value-type="float">
            <text:p>25309.75</text:p>
          </table:table-cell>
          <table:table-cell office:value-type="float" office:value="25299.75" calcext:value-type="float">
            <text:p>25299.75</text:p>
          </table:table-cell>
          <table:table-cell office:value-type="float" office:value="25314.75" calcext:value-type="float">
            <text:p>2531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54:24.0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4:39.600</text:p>
          </table:table-cell>
          <table:table-cell office:value-type="string" calcext:value-type="string">
            <text:p>2025-10-20 12:54:39.600</text:p>
          </table:table-cell>
          <table:table-cell office:value-type="string" calcext:value-type="string">
            <text:p>SHORT</text:p>
          </table:table-cell>
          <table:table-cell office:value-type="float" office:value="25313" calcext:value-type="float">
            <text:p>25313</text:p>
          </table:table-cell>
          <table:table-cell office:value-type="float" office:value="25303" calcext:value-type="float">
            <text:p>25303</text:p>
          </table:table-cell>
          <table:table-cell office:value-type="float" office:value="25318" calcext:value-type="float">
            <text:p>2531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54:40.600</text:p>
          </table:table-cell>
          <table:table-cell office:value-type="float" office:value="204" calcext:value-type="float">
            <text:p>204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789.3" calcext:value-type="float">
            <text:p>278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89.3" calcext:value-type="float">
            <text:p>278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4:44.700</text:p>
          </table:table-cell>
          <table:table-cell office:value-type="string" calcext:value-type="string">
            <text:p>2025-10-20 12:54:44.700</text:p>
          </table:table-cell>
          <table:table-cell office:value-type="string" calcext:value-type="string">
            <text:p>SHORT</text:p>
          </table:table-cell>
          <table:table-cell office:value-type="float" office:value="25312.5" calcext:value-type="float">
            <text:p>25312.5</text:p>
          </table:table-cell>
          <table:table-cell office:value-type="float" office:value="25302.5" calcext:value-type="float">
            <text:p>25302.5</text:p>
          </table:table-cell>
          <table:table-cell office:value-type="float" office:value="25317.5" calcext:value-type="float">
            <text:p>2531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54:45.700</text:p>
          </table:table-cell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68.6" calcext:value-type="float">
            <text:p>296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68.6" calcext:value-type="float">
            <text:p>296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5:15.700</text:p>
          </table:table-cell>
          <table:table-cell office:value-type="string" calcext:value-type="string">
            <text:p>2025-10-20 12:55:15.700</text:p>
          </table:table-cell>
          <table:table-cell office:value-type="string" calcext:value-type="string">
            <text:p>SHORT</text:p>
          </table:table-cell>
          <table:table-cell office:value-type="float" office:value="25308.25" calcext:value-type="float">
            <text:p>25308.25</text:p>
          </table:table-cell>
          <table:table-cell office:value-type="float" office:value="25298.25" calcext:value-type="float">
            <text:p>25298.25</text:p>
          </table:table-cell>
          <table:table-cell office:value-type="float" office:value="25313.25" calcext:value-type="float">
            <text:p>25313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55:16.70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147.9" calcext:value-type="float">
            <text:p>314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47.9" calcext:value-type="float">
            <text:p>31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6:20.000</text:p>
          </table:table-cell>
          <table:table-cell office:value-type="string" calcext:value-type="string">
            <text:p>2025-10-20 12:56:20.000</text:p>
          </table:table-cell>
          <table:table-cell office:value-type="string" calcext:value-type="string">
            <text:p>LONG</text:p>
          </table:table-cell>
          <table:table-cell office:value-type="float" office:value="25312" calcext:value-type="float">
            <text:p>25312</text:p>
          </table:table-cell>
          <table:table-cell office:value-type="float" office:value="25322" calcext:value-type="float">
            <text:p>25322</text:p>
          </table:table-cell>
          <table:table-cell office:value-type="float" office:value="25307" calcext:value-type="float">
            <text:p>2530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6:56:21.000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27.2" calcext:value-type="float">
            <text:p>3027.2</text:p>
          </table:table-cell>
          <table:table-cell office:value-type="float" office:value="1" calcext:value-type="float">
            <text:p>1</text:p>
          </table:table-cell>
          <table:table-cell office:value-type="float" office:value="3027.2" calcext:value-type="float">
            <text:p>3027.2</text:p>
          </table:table-cell>
          <table:table-cell office:value-type="float" office:value="3147.9" calcext:value-type="float">
            <text:p>3147.9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6:59:28.100</text:p>
          </table:table-cell>
          <table:table-cell office:value-type="string" calcext:value-type="string">
            <text:p>2025-10-20 12:59:28.100</text:p>
          </table:table-cell>
          <table:table-cell office:value-type="string" calcext:value-type="string">
            <text:p>LONG</text:p>
          </table:table-cell>
          <table:table-cell office:value-type="float" office:value="25316.75" calcext:value-type="float">
            <text:p>25316.75</text:p>
          </table:table-cell>
          <table:table-cell office:value-type="float" office:value="25326.75" calcext:value-type="float">
            <text:p>25326.75</text:p>
          </table:table-cell>
          <table:table-cell office:value-type="float" office:value="25311.75" calcext:value-type="float">
            <text:p>2531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6:59:28.500</text:p>
          </table:table-cell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7:00:42.9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16.5" calcext:value-type="float">
            <text:p>2916.5</text:p>
          </table:table-cell>
          <table:table-cell office:value-type="float" office:value="2" calcext:value-type="float">
            <text:p>2</text:p>
          </table:table-cell>
          <table:table-cell office:value-type="float" office:value="2916.5" calcext:value-type="float">
            <text:p>2916.5</text:p>
          </table:table-cell>
          <table:table-cell office:value-type="float" office:value="3147.9" calcext:value-type="float">
            <text:p>3147.9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3:20.900</text:p>
          </table:table-cell>
          <table:table-cell office:value-type="string" calcext:value-type="string">
            <text:p>2025-10-20 13:03:20.900</text:p>
          </table:table-cell>
          <table:table-cell office:value-type="string" calcext:value-type="string">
            <text:p>LONG</text:p>
          </table:table-cell>
          <table:table-cell office:value-type="float" office:value="25327.25" calcext:value-type="float">
            <text:p>25327.25</text:p>
          </table:table-cell>
          <table:table-cell office:value-type="float" office:value="25337.25" calcext:value-type="float">
            <text:p>25337.25</text:p>
          </table:table-cell>
          <table:table-cell office:value-type="float" office:value="25322.25" calcext:value-type="float">
            <text:p>2532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03:22.30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805.8" calcext:value-type="float">
            <text:p>2805.8</text:p>
          </table:table-cell>
          <table:table-cell office:value-type="float" office:value="3" calcext:value-type="float">
            <text:p>3</text:p>
          </table:table-cell>
          <table:table-cell office:value-type="float" office:value="2805.8" calcext:value-type="float">
            <text:p>2805.8</text:p>
          </table:table-cell>
          <table:table-cell office:value-type="float" office:value="3147.9" calcext:value-type="float">
            <text:p>3147.9</text:p>
          </table:table-cell>
          <table:table-cell office:value-type="float" office:value="-342.099999999999" calcext:value-type="float">
            <text:p>-342.0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4:48.800</text:p>
          </table:table-cell>
          <table:table-cell office:value-type="string" calcext:value-type="string">
            <text:p>2025-10-20 13:04:48.800</text:p>
          </table:table-cell>
          <table:table-cell office:value-type="string" calcext:value-type="string">
            <text:p>LONG</text:p>
          </table:table-cell>
          <table:table-cell office:value-type="float" office:value="25335.5" calcext:value-type="float">
            <text:p>25335.5</text:p>
          </table:table-cell>
          <table:table-cell office:value-type="float" office:value="25345.5" calcext:value-type="float">
            <text:p>25345.5</text:p>
          </table:table-cell>
          <table:table-cell office:value-type="float" office:value="25330.5" calcext:value-type="float">
            <text:p>2533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04:49.90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884.4" calcext:value-type="float">
            <text:p>2884.4</text:p>
          </table:table-cell>
          <table:table-cell office:value-type="float" office:value="0" calcext:value-type="float">
            <text:p>0</text:p>
          </table:table-cell>
          <table:table-cell office:value-type="float" office:value="2995.1" calcext:value-type="float">
            <text:p>2995.1</text:p>
          </table:table-cell>
          <table:table-cell office:value-type="float" office:value="3147.9" calcext:value-type="float">
            <text:p>3147.9</text:p>
          </table:table-cell>
          <table:table-cell office:value-type="float" office:value="-152.799999999999" calcext:value-type="float">
            <text:p>-152.7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6:03.300</text:p>
          </table:table-cell>
          <table:table-cell office:value-type="string" calcext:value-type="string">
            <text:p>2025-10-20 13:06:03.300</text:p>
          </table:table-cell>
          <table:table-cell office:value-type="string" calcext:value-type="string">
            <text:p>LONG</text:p>
          </table:table-cell>
          <table:table-cell office:value-type="float" office:value="25333.25" calcext:value-type="float">
            <text:p>25333.25</text:p>
          </table:table-cell>
          <table:table-cell office:value-type="float" office:value="25343.25" calcext:value-type="float">
            <text:p>25343.25</text:p>
          </table:table-cell>
          <table:table-cell office:value-type="float" office:value="25328.25" calcext:value-type="float">
            <text:p>2532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06:04.30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63.7" calcext:value-type="float">
            <text:p>306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4.4" calcext:value-type="float">
            <text:p>317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6:25.600</text:p>
          </table:table-cell>
          <table:table-cell office:value-type="string" calcext:value-type="string">
            <text:p>2025-10-20 13:06:25.600</text:p>
          </table:table-cell>
          <table:table-cell office:value-type="string" calcext:value-type="string">
            <text:p>LONG</text:p>
          </table:table-cell>
          <table:table-cell office:value-type="float" office:value="25335" calcext:value-type="float">
            <text:p>25335</text:p>
          </table:table-cell>
          <table:table-cell office:value-type="float" office:value="25345" calcext:value-type="float">
            <text:p>25345</text:p>
          </table:table-cell>
          <table:table-cell office:value-type="float" office:value="25330" calcext:value-type="float">
            <text:p>2533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06:26.600</text:p>
          </table:table-cell>
          <table:table-cell office:value-type="float" office:value="761" calcext:value-type="float">
            <text:p>761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59.3" calcext:value-type="float">
            <text:p>15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3.7" calcext:value-type="float">
            <text:p>333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8:51.900</text:p>
          </table:table-cell>
          <table:table-cell office:value-type="string" calcext:value-type="string">
            <text:p>2025-10-20 13:08:51.900</text:p>
          </table:table-cell>
          <table:table-cell office:value-type="string" calcext:value-type="string">
            <text:p>LONG</text:p>
          </table:table-cell>
          <table:table-cell office:value-type="float" office:value="25329.75" calcext:value-type="float">
            <text:p>25329.75</text:p>
          </table:table-cell>
          <table:table-cell office:value-type="float" office:value="25339.75" calcext:value-type="float">
            <text:p>25339.75</text:p>
          </table:table-cell>
          <table:table-cell office:value-type="float" office:value="25324.75" calcext:value-type="float">
            <text:p>2532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08:52.90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107.3" calcext:value-type="float">
            <text:p>3107.3</text:p>
          </table:table-cell>
          <table:table-cell office:value-type="float" office:value="1" calcext:value-type="float">
            <text:p>1</text:p>
          </table:table-cell>
          <table:table-cell office:value-type="float" office:value="3218" calcext:value-type="float">
            <text:p>3218</text:p>
          </table:table-cell>
          <table:table-cell office:value-type="float" office:value="3333.7" calcext:value-type="float">
            <text:p>3333.7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8:58.200</text:p>
          </table:table-cell>
          <table:table-cell office:value-type="string" calcext:value-type="string">
            <text:p>2025-10-20 13:08:58.200</text:p>
          </table:table-cell>
          <table:table-cell office:value-type="string" calcext:value-type="string">
            <text:p>LONG</text:p>
          </table:table-cell>
          <table:table-cell office:value-type="float" office:value="25330" calcext:value-type="float">
            <text:p>25330</text:p>
          </table:table-cell>
          <table:table-cell office:value-type="float" office:value="25340" calcext:value-type="float">
            <text:p>25340</text:p>
          </table:table-cell>
          <table:table-cell office:value-type="float" office:value="25325" calcext:value-type="float">
            <text:p>253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09:00.80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96.6" calcext:value-type="float">
            <text:p>2996.6</text:p>
          </table:table-cell>
          <table:table-cell office:value-type="float" office:value="2" calcext:value-type="float">
            <text:p>2</text:p>
          </table:table-cell>
          <table:table-cell office:value-type="float" office:value="3107.3" calcext:value-type="float">
            <text:p>3107.3</text:p>
          </table:table-cell>
          <table:table-cell office:value-type="float" office:value="3333.7" calcext:value-type="float">
            <text:p>3333.7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09:08.600</text:p>
          </table:table-cell>
          <table:table-cell office:value-type="string" calcext:value-type="string">
            <text:p>2025-10-20 13:09:08.600</text:p>
          </table:table-cell>
          <table:table-cell office:value-type="string" calcext:value-type="string">
            <text:p>LONG</text:p>
          </table:table-cell>
          <table:table-cell office:value-type="float" office:value="25329.75" calcext:value-type="float">
            <text:p>25329.75</text:p>
          </table:table-cell>
          <table:table-cell office:value-type="float" office:value="25339.75" calcext:value-type="float">
            <text:p>25339.75</text:p>
          </table:table-cell>
          <table:table-cell office:value-type="float" office:value="25324.75" calcext:value-type="float">
            <text:p>2532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09:10.60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885.9" calcext:value-type="float">
            <text:p>2885.9</text:p>
          </table:table-cell>
          <table:table-cell office:value-type="float" office:value="3" calcext:value-type="float">
            <text:p>3</text:p>
          </table:table-cell>
          <table:table-cell office:value-type="float" office:value="2996.6" calcext:value-type="float">
            <text:p>2996.6</text:p>
          </table:table-cell>
          <table:table-cell office:value-type="float" office:value="3333.7" calcext:value-type="float">
            <text:p>3333.7</text:p>
          </table:table-cell>
          <table:table-cell office:value-type="float" office:value="-337.099999999999" calcext:value-type="float">
            <text:p>-337.0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22:19.300</text:p>
          </table:table-cell>
          <table:table-cell office:value-type="string" calcext:value-type="string">
            <text:p>2025-10-20 13:22:19.300</text:p>
          </table:table-cell>
          <table:table-cell office:value-type="string" calcext:value-type="string">
            <text:p>SHORT</text:p>
          </table:table-cell>
          <table:table-cell office:value-type="float" office:value="25337.25" calcext:value-type="float">
            <text:p>25337.25</text:p>
          </table:table-cell>
          <table:table-cell office:value-type="float" office:value="25327.25" calcext:value-type="float">
            <text:p>25327.25</text:p>
          </table:table-cell>
          <table:table-cell office:value-type="float" office:value="25342.25" calcext:value-type="float">
            <text:p>2534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22:19.600</text:p>
          </table:table-cell>
          <table:table-cell office:value-type="float" office:value="89" calcext:value-type="float">
            <text:p>89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733.1" calcext:value-type="float">
            <text:p>2733.1</text:p>
          </table:table-cell>
          <table:table-cell office:value-type="float" office:value="0" calcext:value-type="float">
            <text:p>0</text:p>
          </table:table-cell>
          <table:table-cell office:value-type="float" office:value="3185.9" calcext:value-type="float">
            <text:p>3185.9</text:p>
          </table:table-cell>
          <table:table-cell office:value-type="float" office:value="3333.7" calcext:value-type="float">
            <text:p>3333.7</text:p>
          </table:table-cell>
          <table:table-cell office:value-type="float" office:value="-147.799999999999" calcext:value-type="float">
            <text:p>-147.7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23:18.700</text:p>
          </table:table-cell>
          <table:table-cell office:value-type="string" calcext:value-type="string">
            <text:p>2025-10-20 13:23:18.700</text:p>
          </table:table-cell>
          <table:table-cell office:value-type="string" calcext:value-type="string">
            <text:p>LONG</text:p>
          </table:table-cell>
          <table:table-cell office:value-type="float" office:value="25341.25" calcext:value-type="float">
            <text:p>25341.25</text:p>
          </table:table-cell>
          <table:table-cell office:value-type="float" office:value="25351.25" calcext:value-type="float">
            <text:p>25351.25</text:p>
          </table:table-cell>
          <table:table-cell office:value-type="float" office:value="25336.25" calcext:value-type="float">
            <text:p>2533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23:19.70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12.4" calcext:value-type="float">
            <text:p>2912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65.2" calcext:value-type="float">
            <text:p>336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30:01.100</text:p>
          </table:table-cell>
          <table:table-cell office:value-type="string" calcext:value-type="string">
            <text:p>2025-10-20 13:30:01.100</text:p>
          </table:table-cell>
          <table:table-cell office:value-type="string" calcext:value-type="string">
            <text:p>SHORT</text:p>
          </table:table-cell>
          <table:table-cell office:value-type="float" office:value="25335.75" calcext:value-type="float">
            <text:p>25335.75</text:p>
          </table:table-cell>
          <table:table-cell office:value-type="float" office:value="25325.75" calcext:value-type="float">
            <text:p>25325.75</text:p>
          </table:table-cell>
          <table:table-cell office:value-type="float" office:value="25340.75" calcext:value-type="float">
            <text:p>2534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30:02.100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91.7" calcext:value-type="float">
            <text:p>3091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44.5" calcext:value-type="float">
            <text:p>354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49:13.200</text:p>
          </table:table-cell>
          <table:table-cell office:value-type="string" calcext:value-type="string">
            <text:p>2025-10-20 13:49:13.200</text:p>
          </table:table-cell>
          <table:table-cell office:value-type="string" calcext:value-type="string">
            <text:p>LONG</text:p>
          </table:table-cell>
          <table:table-cell office:value-type="float" office:value="25352" calcext:value-type="float">
            <text:p>25352</text:p>
          </table:table-cell>
          <table:table-cell office:value-type="float" office:value="25362" calcext:value-type="float">
            <text:p>25362</text:p>
          </table:table-cell>
          <table:table-cell office:value-type="float" office:value="25347" calcext:value-type="float">
            <text:p>2534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49:14.200</text:p>
          </table:table-cell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28.8" calcext:value-type="float">
            <text:p>37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49:29.800</text:p>
          </table:table-cell>
          <table:table-cell office:value-type="string" calcext:value-type="string">
            <text:p>2025-10-20 13:49:29.800</text:p>
          </table:table-cell>
          <table:table-cell office:value-type="string" calcext:value-type="string">
            <text:p>SHORT</text:p>
          </table:table-cell>
          <table:table-cell office:value-type="float" office:value="25352.25" calcext:value-type="float">
            <text:p>25352.25</text:p>
          </table:table-cell>
          <table:table-cell office:value-type="float" office:value="25342.25" calcext:value-type="float">
            <text:p>25342.25</text:p>
          </table:table-cell>
          <table:table-cell office:value-type="float" office:value="25357.25" calcext:value-type="float">
            <text:p>2535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49:31.300</text:p>
          </table:table-cell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165.3" calcext:value-type="float">
            <text:p>3165.3</text:p>
          </table:table-cell>
          <table:table-cell office:value-type="float" office:value="1" calcext:value-type="float">
            <text:p>1</text:p>
          </table:table-cell>
          <table:table-cell office:value-type="float" office:value="3618.1" calcext:value-type="float">
            <text:p>3618.1</text:p>
          </table:table-cell>
          <table:table-cell office:value-type="float" office:value="3728.8" calcext:value-type="float">
            <text:p>3728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49:31.300</text:p>
          </table:table-cell>
          <table:table-cell office:value-type="string" calcext:value-type="string">
            <text:p>2025-10-20 13:49:31.300</text:p>
          </table:table-cell>
          <table:table-cell office:value-type="string" calcext:value-type="string">
            <text:p>SHORT</text:p>
          </table:table-cell>
          <table:table-cell office:value-type="float" office:value="25352.25" calcext:value-type="float">
            <text:p>25352.25</text:p>
          </table:table-cell>
          <table:table-cell office:value-type="float" office:value="25342.25" calcext:value-type="float">
            <text:p>25342.25</text:p>
          </table:table-cell>
          <table:table-cell office:value-type="float" office:value="25357.25" calcext:value-type="float">
            <text:p>25357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7:49:31.400</text:p>
          </table:table-cell>
          <table:table-cell office:value-type="float" office:value="1904" calcext:value-type="float">
            <text:p>19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54.6" calcext:value-type="float">
            <text:p>3054.6</text:p>
          </table:table-cell>
          <table:table-cell office:value-type="float" office:value="2" calcext:value-type="float">
            <text:p>2</text:p>
          </table:table-cell>
          <table:table-cell office:value-type="float" office:value="3507.4" calcext:value-type="float">
            <text:p>3507.4</text:p>
          </table:table-cell>
          <table:table-cell office:value-type="float" office:value="3728.8" calcext:value-type="float">
            <text:p>3728.8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58:28.100</text:p>
          </table:table-cell>
          <table:table-cell office:value-type="string" calcext:value-type="string">
            <text:p>2025-10-20 13:58:28.100</text:p>
          </table:table-cell>
          <table:table-cell office:value-type="string" calcext:value-type="string">
            <text:p>SHORT</text:p>
          </table:table-cell>
          <table:table-cell office:value-type="float" office:value="25333.25" calcext:value-type="float">
            <text:p>25333.25</text:p>
          </table:table-cell>
          <table:table-cell office:value-type="float" office:value="25323.25" calcext:value-type="float">
            <text:p>25323.25</text:p>
          </table:table-cell>
          <table:table-cell office:value-type="float" office:value="25338.25" calcext:value-type="float">
            <text:p>2533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58:29.100</text:p>
          </table:table-cell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238.9" calcext:value-type="float">
            <text:p>3238.9</text:p>
          </table:table-cell>
          <table:table-cell office:value-type="float" office:value="0" calcext:value-type="float">
            <text:p>0</text:p>
          </table:table-cell>
          <table:table-cell office:value-type="float" office:value="3691.7" calcext:value-type="float">
            <text:p>3691.7</text:p>
          </table:table-cell>
          <table:table-cell office:value-type="float" office:value="3728.8" calcext:value-type="float">
            <text:p>3728.8</text:p>
          </table:table-cell>
          <table:table-cell office:value-type="float" office:value="-37.0999999999995" calcext:value-type="float">
            <text:p>-37.099999999999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58:29.700</text:p>
          </table:table-cell>
          <table:table-cell office:value-type="string" calcext:value-type="string">
            <text:p>2025-10-20 13:58:29.700</text:p>
          </table:table-cell>
          <table:table-cell office:value-type="string" calcext:value-type="string">
            <text:p>SHORT</text:p>
          </table:table-cell>
          <table:table-cell office:value-type="float" office:value="25333.75" calcext:value-type="float">
            <text:p>25333.75</text:p>
          </table:table-cell>
          <table:table-cell office:value-type="float" office:value="25323.75" calcext:value-type="float">
            <text:p>25323.75</text:p>
          </table:table-cell>
          <table:table-cell office:value-type="float" office:value="25338.75" calcext:value-type="float">
            <text:p>2533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58:30.700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418.2" calcext:value-type="float">
            <text:p>341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1" calcext:value-type="float">
            <text:p>3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58:31.100</text:p>
          </table:table-cell>
          <table:table-cell office:value-type="string" calcext:value-type="string">
            <text:p>2025-10-20 13:58:31.100</text:p>
          </table:table-cell>
          <table:table-cell office:value-type="string" calcext:value-type="string">
            <text:p>SHORT</text:p>
          </table:table-cell>
          <table:table-cell office:value-type="float" office:value="25334.5" calcext:value-type="float">
            <text:p>25334.5</text:p>
          </table:table-cell>
          <table:table-cell office:value-type="float" office:value="25324.5" calcext:value-type="float">
            <text:p>25324.5</text:p>
          </table:table-cell>
          <table:table-cell office:value-type="float" office:value="25339.5" calcext:value-type="float">
            <text:p>25339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58:32.1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602.5" calcext:value-type="float">
            <text:p>360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55.3" calcext:value-type="float">
            <text:p>405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58:35.500</text:p>
          </table:table-cell>
          <table:table-cell office:value-type="string" calcext:value-type="string">
            <text:p>2025-10-20 13:58:35.500</text:p>
          </table:table-cell>
          <table:table-cell office:value-type="string" calcext:value-type="string">
            <text:p>SHORT</text:p>
          </table:table-cell>
          <table:table-cell office:value-type="float" office:value="25335" calcext:value-type="float">
            <text:p>25335</text:p>
          </table:table-cell>
          <table:table-cell office:value-type="float" office:value="25325" calcext:value-type="float">
            <text:p>25325</text:p>
          </table:table-cell>
          <table:table-cell office:value-type="float" office:value="25340" calcext:value-type="float">
            <text:p>2534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58:36.500</text:p>
          </table:table-cell>
          <table:table-cell office:value-type="float" office:value="164" calcext:value-type="float">
            <text:p>16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781.8" calcext:value-type="float">
            <text:p>378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34.6" calcext:value-type="float">
            <text:p>423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58:38.000</text:p>
          </table:table-cell>
          <table:table-cell office:value-type="string" calcext:value-type="string">
            <text:p>2025-10-20 13:58:38.000</text:p>
          </table:table-cell>
          <table:table-cell office:value-type="string" calcext:value-type="string">
            <text:p>SHORT</text:p>
          </table:table-cell>
          <table:table-cell office:value-type="float" office:value="25335.5" calcext:value-type="float">
            <text:p>25335.5</text:p>
          </table:table-cell>
          <table:table-cell office:value-type="float" office:value="25325.5" calcext:value-type="float">
            <text:p>25325.5</text:p>
          </table:table-cell>
          <table:table-cell office:value-type="float" office:value="25340.5" calcext:value-type="float">
            <text:p>2534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58:39.000</text:p>
          </table:table-cell>
          <table:table-cell office:value-type="float" office:value="113" calcext:value-type="float">
            <text:p>1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961.10000000001" calcext:value-type="float">
            <text:p>3961.1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13.9" calcext:value-type="float">
            <text:p>441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7:59:49.900</text:p>
          </table:table-cell>
          <table:table-cell office:value-type="string" calcext:value-type="string">
            <text:p>2025-10-20 13:59:49.900</text:p>
          </table:table-cell>
          <table:table-cell office:value-type="string" calcext:value-type="string">
            <text:p>LONG</text:p>
          </table:table-cell>
          <table:table-cell office:value-type="float" office:value="25336.25" calcext:value-type="float">
            <text:p>25336.25</text:p>
          </table:table-cell>
          <table:table-cell office:value-type="float" office:value="25346.25" calcext:value-type="float">
            <text:p>25346.25</text:p>
          </table:table-cell>
          <table:table-cell office:value-type="float" office:value="25331.25" calcext:value-type="float">
            <text:p>2533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7:59:50.900</text:p>
          </table:table-cell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40.40000000001" calcext:value-type="float">
            <text:p>3840.40000000001</text:p>
          </table:table-cell>
          <table:table-cell office:value-type="float" office:value="1" calcext:value-type="float">
            <text:p>1</text:p>
          </table:table-cell>
          <table:table-cell office:value-type="float" office:value="4293.2" calcext:value-type="float">
            <text:p>4293.2</text:p>
          </table:table-cell>
          <table:table-cell office:value-type="float" office:value="4413.9" calcext:value-type="float">
            <text:p>4413.9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00:16.200</text:p>
          </table:table-cell>
          <table:table-cell office:value-type="string" calcext:value-type="string">
            <text:p>2025-10-20 14:00:16.200</text:p>
          </table:table-cell>
          <table:table-cell office:value-type="string" calcext:value-type="string">
            <text:p>LONG</text:p>
          </table:table-cell>
          <table:table-cell office:value-type="float" office:value="25336" calcext:value-type="float">
            <text:p>25336</text:p>
          </table:table-cell>
          <table:table-cell office:value-type="float" office:value="25346" calcext:value-type="float">
            <text:p>25346</text:p>
          </table:table-cell>
          <table:table-cell office:value-type="float" office:value="25331" calcext:value-type="float">
            <text:p>2533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00:17.20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719.70000000001" calcext:value-type="float">
            <text:p>3719.70000000001</text:p>
          </table:table-cell>
          <table:table-cell office:value-type="float" office:value="2" calcext:value-type="float">
            <text:p>2</text:p>
          </table:table-cell>
          <table:table-cell office:value-type="float" office:value="4172.50000000001" calcext:value-type="float">
            <text:p>4172.50000000001</text:p>
          </table:table-cell>
          <table:table-cell office:value-type="float" office:value="4413.9" calcext:value-type="float">
            <text:p>4413.9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01:21.000</text:p>
          </table:table-cell>
          <table:table-cell office:value-type="string" calcext:value-type="string">
            <text:p>2025-10-20 14:01:21.000</text:p>
          </table:table-cell>
          <table:table-cell office:value-type="string" calcext:value-type="string">
            <text:p>LONG</text:p>
          </table:table-cell>
          <table:table-cell office:value-type="float" office:value="25338.25" calcext:value-type="float">
            <text:p>25338.25</text:p>
          </table:table-cell>
          <table:table-cell office:value-type="float" office:value="25348.25" calcext:value-type="float">
            <text:p>25348.25</text:p>
          </table:table-cell>
          <table:table-cell office:value-type="float" office:value="25333.25" calcext:value-type="float">
            <text:p>25333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01:22.000</text:p>
          </table:table-cell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599.00000000001" calcext:value-type="float">
            <text:p>3599.00000000001</text:p>
          </table:table-cell>
          <table:table-cell office:value-type="float" office:value="3" calcext:value-type="float">
            <text:p>3</text:p>
          </table:table-cell>
          <table:table-cell office:value-type="float" office:value="4051.8" calcext:value-type="float">
            <text:p>4051.8</text:p>
          </table:table-cell>
          <table:table-cell office:value-type="float" office:value="4413.9" calcext:value-type="float">
            <text:p>4413.9</text:p>
          </table:table-cell>
          <table:table-cell office:value-type="float" office:value="-362.099999999999" calcext:value-type="float">
            <text:p>-362.0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06:47.600</text:p>
          </table:table-cell>
          <table:table-cell office:value-type="string" calcext:value-type="string">
            <text:p>2025-10-20 14:06:47.600</text:p>
          </table:table-cell>
          <table:table-cell office:value-type="string" calcext:value-type="string">
            <text:p>SHORT</text:p>
          </table:table-cell>
          <table:table-cell office:value-type="float" office:value="25345.25" calcext:value-type="float">
            <text:p>25345.25</text:p>
          </table:table-cell>
          <table:table-cell office:value-type="float" office:value="25335.25" calcext:value-type="float">
            <text:p>25335.25</text:p>
          </table:table-cell>
          <table:table-cell office:value-type="float" office:value="25350.25" calcext:value-type="float">
            <text:p>2535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06:48.60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551.90000000001" calcext:value-type="float">
            <text:p>3551.90000000001</text:p>
          </table:table-cell>
          <table:table-cell office:value-type="float" office:value="0" calcext:value-type="float">
            <text:p>0</text:p>
          </table:table-cell>
          <table:table-cell office:value-type="float" office:value="4236.10000000001" calcext:value-type="float">
            <text:p>4236.10000000001</text:p>
          </table:table-cell>
          <table:table-cell office:value-type="float" office:value="4413.9" calcext:value-type="float">
            <text:p>4413.9</text:p>
          </table:table-cell>
          <table:table-cell office:value-type="float" office:value="-177.799999999999" calcext:value-type="float">
            <text:p>-177.7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08:28.100</text:p>
          </table:table-cell>
          <table:table-cell office:value-type="string" calcext:value-type="string">
            <text:p>2025-10-20 14:08:28.100</text:p>
          </table:table-cell>
          <table:table-cell office:value-type="string" calcext:value-type="string">
            <text:p>LONG</text:p>
          </table:table-cell>
          <table:table-cell office:value-type="float" office:value="25348.5" calcext:value-type="float">
            <text:p>25348.5</text:p>
          </table:table-cell>
          <table:table-cell office:value-type="float" office:value="25358.5" calcext:value-type="float">
            <text:p>25358.5</text:p>
          </table:table-cell>
          <table:table-cell office:value-type="float" office:value="25343.5" calcext:value-type="float">
            <text:p>2534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08:29.10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731.20000000001" calcext:value-type="float">
            <text:p>3731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15.40000000001" calcext:value-type="float">
            <text:p>4415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08:55.500</text:p>
          </table:table-cell>
          <table:table-cell office:value-type="string" calcext:value-type="string">
            <text:p>2025-10-20 14:08:55.500</text:p>
          </table:table-cell>
          <table:table-cell office:value-type="string" calcext:value-type="string">
            <text:p>SHORT</text:p>
          </table:table-cell>
          <table:table-cell office:value-type="float" office:value="25348.5" calcext:value-type="float">
            <text:p>25348.5</text:p>
          </table:table-cell>
          <table:table-cell office:value-type="float" office:value="25338.5" calcext:value-type="float">
            <text:p>25338.5</text:p>
          </table:table-cell>
          <table:table-cell office:value-type="float" office:value="25353.5" calcext:value-type="float">
            <text:p>2535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08:56.5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0 18:15:43.2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615.50000000001" calcext:value-type="float">
            <text:p>3615.50000000001</text:p>
          </table:table-cell>
          <table:table-cell office:value-type="float" office:value="1" calcext:value-type="float">
            <text:p>1</text:p>
          </table:table-cell>
          <table:table-cell office:value-type="float" office:value="4299.70000000001" calcext:value-type="float">
            <text:p>4299.70000000001</text:p>
          </table:table-cell>
          <table:table-cell office:value-type="float" office:value="4415.40000000001" calcext:value-type="float">
            <text:p>4415.4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22:34.900</text:p>
          </table:table-cell>
          <table:table-cell office:value-type="string" calcext:value-type="string">
            <text:p>2025-10-20 14:22:34.900</text:p>
          </table:table-cell>
          <table:table-cell office:value-type="string" calcext:value-type="string">
            <text:p>LONG</text:p>
          </table:table-cell>
          <table:table-cell office:value-type="float" office:value="25334.75" calcext:value-type="float">
            <text:p>25334.75</text:p>
          </table:table-cell>
          <table:table-cell office:value-type="float" office:value="25344.75" calcext:value-type="float">
            <text:p>25344.75</text:p>
          </table:table-cell>
          <table:table-cell office:value-type="float" office:value="25329.75" calcext:value-type="float">
            <text:p>2532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22:35.90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499.80000000001" calcext:value-type="float">
            <text:p>3499.80000000001</text:p>
          </table:table-cell>
          <table:table-cell office:value-type="float" office:value="2" calcext:value-type="float">
            <text:p>2</text:p>
          </table:table-cell>
          <table:table-cell office:value-type="float" office:value="4184.00000000001" calcext:value-type="float">
            <text:p>4184.00000000001</text:p>
          </table:table-cell>
          <table:table-cell office:value-type="float" office:value="4415.40000000001" calcext:value-type="float">
            <text:p>4415.40000000001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43:12.800</text:p>
          </table:table-cell>
          <table:table-cell office:value-type="string" calcext:value-type="string">
            <text:p>2025-10-20 14:43:12.800</text:p>
          </table:table-cell>
          <table:table-cell office:value-type="string" calcext:value-type="string">
            <text:p>LONG</text:p>
          </table:table-cell>
          <table:table-cell office:value-type="float" office:value="25323" calcext:value-type="float">
            <text:p>25323</text:p>
          </table:table-cell>
          <table:table-cell office:value-type="float" office:value="25333" calcext:value-type="float">
            <text:p>25333</text:p>
          </table:table-cell>
          <table:table-cell office:value-type="float" office:value="25318" calcext:value-type="float">
            <text:p>2531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8:43:15.8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689.10000000001" calcext:value-type="float">
            <text:p>3689.10000000001</text:p>
          </table:table-cell>
          <table:table-cell office:value-type="float" office:value="0" calcext:value-type="float">
            <text:p>0</text:p>
          </table:table-cell>
          <table:table-cell office:value-type="float" office:value="4373.30000000001" calcext:value-type="float">
            <text:p>4373.30000000001</text:p>
          </table:table-cell>
          <table:table-cell office:value-type="float" office:value="4415.40000000001" calcext:value-type="float">
            <text:p>4415.40000000001</text:p>
          </table:table-cell>
          <table:table-cell office:value-type="float" office:value="-42.0999999999995" calcext:value-type="float">
            <text:p>-42.099999999999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45:17.100</text:p>
          </table:table-cell>
          <table:table-cell office:value-type="string" calcext:value-type="string">
            <text:p>2025-10-20 14:45:17.100</text:p>
          </table:table-cell>
          <table:table-cell office:value-type="string" calcext:value-type="string">
            <text:p>LONG</text:p>
          </table:table-cell>
          <table:table-cell office:value-type="float" office:value="25318.5" calcext:value-type="float">
            <text:p>25318.5</text:p>
          </table:table-cell>
          <table:table-cell office:value-type="float" office:value="25328.5" calcext:value-type="float">
            <text:p>25328.5</text:p>
          </table:table-cell>
          <table:table-cell office:value-type="float" office:value="25313.5" calcext:value-type="float">
            <text:p>2531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8:45:17.20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78.40000000001" calcext:value-type="float">
            <text:p>3878.4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62.60000000001" calcext:value-type="float">
            <text:p>4562.6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49:09.500</text:p>
          </table:table-cell>
          <table:table-cell office:value-type="string" calcext:value-type="string">
            <text:p>2025-10-20 14:49:09.500</text:p>
          </table:table-cell>
          <table:table-cell office:value-type="string" calcext:value-type="string">
            <text:p>SHORT</text:p>
          </table:table-cell>
          <table:table-cell office:value-type="float" office:value="25312" calcext:value-type="float">
            <text:p>25312</text:p>
          </table:table-cell>
          <table:table-cell office:value-type="float" office:value="25302" calcext:value-type="float">
            <text:p>25302</text:p>
          </table:table-cell>
          <table:table-cell office:value-type="float" office:value="25317" calcext:value-type="float">
            <text:p>2531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49:10.500</text:p>
          </table:table-cell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062.70000000001" calcext:value-type="float">
            <text:p>4062.7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46.90000000001" calcext:value-type="float">
            <text:p>4746.9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49:24.600</text:p>
          </table:table-cell>
          <table:table-cell office:value-type="string" calcext:value-type="string">
            <text:p>2025-10-20 14:49:24.600</text:p>
          </table:table-cell>
          <table:table-cell office:value-type="string" calcext:value-type="string">
            <text:p>LONG</text:p>
          </table:table-cell>
          <table:table-cell office:value-type="float" office:value="25312.75" calcext:value-type="float">
            <text:p>25312.75</text:p>
          </table:table-cell>
          <table:table-cell office:value-type="float" office:value="25322.75" calcext:value-type="float">
            <text:p>25322.75</text:p>
          </table:table-cell>
          <table:table-cell office:value-type="float" office:value="25307.75" calcext:value-type="float">
            <text:p>25307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49:25.6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947.00000000001" calcext:value-type="float">
            <text:p>3947.00000000001</text:p>
          </table:table-cell>
          <table:table-cell office:value-type="float" office:value="1" calcext:value-type="float">
            <text:p>1</text:p>
          </table:table-cell>
          <table:table-cell office:value-type="float" office:value="4631.20000000001" calcext:value-type="float">
            <text:p>4631.20000000001</text:p>
          </table:table-cell>
          <table:table-cell office:value-type="float" office:value="4746.90000000001" calcext:value-type="float">
            <text:p>4746.90000000001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49:57.900</text:p>
          </table:table-cell>
          <table:table-cell office:value-type="string" calcext:value-type="string">
            <text:p>2025-10-20 14:49:57.900</text:p>
          </table:table-cell>
          <table:table-cell office:value-type="string" calcext:value-type="string">
            <text:p>SHORT</text:p>
          </table:table-cell>
          <table:table-cell office:value-type="float" office:value="25317" calcext:value-type="float">
            <text:p>25317</text:p>
          </table:table-cell>
          <table:table-cell office:value-type="float" office:value="25307" calcext:value-type="float">
            <text:p>25307</text:p>
          </table:table-cell>
          <table:table-cell office:value-type="float" office:value="25322" calcext:value-type="float">
            <text:p>2532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8:49:58.500</text:p>
          </table:table-cell>
          <table:table-cell office:value-type="float" office:value="100" calcext:value-type="float">
            <text:p>100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136.30000000001" calcext:value-type="float">
            <text:p>4136.3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20.50000000001" calcext:value-type="float">
            <text:p>4820.5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52:00.300</text:p>
          </table:table-cell>
          <table:table-cell office:value-type="string" calcext:value-type="string">
            <text:p>2025-10-20 14:52:00.300</text:p>
          </table:table-cell>
          <table:table-cell office:value-type="string" calcext:value-type="string">
            <text:p>SHORT</text:p>
          </table:table-cell>
          <table:table-cell office:value-type="float" office:value="25314" calcext:value-type="float">
            <text:p>25314</text:p>
          </table:table-cell>
          <table:table-cell office:value-type="float" office:value="25304" calcext:value-type="float">
            <text:p>25304</text:p>
          </table:table-cell>
          <table:table-cell office:value-type="float" office:value="25319" calcext:value-type="float">
            <text:p>25319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8:52:01.900</text:p>
          </table:table-cell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325.60000000001" calcext:value-type="float">
            <text:p>4325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9.80000000001" calcext:value-type="float">
            <text:p>5009.8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52:05.300</text:p>
          </table:table-cell>
          <table:table-cell office:value-type="string" calcext:value-type="string">
            <text:p>2025-10-20 14:52:05.300</text:p>
          </table:table-cell>
          <table:table-cell office:value-type="string" calcext:value-type="string">
            <text:p>SHORT</text:p>
          </table:table-cell>
          <table:table-cell office:value-type="float" office:value="25313.75" calcext:value-type="float">
            <text:p>25313.75</text:p>
          </table:table-cell>
          <table:table-cell office:value-type="float" office:value="25303.75" calcext:value-type="float">
            <text:p>25303.75</text:p>
          </table:table-cell>
          <table:table-cell office:value-type="float" office:value="25318.75" calcext:value-type="float">
            <text:p>2531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52:06.30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09.90000000001" calcext:value-type="float">
            <text:p>4509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94.10000000001" calcext:value-type="float">
            <text:p>5194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57:01.600</text:p>
          </table:table-cell>
          <table:table-cell office:value-type="string" calcext:value-type="string">
            <text:p>2025-10-20 14:57:01.600</text:p>
          </table:table-cell>
          <table:table-cell office:value-type="string" calcext:value-type="string">
            <text:p>LONG</text:p>
          </table:table-cell>
          <table:table-cell office:value-type="float" office:value="25326.5" calcext:value-type="float">
            <text:p>25326.5</text:p>
          </table:table-cell>
          <table:table-cell office:value-type="float" office:value="25336.5" calcext:value-type="float">
            <text:p>25336.5</text:p>
          </table:table-cell>
          <table:table-cell office:value-type="float" office:value="25321.5" calcext:value-type="float">
            <text:p>2532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8:57:04.50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399.20000000001" calcext:value-type="float">
            <text:p>4399.20000000001</text:p>
          </table:table-cell>
          <table:table-cell office:value-type="float" office:value="1" calcext:value-type="float">
            <text:p>1</text:p>
          </table:table-cell>
          <table:table-cell office:value-type="float" office:value="5083.40000000001" calcext:value-type="float">
            <text:p>5083.4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58:59.200</text:p>
          </table:table-cell>
          <table:table-cell office:value-type="string" calcext:value-type="string">
            <text:p>2025-10-20 14:58:59.200</text:p>
          </table:table-cell>
          <table:table-cell office:value-type="string" calcext:value-type="string">
            <text:p>SHORT</text:p>
          </table:table-cell>
          <table:table-cell office:value-type="float" office:value="25332" calcext:value-type="float">
            <text:p>25332</text:p>
          </table:table-cell>
          <table:table-cell office:value-type="float" office:value="25322" calcext:value-type="float">
            <text:p>25322</text:p>
          </table:table-cell>
          <table:table-cell office:value-type="float" office:value="25337" calcext:value-type="float">
            <text:p>2533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8:59:01.300</text:p>
          </table:table-cell>
          <table:table-cell office:value-type="float" office:value="77" calcext:value-type="float">
            <text:p>7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88.50000000001" calcext:value-type="float">
            <text:p>4288.50000000001</text:p>
          </table:table-cell>
          <table:table-cell office:value-type="float" office:value="2" calcext:value-type="float">
            <text:p>2</text:p>
          </table:table-cell>
          <table:table-cell office:value-type="float" office:value="4972.70000000001" calcext:value-type="float">
            <text:p>4972.7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8:59:55.000</text:p>
          </table:table-cell>
          <table:table-cell office:value-type="string" calcext:value-type="string">
            <text:p>2025-10-20 14:59:55.000</text:p>
          </table:table-cell>
          <table:table-cell office:value-type="string" calcext:value-type="string">
            <text:p>LONG</text:p>
          </table:table-cell>
          <table:table-cell office:value-type="float" office:value="25327.75" calcext:value-type="float">
            <text:p>25327.75</text:p>
          </table:table-cell>
          <table:table-cell office:value-type="float" office:value="25337.75" calcext:value-type="float">
            <text:p>25337.75</text:p>
          </table:table-cell>
          <table:table-cell office:value-type="float" office:value="25322.75" calcext:value-type="float">
            <text:p>2532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8:59:56.00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167.80000000001" calcext:value-type="float">
            <text:p>4167.80000000001</text:p>
          </table:table-cell>
          <table:table-cell office:value-type="float" office:value="3" calcext:value-type="float">
            <text:p>3</text:p>
          </table:table-cell>
          <table:table-cell office:value-type="float" office:value="4852.00000000001" calcext:value-type="float">
            <text:p>4852.0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342.099999999999" calcext:value-type="float">
            <text:p>-342.0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09:31.500</text:p>
          </table:table-cell>
          <table:table-cell office:value-type="string" calcext:value-type="string">
            <text:p>2025-10-20 15:09:31.500</text:p>
          </table:table-cell>
          <table:table-cell office:value-type="string" calcext:value-type="string">
            <text:p>LONG</text:p>
          </table:table-cell>
          <table:table-cell office:value-type="float" office:value="25333.75" calcext:value-type="float">
            <text:p>25333.75</text:p>
          </table:table-cell>
          <table:table-cell office:value-type="float" office:value="25343.75" calcext:value-type="float">
            <text:p>25343.75</text:p>
          </table:table-cell>
          <table:table-cell office:value-type="float" office:value="25328.75" calcext:value-type="float">
            <text:p>25328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9:09:32.5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130.70000000001" calcext:value-type="float">
            <text:p>4130.70000000001</text:p>
          </table:table-cell>
          <table:table-cell office:value-type="float" office:value="0" calcext:value-type="float">
            <text:p>0</text:p>
          </table:table-cell>
          <table:table-cell office:value-type="float" office:value="5036.30000000001" calcext:value-type="float">
            <text:p>5036.3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157.799999999999" calcext:value-type="float">
            <text:p>-157.7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09:45.200</text:p>
          </table:table-cell>
          <table:table-cell office:value-type="string" calcext:value-type="string">
            <text:p>2025-10-20 15:09:45.200</text:p>
          </table:table-cell>
          <table:table-cell office:value-type="string" calcext:value-type="string">
            <text:p>SHORT</text:p>
          </table:table-cell>
          <table:table-cell office:value-type="float" office:value="25331.25" calcext:value-type="float">
            <text:p>25331.25</text:p>
          </table:table-cell>
          <table:table-cell office:value-type="float" office:value="25321.25" calcext:value-type="float">
            <text:p>25321.25</text:p>
          </table:table-cell>
          <table:table-cell office:value-type="float" office:value="25336.25" calcext:value-type="float">
            <text:p>25336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9:09:46.20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010.00000000001" calcext:value-type="float">
            <text:p>4010.00000000001</text:p>
          </table:table-cell>
          <table:table-cell office:value-type="float" office:value="1" calcext:value-type="float">
            <text:p>1</text:p>
          </table:table-cell>
          <table:table-cell office:value-type="float" office:value="4915.60000000001" calcext:value-type="float">
            <text:p>4915.6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278.499999999999" calcext:value-type="float">
            <text:p>-278.4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13:58.400</text:p>
          </table:table-cell>
          <table:table-cell office:value-type="string" calcext:value-type="string">
            <text:p>2025-10-20 15:13:58.400</text:p>
          </table:table-cell>
          <table:table-cell office:value-type="string" calcext:value-type="string">
            <text:p>SHORT</text:p>
          </table:table-cell>
          <table:table-cell office:value-type="float" office:value="25321.25" calcext:value-type="float">
            <text:p>25321.25</text:p>
          </table:table-cell>
          <table:table-cell office:value-type="float" office:value="25311.25" calcext:value-type="float">
            <text:p>25311.25</text:p>
          </table:table-cell>
          <table:table-cell office:value-type="float" office:value="25326.25" calcext:value-type="float">
            <text:p>2532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9:14:02.6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99.30000000001" calcext:value-type="float">
            <text:p>3899.30000000001</text:p>
          </table:table-cell>
          <table:table-cell office:value-type="float" office:value="2" calcext:value-type="float">
            <text:p>2</text:p>
          </table:table-cell>
          <table:table-cell office:value-type="float" office:value="4804.90000000001" calcext:value-type="float">
            <text:p>4804.9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389.199999999999" calcext:value-type="float">
            <text:p>-389.1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34:08.700</text:p>
          </table:table-cell>
          <table:table-cell office:value-type="string" calcext:value-type="string">
            <text:p>2025-10-20 15:34:08.700</text:p>
          </table:table-cell>
          <table:table-cell office:value-type="string" calcext:value-type="string">
            <text:p>LONG</text:p>
          </table:table-cell>
          <table:table-cell office:value-type="float" office:value="25318.75" calcext:value-type="float">
            <text:p>25318.75</text:p>
          </table:table-cell>
          <table:table-cell office:value-type="float" office:value="25328.75" calcext:value-type="float">
            <text:p>25328.75</text:p>
          </table:table-cell>
          <table:table-cell office:value-type="float" office:value="25313.75" calcext:value-type="float">
            <text:p>2531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9:34:09.700</text:p>
          </table:table-cell>
          <table:table-cell office:value-type="float" office:value="97" calcext:value-type="float">
            <text:p>9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0 19:36:30.1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3158.00000000001" calcext:value-type="float">
            <text:p>3158.00000000001</text:p>
          </table:table-cell>
          <table:table-cell office:value-type="float" office:value="0" calcext:value-type="float">
            <text:p>0</text:p>
          </table:table-cell>
          <table:table-cell office:value-type="float" office:value="4868.50000000001" calcext:value-type="float">
            <text:p>4868.5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325.599999999999" calcext:value-type="float">
            <text:p>-325.59999999999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37:02.100</text:p>
          </table:table-cell>
          <table:table-cell office:value-type="string" calcext:value-type="string">
            <text:p>2025-10-20 15:37:02.100</text:p>
          </table:table-cell>
          <table:table-cell office:value-type="string" calcext:value-type="string">
            <text:p>LONG</text:p>
          </table:table-cell>
          <table:table-cell office:value-type="float" office:value="25327.75" calcext:value-type="float">
            <text:p>25327.75</text:p>
          </table:table-cell>
          <table:table-cell office:value-type="float" office:value="25337.75" calcext:value-type="float">
            <text:p>25337.75</text:p>
          </table:table-cell>
          <table:table-cell office:value-type="float" office:value="25322.75" calcext:value-type="float">
            <text:p>25322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9:37:05.90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3347.30000000001" calcext:value-type="float">
            <text:p>3347.30000000001</text:p>
          </table:table-cell>
          <table:table-cell office:value-type="float" office:value="0" calcext:value-type="float">
            <text:p>0</text:p>
          </table:table-cell>
          <table:table-cell office:value-type="float" office:value="5057.80000000001" calcext:value-type="float">
            <text:p>5057.80000000001</text:p>
          </table:table-cell>
          <table:table-cell office:value-type="float" office:value="5194.10000000001" calcext:value-type="float">
            <text:p>5194.10000000001</text:p>
          </table:table-cell>
          <table:table-cell office:value-type="float" office:value="-136.299999999998" calcext:value-type="float">
            <text:p>-136.299999999998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48:48.400</text:p>
          </table:table-cell>
          <table:table-cell office:value-type="string" calcext:value-type="string">
            <text:p>2025-10-20 15:48:48.400</text:p>
          </table:table-cell>
          <table:table-cell office:value-type="string" calcext:value-type="string">
            <text:p>LONG</text:p>
          </table:table-cell>
          <table:table-cell office:value-type="float" office:value="25324.75" calcext:value-type="float">
            <text:p>25324.75</text:p>
          </table:table-cell>
          <table:table-cell office:value-type="float" office:value="25334.75" calcext:value-type="float">
            <text:p>25334.75</text:p>
          </table:table-cell>
          <table:table-cell office:value-type="float" office:value="25319.75" calcext:value-type="float">
            <text:p>2531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9:48:50.500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3536.60000000001" calcext:value-type="float">
            <text:p>3536.6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47.10000000001" calcext:value-type="float">
            <text:p>5247.1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50:13.400</text:p>
          </table:table-cell>
          <table:table-cell office:value-type="string" calcext:value-type="string">
            <text:p>2025-10-20 15:50:13.400</text:p>
          </table:table-cell>
          <table:table-cell office:value-type="string" calcext:value-type="string">
            <text:p>LONG</text:p>
          </table:table-cell>
          <table:table-cell office:value-type="float" office:value="25329" calcext:value-type="float">
            <text:p>25329</text:p>
          </table:table-cell>
          <table:table-cell office:value-type="float" office:value="25339" calcext:value-type="float">
            <text:p>25339</text:p>
          </table:table-cell>
          <table:table-cell office:value-type="float" office:value="25324" calcext:value-type="float">
            <text:p>2532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0 19:50:14.400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3715.90000000001" calcext:value-type="float">
            <text:p>3715.9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26.40000000001" calcext:value-type="float">
            <text:p>5426.4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51:33.200</text:p>
          </table:table-cell>
          <table:table-cell office:value-type="string" calcext:value-type="string">
            <text:p>2025-10-20 15:51:33.200</text:p>
          </table:table-cell>
          <table:table-cell office:value-type="string" calcext:value-type="string">
            <text:p>LONG</text:p>
          </table:table-cell>
          <table:table-cell office:value-type="float" office:value="25331.5" calcext:value-type="float">
            <text:p>25331.5</text:p>
          </table:table-cell>
          <table:table-cell office:value-type="float" office:value="25341.5" calcext:value-type="float">
            <text:p>25341.5</text:p>
          </table:table-cell>
          <table:table-cell office:value-type="float" office:value="25326.5" calcext:value-type="float">
            <text:p>2532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9:51:35.300</text:p>
          </table:table-cell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3905.20000000001" calcext:value-type="float">
            <text:p>3905.2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5.70000000001" calcext:value-type="float">
            <text:p>5615.7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2025-10-20 19:58:39.500</text:p>
          </table:table-cell>
          <table:table-cell office:value-type="string" calcext:value-type="string">
            <text:p>2025-10-20 15:58:39.500</text:p>
          </table:table-cell>
          <table:table-cell office:value-type="string" calcext:value-type="string">
            <text:p>LONG</text:p>
          </table:table-cell>
          <table:table-cell office:value-type="float" office:value="25316.75" calcext:value-type="float">
            <text:p>25316.75</text:p>
          </table:table-cell>
          <table:table-cell office:value-type="float" office:value="25326.75" calcext:value-type="float">
            <text:p>25326.75</text:p>
          </table:table-cell>
          <table:table-cell office:value-type="float" office:value="25311.75" calcext:value-type="float">
            <text:p>2531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0 19:58:40.400</text:p>
          </table:table-cell>
          <table:table-cell office:value-type="float" office:value="122" calcext:value-type="float">
            <text:p>122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14" calcext:value-type="float">
            <text:p>25214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4094.50000000001" calcext:value-type="float">
            <text:p>4094.5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5.00000000001" calcext:value-type="float">
            <text:p>5805.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3:44:54.400</text:p>
          </table:table-cell>
          <table:table-cell office:value-type="string" calcext:value-type="string">
            <text:p>2025-10-21 09:44:54.400</text:p>
          </table:table-cell>
          <table:table-cell office:value-type="string" calcext:value-type="string">
            <text:p>LONG</text:p>
          </table:table-cell>
          <table:table-cell office:value-type="float" office:value="25260" calcext:value-type="float">
            <text:p>25260</text:p>
          </table:table-cell>
          <table:table-cell office:value-type="float" office:value="25270" calcext:value-type="float">
            <text:p>25270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3:44:55.4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OPEN_15</text:p>
          </table:table-cell>
          <table:table-cell office:value-type="float" office:value="169.3" calcext:value-type="float">
            <text:p>16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.3" calcext:value-type="float">
            <text:p>16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3:53:11.700</text:p>
          </table:table-cell>
          <table:table-cell office:value-type="string" calcext:value-type="string">
            <text:p>2025-10-21 09:53:11.700</text:p>
          </table:table-cell>
          <table:table-cell office:value-type="string" calcext:value-type="string">
            <text:p>LONG</text:p>
          </table:table-cell>
          <table:table-cell office:value-type="float" office:value="25266" calcext:value-type="float">
            <text:p>25266</text:p>
          </table:table-cell>
          <table:table-cell office:value-type="float" office:value="25276" calcext:value-type="float">
            <text:p>25276</text:p>
          </table:table-cell>
          <table:table-cell office:value-type="float" office:value="25261" calcext:value-type="float">
            <text:p>2526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3:53:12.10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POST_OPEN</text:p>
          </table:table-cell>
          <table:table-cell office:value-type="float" office:value="358.6" calcext:value-type="float">
            <text:p>35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.6" calcext:value-type="float">
            <text:p>35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3:56:29.100</text:p>
          </table:table-cell>
          <table:table-cell office:value-type="string" calcext:value-type="string">
            <text:p>2025-10-21 09:56:29.100</text:p>
          </table:table-cell>
          <table:table-cell office:value-type="string" calcext:value-type="string">
            <text:p>LONG</text:p>
          </table:table-cell>
          <table:table-cell office:value-type="float" office:value="25227.25" calcext:value-type="float">
            <text:p>25227.25</text:p>
          </table:table-cell>
          <table:table-cell office:value-type="float" office:value="25237.25" calcext:value-type="float">
            <text:p>25237.25</text:p>
          </table:table-cell>
          <table:table-cell office:value-type="float" office:value="25222.25" calcext:value-type="float">
            <text:p>25222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3:56:29.7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3:57:19.7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247.9" calcext:value-type="float">
            <text:p>247.9</text:p>
          </table:table-cell>
          <table:table-cell office:value-type="float" office:value="1" calcext:value-type="float">
            <text:p>1</text:p>
          </table:table-cell>
          <table:table-cell office:value-type="float" office:value="247.9" calcext:value-type="float">
            <text:p>247.9</text:p>
          </table:table-cell>
          <table:table-cell office:value-type="float" office:value="358.6" calcext:value-type="float">
            <text:p>358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3:58:00.500</text:p>
          </table:table-cell>
          <table:table-cell office:value-type="string" calcext:value-type="string">
            <text:p>2025-10-21 09:58:00.500</text:p>
          </table:table-cell>
          <table:table-cell office:value-type="string" calcext:value-type="string">
            <text:p>LONG</text:p>
          </table:table-cell>
          <table:table-cell office:value-type="float" office:value="25223.25" calcext:value-type="float">
            <text:p>25223.25</text:p>
          </table:table-cell>
          <table:table-cell office:value-type="float" office:value="25233.25" calcext:value-type="float">
            <text:p>25233.25</text:p>
          </table:table-cell>
          <table:table-cell office:value-type="float" office:value="25218.25" calcext:value-type="float">
            <text:p>2521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3:58:02.50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3:58:45.9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3:59:45.600</text:p>
          </table:table-cell>
          <table:table-cell office:value-type="string" calcext:value-type="string">
            <text:p>2025-10-21 09:59:45.600</text:p>
          </table:table-cell>
          <table:table-cell office:value-type="string" calcext:value-type="string">
            <text:p>SHORT</text:p>
          </table:table-cell>
          <table:table-cell office:value-type="float" office:value="25230.75" calcext:value-type="float">
            <text:p>25230.75</text:p>
          </table:table-cell>
          <table:table-cell office:value-type="float" office:value="25220.75" calcext:value-type="float">
            <text:p>25220.75</text:p>
          </table:table-cell>
          <table:table-cell office:value-type="float" office:value="25235.75" calcext:value-type="float">
            <text:p>25235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3:59:47.100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4:00:05.9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26.5" calcext:value-type="float">
            <text:p>326.5</text:p>
          </table:table-cell>
          <table:table-cell office:value-type="float" office:value="1" calcext:value-type="float">
            <text:p>1</text:p>
          </table:table-cell>
          <table:table-cell office:value-type="float" office:value="326.5" calcext:value-type="float">
            <text:p>326.5</text:p>
          </table:table-cell>
          <table:table-cell office:value-type="float" office:value="437.2" calcext:value-type="float">
            <text:p>437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02:19.700</text:p>
          </table:table-cell>
          <table:table-cell office:value-type="string" calcext:value-type="string">
            <text:p>2025-10-21 10:02:19.700</text:p>
          </table:table-cell>
          <table:table-cell office:value-type="string" calcext:value-type="string">
            <text:p>SHORT</text:p>
          </table:table-cell>
          <table:table-cell office:value-type="float" office:value="25219.75" calcext:value-type="float">
            <text:p>25219.75</text:p>
          </table:table-cell>
          <table:table-cell office:value-type="float" office:value="25209.75" calcext:value-type="float">
            <text:p>25209.75</text:p>
          </table:table-cell>
          <table:table-cell office:value-type="float" office:value="25224.75" calcext:value-type="float">
            <text:p>2522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4:02:20.700</text:p>
          </table:table-cell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05.8" calcext:value-type="float">
            <text:p>505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5.8" calcext:value-type="float">
            <text:p>50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02:45.700</text:p>
          </table:table-cell>
          <table:table-cell office:value-type="string" calcext:value-type="string">
            <text:p>2025-10-21 10:02:45.700</text:p>
          </table:table-cell>
          <table:table-cell office:value-type="string" calcext:value-type="string">
            <text:p>SHORT</text:p>
          </table:table-cell>
          <table:table-cell office:value-type="float" office:value="25215.5" calcext:value-type="float">
            <text:p>25215.5</text:p>
          </table:table-cell>
          <table:table-cell office:value-type="float" office:value="25205.5" calcext:value-type="float">
            <text:p>25205.5</text:p>
          </table:table-cell>
          <table:table-cell office:value-type="float" office:value="25220.5" calcext:value-type="float">
            <text:p>2522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02:45.800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695.1" calcext:value-type="float">
            <text:p>69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5.1" calcext:value-type="float">
            <text:p>69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07:49.900</text:p>
          </table:table-cell>
          <table:table-cell office:value-type="string" calcext:value-type="string">
            <text:p>2025-10-21 10:07:49.900</text:p>
          </table:table-cell>
          <table:table-cell office:value-type="string" calcext:value-type="string">
            <text:p>LONG</text:p>
          </table:table-cell>
          <table:table-cell office:value-type="float" office:value="25246.5" calcext:value-type="float">
            <text:p>25246.5</text:p>
          </table:table-cell>
          <table:table-cell office:value-type="float" office:value="25256.5" calcext:value-type="float">
            <text:p>25256.5</text:p>
          </table:table-cell>
          <table:table-cell office:value-type="float" office:value="25241.5" calcext:value-type="float">
            <text:p>2524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07:51.70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4:08:17.5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584.4" calcext:value-type="float">
            <text:p>584.4</text:p>
          </table:table-cell>
          <table:table-cell office:value-type="float" office:value="1" calcext:value-type="float">
            <text:p>1</text:p>
          </table:table-cell>
          <table:table-cell office:value-type="float" office:value="584.4" calcext:value-type="float">
            <text:p>584.4</text:p>
          </table:table-cell>
          <table:table-cell office:value-type="float" office:value="695.1" calcext:value-type="float">
            <text:p>695.1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09:02.500</text:p>
          </table:table-cell>
          <table:table-cell office:value-type="string" calcext:value-type="string">
            <text:p>2025-10-21 10:09:02.500</text:p>
          </table:table-cell>
          <table:table-cell office:value-type="string" calcext:value-type="string">
            <text:p>LONG</text:p>
          </table:table-cell>
          <table:table-cell office:value-type="float" office:value="25238.5" calcext:value-type="float">
            <text:p>25238.5</text:p>
          </table:table-cell>
          <table:table-cell office:value-type="float" office:value="25248.5" calcext:value-type="float">
            <text:p>25248.5</text:p>
          </table:table-cell>
          <table:table-cell office:value-type="float" office:value="25233.5" calcext:value-type="float">
            <text:p>2523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09:04.40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4:09:16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473.7" calcext:value-type="float">
            <text:p>473.7</text:p>
          </table:table-cell>
          <table:table-cell office:value-type="float" office:value="2" calcext:value-type="float">
            <text:p>2</text:p>
          </table:table-cell>
          <table:table-cell office:value-type="float" office:value="473.7" calcext:value-type="float">
            <text:p>473.7</text:p>
          </table:table-cell>
          <table:table-cell office:value-type="float" office:value="695.1" calcext:value-type="float">
            <text:p>695.1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16:58.000</text:p>
          </table:table-cell>
          <table:table-cell office:value-type="string" calcext:value-type="string">
            <text:p>2025-10-21 10:16:58.000</text:p>
          </table:table-cell>
          <table:table-cell office:value-type="string" calcext:value-type="string">
            <text:p>SHORT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0" calcext:value-type="float">
            <text:p>25240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4:16:59.000</text:p>
          </table:table-cell>
          <table:table-cell office:value-type="float" office:value="129" calcext:value-type="float">
            <text:p>129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4:17:22.9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POST_OPEN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695.1" calcext:value-type="float">
            <text:p>695.1</text:p>
          </table:table-cell>
          <table:table-cell office:value-type="float" office:value="-342.1" calcext:value-type="float">
            <text:p>-342.1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24:27.200</text:p>
          </table:table-cell>
          <table:table-cell office:value-type="string" calcext:value-type="string">
            <text:p>2025-10-21 10:24:27.200</text:p>
          </table:table-cell>
          <table:table-cell office:value-type="string" calcext:value-type="string">
            <text:p>LONG</text:p>
          </table:table-cell>
          <table:table-cell office:value-type="float" office:value="25272" calcext:value-type="float">
            <text:p>25272</text:p>
          </table:table-cell>
          <table:table-cell office:value-type="float" office:value="25282" calcext:value-type="float">
            <text:p>25282</text:p>
          </table:table-cell>
          <table:table-cell office:value-type="float" office:value="25267" calcext:value-type="float">
            <text:p>2526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24:27.50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POST_OPEN</text:p>
          </table:table-cell>
          <table:table-cell office:value-type="float" office:value="542.3" calcext:value-type="float">
            <text:p>542.3</text:p>
          </table:table-cell>
          <table:table-cell office:value-type="float" office:value="0" calcext:value-type="float">
            <text:p>0</text:p>
          </table:table-cell>
          <table:table-cell office:value-type="float" office:value="542.3" calcext:value-type="float">
            <text:p>542.3</text:p>
          </table:table-cell>
          <table:table-cell office:value-type="float" office:value="695.1" calcext:value-type="float">
            <text:p>695.1</text:p>
          </table:table-cell>
          <table:table-cell office:value-type="float" office:value="-152.8" calcext:value-type="float">
            <text:p>-152.8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49:49.800</text:p>
          </table:table-cell>
          <table:table-cell office:value-type="string" calcext:value-type="string">
            <text:p>2025-10-21 10:49:49.800</text:p>
          </table:table-cell>
          <table:table-cell office:value-type="string" calcext:value-type="string">
            <text:p>LONG</text:p>
          </table:table-cell>
          <table:table-cell office:value-type="float" office:value="25258.5" calcext:value-type="float">
            <text:p>25258.5</text:p>
          </table:table-cell>
          <table:table-cell office:value-type="float" office:value="25268.5" calcext:value-type="float">
            <text:p>25268.5</text:p>
          </table:table-cell>
          <table:table-cell office:value-type="float" office:value="25253.5" calcext:value-type="float">
            <text:p>2525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49:50.000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431.6" calcext:value-type="float">
            <text:p>431.6</text:p>
          </table:table-cell>
          <table:table-cell office:value-type="float" office:value="1" calcext:value-type="float">
            <text:p>1</text:p>
          </table:table-cell>
          <table:table-cell office:value-type="float" office:value="431.6" calcext:value-type="float">
            <text:p>431.6</text:p>
          </table:table-cell>
          <table:table-cell office:value-type="float" office:value="695.1" calcext:value-type="float">
            <text:p>695.1</text:p>
          </table:table-cell>
          <table:table-cell office:value-type="float" office:value="-263.5" calcext:value-type="float">
            <text:p>-263.5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0:13.600</text:p>
          </table:table-cell>
          <table:table-cell office:value-type="string" calcext:value-type="string">
            <text:p>2025-10-21 10:50:13.600</text:p>
          </table:table-cell>
          <table:table-cell office:value-type="string" calcext:value-type="string">
            <text:p>LONG</text:p>
          </table:table-cell>
          <table:table-cell office:value-type="float" office:value="25258.5" calcext:value-type="float">
            <text:p>25258.5</text:p>
          </table:table-cell>
          <table:table-cell office:value-type="float" office:value="25268.5" calcext:value-type="float">
            <text:p>25268.5</text:p>
          </table:table-cell>
          <table:table-cell office:value-type="float" office:value="25253.5" calcext:value-type="float">
            <text:p>2525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4:50:14.600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310.9" calcext:value-type="float">
            <text:p>310.9</text:p>
          </table:table-cell>
          <table:table-cell office:value-type="float" office:value="2" calcext:value-type="float">
            <text:p>2</text:p>
          </table:table-cell>
          <table:table-cell office:value-type="float" office:value="310.9" calcext:value-type="float">
            <text:p>310.9</text:p>
          </table:table-cell>
          <table:table-cell office:value-type="float" office:value="695.1" calcext:value-type="float">
            <text:p>695.1</text:p>
          </table:table-cell>
          <table:table-cell office:value-type="float" office:value="-384.2" calcext:value-type="float">
            <text:p>-384.2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1:15.400</text:p>
          </table:table-cell>
          <table:table-cell office:value-type="string" calcext:value-type="string">
            <text:p>2025-10-21 10:51:15.400</text:p>
          </table:table-cell>
          <table:table-cell office:value-type="string" calcext:value-type="string">
            <text:p>LONG</text:p>
          </table:table-cell>
          <table:table-cell office:value-type="float" office:value="25262" calcext:value-type="float">
            <text:p>25262</text:p>
          </table:table-cell>
          <table:table-cell office:value-type="float" office:value="25272" calcext:value-type="float">
            <text:p>25272</text:p>
          </table:table-cell>
          <table:table-cell office:value-type="float" office:value="25257" calcext:value-type="float">
            <text:p>2525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51:16.10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00.2" calcext:value-type="float">
            <text:p>200.2</text:p>
          </table:table-cell>
          <table:table-cell office:value-type="float" office:value="3" calcext:value-type="float">
            <text:p>3</text:p>
          </table:table-cell>
          <table:table-cell office:value-type="float" office:value="200.2" calcext:value-type="float">
            <text:p>200.2</text:p>
          </table:table-cell>
          <table:table-cell office:value-type="float" office:value="695.1" calcext:value-type="float">
            <text:p>695.1</text:p>
          </table:table-cell>
          <table:table-cell office:value-type="float" office:value="-494.9" calcext:value-type="float">
            <text:p>-494.9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1:31.300</text:p>
          </table:table-cell>
          <table:table-cell office:value-type="string" calcext:value-type="string">
            <text:p>2025-10-21 10:51:31.300</text:p>
          </table:table-cell>
          <table:table-cell office:value-type="string" calcext:value-type="string">
            <text:p>SHORT</text:p>
          </table:table-cell>
          <table:table-cell office:value-type="float" office:value="25266.5" calcext:value-type="float">
            <text:p>25266.5</text:p>
          </table:table-cell>
          <table:table-cell office:value-type="float" office:value="25256.5" calcext:value-type="float">
            <text:p>25256.5</text:p>
          </table:table-cell>
          <table:table-cell office:value-type="float" office:value="25271.5" calcext:value-type="float">
            <text:p>2527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51:31.400</text:p>
          </table:table-cell>
          <table:table-cell office:value-type="float" office:value="888" calcext:value-type="float">
            <text:p>88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389.5" calcext:value-type="float">
            <text:p>389.5</text:p>
          </table:table-cell>
          <table:table-cell office:value-type="float" office:value="0" calcext:value-type="float">
            <text:p>0</text:p>
          </table:table-cell>
          <table:table-cell office:value-type="float" office:value="389.5" calcext:value-type="float">
            <text:p>389.5</text:p>
          </table:table-cell>
          <table:table-cell office:value-type="float" office:value="695.1" calcext:value-type="float">
            <text:p>695.1</text:p>
          </table:table-cell>
          <table:table-cell office:value-type="float" office:value="-305.6" calcext:value-type="float">
            <text:p>-305.6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1:58.100</text:p>
          </table:table-cell>
          <table:table-cell office:value-type="string" calcext:value-type="string">
            <text:p>2025-10-21 10:51:58.100</text:p>
          </table:table-cell>
          <table:table-cell office:value-type="string" calcext:value-type="string">
            <text:p>LONG</text:p>
          </table:table-cell>
          <table:table-cell office:value-type="float" office:value="25261" calcext:value-type="float">
            <text:p>25261</text:p>
          </table:table-cell>
          <table:table-cell office:value-type="float" office:value="25271" calcext:value-type="float">
            <text:p>25271</text:p>
          </table:table-cell>
          <table:table-cell office:value-type="float" office:value="25256" calcext:value-type="float">
            <text:p>2525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52:00.500</text:p>
          </table:table-cell>
          <table:table-cell office:value-type="float" office:value="69" calcext:value-type="float">
            <text:p>6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78.8" calcext:value-type="float">
            <text:p>278.8</text:p>
          </table:table-cell>
          <table:table-cell office:value-type="float" office:value="1" calcext:value-type="float">
            <text:p>1</text:p>
          </table:table-cell>
          <table:table-cell office:value-type="float" office:value="278.8" calcext:value-type="float">
            <text:p>278.8</text:p>
          </table:table-cell>
          <table:table-cell office:value-type="float" office:value="695.1" calcext:value-type="float">
            <text:p>695.1</text:p>
          </table:table-cell>
          <table:table-cell office:value-type="float" office:value="-416.3" calcext:value-type="float">
            <text:p>-416.3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2:44.700</text:p>
          </table:table-cell>
          <table:table-cell office:value-type="string" calcext:value-type="string">
            <text:p>2025-10-21 10:52:44.700</text:p>
          </table:table-cell>
          <table:table-cell office:value-type="string" calcext:value-type="string">
            <text:p>LONG</text:p>
          </table:table-cell>
          <table:table-cell office:value-type="float" office:value="25266.25" calcext:value-type="float">
            <text:p>25266.25</text:p>
          </table:table-cell>
          <table:table-cell office:value-type="float" office:value="25276.25" calcext:value-type="float">
            <text:p>25276.25</text:p>
          </table:table-cell>
          <table:table-cell office:value-type="float" office:value="25261.25" calcext:value-type="float">
            <text:p>25261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52:45.50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68.1" calcext:value-type="float">
            <text:p>168.1</text:p>
          </table:table-cell>
          <table:table-cell office:value-type="float" office:value="2" calcext:value-type="float">
            <text:p>2</text:p>
          </table:table-cell>
          <table:table-cell office:value-type="float" office:value="168.1" calcext:value-type="float">
            <text:p>168.1</text:p>
          </table:table-cell>
          <table:table-cell office:value-type="float" office:value="695.1" calcext:value-type="float">
            <text:p>695.1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4:23.100</text:p>
          </table:table-cell>
          <table:table-cell office:value-type="string" calcext:value-type="string">
            <text:p>2025-10-21 10:54:23.100</text:p>
          </table:table-cell>
          <table:table-cell office:value-type="string" calcext:value-type="string">
            <text:p>LONG</text:p>
          </table:table-cell>
          <table:table-cell office:value-type="float" office:value="25277.5" calcext:value-type="float">
            <text:p>25277.5</text:p>
          </table:table-cell>
          <table:table-cell office:value-type="float" office:value="25287.5" calcext:value-type="float">
            <text:p>25287.5</text:p>
          </table:table-cell>
          <table:table-cell office:value-type="float" office:value="25272.5" calcext:value-type="float">
            <text:p>25272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54:23.5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57.4000000000003" calcext:value-type="float">
            <text:p>57.4000000000003</text:p>
          </table:table-cell>
          <table:table-cell office:value-type="float" office:value="3" calcext:value-type="float">
            <text:p>3</text:p>
          </table:table-cell>
          <table:table-cell office:value-type="float" office:value="57.4000000000003" calcext:value-type="float">
            <text:p>57.4000000000003</text:p>
          </table:table-cell>
          <table:table-cell office:value-type="float" office:value="695.1" calcext:value-type="float">
            <text:p>695.1</text:p>
          </table:table-cell>
          <table:table-cell office:value-type="float" office:value="-637.7" calcext:value-type="float">
            <text:p>-637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4:55:50.900</text:p>
          </table:table-cell>
          <table:table-cell office:value-type="string" calcext:value-type="string">
            <text:p>2025-10-21 10:55:50.900</text:p>
          </table:table-cell>
          <table:table-cell office:value-type="string" calcext:value-type="string">
            <text:p>LONG</text:p>
          </table:table-cell>
          <table:table-cell office:value-type="float" office:value="25291.25" calcext:value-type="float">
            <text:p>25291.25</text:p>
          </table:table-cell>
          <table:table-cell office:value-type="float" office:value="25301.25" calcext:value-type="float">
            <text:p>25301.25</text:p>
          </table:table-cell>
          <table:table-cell office:value-type="float" office:value="25286.25" calcext:value-type="float">
            <text:p>2528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4:55:51.10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5.3000000000002" calcext:value-type="float">
            <text:p>25.3000000000002</text:p>
          </table:table-cell>
          <table:table-cell office:value-type="float" office:value="0" calcext:value-type="float">
            <text:p>0</text:p>
          </table:table-cell>
          <table:table-cell office:value-type="float" office:value="246.7" calcext:value-type="float">
            <text:p>246.7</text:p>
          </table:table-cell>
          <table:table-cell office:value-type="float" office:value="695.1" calcext:value-type="float">
            <text:p>695.1</text:p>
          </table:table-cell>
          <table:table-cell office:value-type="float" office:value="-448.4" calcext:value-type="float">
            <text:p>-448.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03:03.500</text:p>
          </table:table-cell>
          <table:table-cell office:value-type="string" calcext:value-type="string">
            <text:p>2025-10-21 11:03:03.500</text:p>
          </table:table-cell>
          <table:table-cell office:value-type="string" calcext:value-type="string">
            <text:p>SHORT</text:p>
          </table:table-cell>
          <table:table-cell office:value-type="float" office:value="25282.5" calcext:value-type="float">
            <text:p>25282.5</text:p>
          </table:table-cell>
          <table:table-cell office:value-type="float" office:value="25272.5" calcext:value-type="float">
            <text:p>25272.5</text:p>
          </table:table-cell>
          <table:table-cell office:value-type="float" office:value="25287.5" calcext:value-type="float">
            <text:p>2528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5:03:03.800</text:p>
          </table:table-cell>
          <table:table-cell office:value-type="float" office:value="91" calcext:value-type="float">
            <text:p>91</text:p>
          </table:table-cell>
          <table:table-cell office:value-type="float" office:value="-43" calcext:value-type="float">
            <text:p>-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5:05:25.6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3.9" calcext:value-type="float">
            <text:p>103.9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695.1" calcext:value-type="float">
            <text:p>695.1</text:p>
          </table:table-cell>
          <table:table-cell office:value-type="float" office:value="-259.1" calcext:value-type="float">
            <text:p>-259.1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20:32.400</text:p>
          </table:table-cell>
          <table:table-cell office:value-type="string" calcext:value-type="string">
            <text:p>2025-10-21 11:20:32.400</text:p>
          </table:table-cell>
          <table:table-cell office:value-type="string" calcext:value-type="string">
            <text:p>SHORT</text:p>
          </table:table-cell>
          <table:table-cell office:value-type="float" office:value="25268" calcext:value-type="float">
            <text:p>25268</text:p>
          </table:table-cell>
          <table:table-cell office:value-type="float" office:value="25258" calcext:value-type="float">
            <text:p>25258</text:p>
          </table:table-cell>
          <table:table-cell office:value-type="float" office:value="25273" calcext:value-type="float">
            <text:p>2527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5:20:33.400</text:p>
          </table:table-cell>
          <table:table-cell office:value-type="float" office:value="115" calcext:value-type="float">
            <text:p>11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615.3" calcext:value-type="float">
            <text:p>615.3</text:p>
          </table:table-cell>
          <table:table-cell office:value-type="float" office:value="695.1" calcext:value-type="float">
            <text:p>695.1</text:p>
          </table:table-cell>
          <table:table-cell office:value-type="float" office:value="-79.7999999999998" calcext:value-type="float">
            <text:p>-79.7999999999998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26:06.600</text:p>
          </table:table-cell>
          <table:table-cell office:value-type="string" calcext:value-type="string">
            <text:p>2025-10-21 11:26:06.600</text:p>
          </table:table-cell>
          <table:table-cell office:value-type="string" calcext:value-type="string">
            <text:p>SHORT</text:p>
          </table:table-cell>
          <table:table-cell office:value-type="float" office:value="25268.75" calcext:value-type="float">
            <text:p>25268.75</text:p>
          </table:table-cell>
          <table:table-cell office:value-type="float" office:value="25258.75" calcext:value-type="float">
            <text:p>25258.75</text:p>
          </table:table-cell>
          <table:table-cell office:value-type="float" office:value="25273.75" calcext:value-type="float">
            <text:p>2527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5:26:07.60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467.5" calcext:value-type="float">
            <text:p>46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9.6" calcext:value-type="float">
            <text:p>79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32:39.700</text:p>
          </table:table-cell>
          <table:table-cell office:value-type="string" calcext:value-type="string">
            <text:p>2025-10-21 11:32:39.700</text:p>
          </table:table-cell>
          <table:table-cell office:value-type="string" calcext:value-type="string">
            <text:p>SHORT</text:p>
          </table:table-cell>
          <table:table-cell office:value-type="float" office:value="25287.5" calcext:value-type="float">
            <text:p>25287.5</text:p>
          </table:table-cell>
          <table:table-cell office:value-type="float" office:value="25277.5" calcext:value-type="float">
            <text:p>25277.5</text:p>
          </table:table-cell>
          <table:table-cell office:value-type="float" office:value="25292.5" calcext:value-type="float">
            <text:p>2529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5:32:40.700</text:p>
          </table:table-cell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5:32:56.5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46.8" calcext:value-type="float">
            <text:p>346.8</text:p>
          </table:table-cell>
          <table:table-cell office:value-type="float" office:value="1" calcext:value-type="float">
            <text:p>1</text:p>
          </table:table-cell>
          <table:table-cell office:value-type="float" office:value="678.9" calcext:value-type="float">
            <text:p>678.9</text:p>
          </table:table-cell>
          <table:table-cell office:value-type="float" office:value="799.6" calcext:value-type="float">
            <text:p>799.6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37:52.400</text:p>
          </table:table-cell>
          <table:table-cell office:value-type="string" calcext:value-type="string">
            <text:p>2025-10-21 11:37:52.400</text:p>
          </table:table-cell>
          <table:table-cell office:value-type="string" calcext:value-type="string">
            <text:p>SHORT</text:p>
          </table:table-cell>
          <table:table-cell office:value-type="float" office:value="25261" calcext:value-type="float">
            <text:p>25261</text:p>
          </table:table-cell>
          <table:table-cell office:value-type="float" office:value="25251" calcext:value-type="float">
            <text:p>25251</text:p>
          </table:table-cell>
          <table:table-cell office:value-type="float" office:value="25266" calcext:value-type="float">
            <text:p>2526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5:37:53.400</text:p>
          </table:table-cell>
          <table:table-cell office:value-type="float" office:value="79" calcext:value-type="float">
            <text:p>79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531.1" calcext:value-type="float">
            <text:p>53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3.2" calcext:value-type="float">
            <text:p>86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46:50.700</text:p>
          </table:table-cell>
          <table:table-cell office:value-type="string" calcext:value-type="string">
            <text:p>2025-10-21 11:46:50.700</text:p>
          </table:table-cell>
          <table:table-cell office:value-type="string" calcext:value-type="string">
            <text:p>LONG</text:p>
          </table:table-cell>
          <table:table-cell office:value-type="float" office:value="25298.5" calcext:value-type="float">
            <text:p>25298.5</text:p>
          </table:table-cell>
          <table:table-cell office:value-type="float" office:value="25308.5" calcext:value-type="float">
            <text:p>25308.5</text:p>
          </table:table-cell>
          <table:table-cell office:value-type="float" office:value="25293.5" calcext:value-type="float">
            <text:p>2529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5:46:51.30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0.4" calcext:value-type="float">
            <text:p>420.4</text:p>
          </table:table-cell>
          <table:table-cell office:value-type="float" office:value="1" calcext:value-type="float">
            <text:p>1</text:p>
          </table:table-cell>
          <table:table-cell office:value-type="float" office:value="752.5" calcext:value-type="float">
            <text:p>752.5</text:p>
          </table:table-cell>
          <table:table-cell office:value-type="float" office:value="863.2" calcext:value-type="float">
            <text:p>863.2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47:33.300</text:p>
          </table:table-cell>
          <table:table-cell office:value-type="string" calcext:value-type="string">
            <text:p>2025-10-21 11:47:33.300</text:p>
          </table:table-cell>
          <table:table-cell office:value-type="string" calcext:value-type="string">
            <text:p>LONG</text:p>
          </table:table-cell>
          <table:table-cell office:value-type="float" office:value="25306.5" calcext:value-type="float">
            <text:p>25306.5</text:p>
          </table:table-cell>
          <table:table-cell office:value-type="float" office:value="25316.5" calcext:value-type="float">
            <text:p>25316.5</text:p>
          </table:table-cell>
          <table:table-cell office:value-type="float" office:value="25301.5" calcext:value-type="float">
            <text:p>2530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5:47:35.200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09.7" calcext:value-type="float">
            <text:p>309.7</text:p>
          </table:table-cell>
          <table:table-cell office:value-type="float" office:value="2" calcext:value-type="float">
            <text:p>2</text:p>
          </table:table-cell>
          <table:table-cell office:value-type="float" office:value="641.8" calcext:value-type="float">
            <text:p>641.8</text:p>
          </table:table-cell>
          <table:table-cell office:value-type="float" office:value="863.2" calcext:value-type="float">
            <text:p>863.2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48:38.700</text:p>
          </table:table-cell>
          <table:table-cell office:value-type="string" calcext:value-type="string">
            <text:p>2025-10-21 11:48:38.700</text:p>
          </table:table-cell>
          <table:table-cell office:value-type="string" calcext:value-type="string">
            <text:p>LONG</text:p>
          </table:table-cell>
          <table:table-cell office:value-type="float" office:value="25313.25" calcext:value-type="float">
            <text:p>25313.25</text:p>
          </table:table-cell>
          <table:table-cell office:value-type="float" office:value="25323.25" calcext:value-type="float">
            <text:p>25323.25</text:p>
          </table:table-cell>
          <table:table-cell office:value-type="float" office:value="25308.25" calcext:value-type="float">
            <text:p>2530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5:48:39.700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5:49:10.7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521.1" calcext:value-type="float">
            <text:p>521.1</text:p>
          </table:table-cell>
          <table:table-cell office:value-type="float" office:value="863.2" calcext:value-type="float">
            <text:p>863.2</text:p>
          </table:table-cell>
          <table:table-cell office:value-type="float" office:value="-342.1" calcext:value-type="float">
            <text:p>-342.1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49:45.900</text:p>
          </table:table-cell>
          <table:table-cell office:value-type="string" calcext:value-type="string">
            <text:p>2025-10-21 11:49:45.900</text:p>
          </table:table-cell>
          <table:table-cell office:value-type="string" calcext:value-type="string">
            <text:p>SHORT</text:p>
          </table:table-cell>
          <table:table-cell office:value-type="float" office:value="25305.25" calcext:value-type="float">
            <text:p>25305.25</text:p>
          </table:table-cell>
          <table:table-cell office:value-type="float" office:value="25295.25" calcext:value-type="float">
            <text:p>2529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5:49:46.600</text:p>
          </table:table-cell>
          <table:table-cell office:value-type="float" office:value="85" calcext:value-type="float">
            <text:p>85</text:p>
          </table:table-cell>
          <table:table-cell office:value-type="float" office:value="-49" calcext:value-type="float">
            <text:p>-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78.3" calcext:value-type="float">
            <text:p>378.3</text:p>
          </table:table-cell>
          <table:table-cell office:value-type="float" office:value="0" calcext:value-type="float">
            <text:p>0</text:p>
          </table:table-cell>
          <table:table-cell office:value-type="float" office:value="710.4" calcext:value-type="float">
            <text:p>710.4</text:p>
          </table:table-cell>
          <table:table-cell office:value-type="float" office:value="863.2" calcext:value-type="float">
            <text:p>863.2</text:p>
          </table:table-cell>
          <table:table-cell office:value-type="float" office:value="-152.8" calcext:value-type="float">
            <text:p>-152.8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5:57:50.900</text:p>
          </table:table-cell>
          <table:table-cell office:value-type="string" calcext:value-type="string">
            <text:p>2025-10-21 11:57:50.900</text:p>
          </table:table-cell>
          <table:table-cell office:value-type="string" calcext:value-type="string">
            <text:p>LONG</text:p>
          </table:table-cell>
          <table:table-cell office:value-type="float" office:value="25314.75" calcext:value-type="float">
            <text:p>25314.75</text:p>
          </table:table-cell>
          <table:table-cell office:value-type="float" office:value="25324.75" calcext:value-type="float">
            <text:p>25324.75</text:p>
          </table:table-cell>
          <table:table-cell office:value-type="float" office:value="25309.75" calcext:value-type="float">
            <text:p>2530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5:57:54.20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67.6" calcext:value-type="float">
            <text:p>267.6</text:p>
          </table:table-cell>
          <table:table-cell office:value-type="float" office:value="1" calcext:value-type="float">
            <text:p>1</text:p>
          </table:table-cell>
          <table:table-cell office:value-type="float" office:value="599.7" calcext:value-type="float">
            <text:p>599.7</text:p>
          </table:table-cell>
          <table:table-cell office:value-type="float" office:value="863.2" calcext:value-type="float">
            <text:p>863.2</text:p>
          </table:table-cell>
          <table:table-cell office:value-type="float" office:value="-263.5" calcext:value-type="float">
            <text:p>-263.5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03:40.800</text:p>
          </table:table-cell>
          <table:table-cell office:value-type="string" calcext:value-type="string">
            <text:p>2025-10-21 12:03:40.800</text:p>
          </table:table-cell>
          <table:table-cell office:value-type="string" calcext:value-type="string">
            <text:p>LONG</text:p>
          </table:table-cell>
          <table:table-cell office:value-type="float" office:value="25338.5" calcext:value-type="float">
            <text:p>25338.5</text:p>
          </table:table-cell>
          <table:table-cell office:value-type="float" office:value="25348.5" calcext:value-type="float">
            <text:p>25348.5</text:p>
          </table:table-cell>
          <table:table-cell office:value-type="float" office:value="25333.5" calcext:value-type="float">
            <text:p>25333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03:41.8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46.9" calcext:value-type="float">
            <text:p>446.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863.2" calcext:value-type="float">
            <text:p>863.2</text:p>
          </table:table-cell>
          <table:table-cell office:value-type="float" office:value="-84.2000000000003" calcext:value-type="float">
            <text:p>-84.2000000000003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09:59.800</text:p>
          </table:table-cell>
          <table:table-cell office:value-type="string" calcext:value-type="string">
            <text:p>2025-10-21 12:09:59.800</text:p>
          </table:table-cell>
          <table:table-cell office:value-type="string" calcext:value-type="string">
            <text:p>SHORT</text:p>
          </table:table-cell>
          <table:table-cell office:value-type="float" office:value="25324.75" calcext:value-type="float">
            <text:p>25324.75</text:p>
          </table:table-cell>
          <table:table-cell office:value-type="float" office:value="25314.75" calcext:value-type="float">
            <text:p>25314.75</text:p>
          </table:table-cell>
          <table:table-cell office:value-type="float" office:value="25329.75" calcext:value-type="float">
            <text:p>25329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10:00.800</text:p>
          </table:table-cell>
          <table:table-cell office:value-type="float" office:value="484" calcext:value-type="float">
            <text:p>48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59.3" calcext:value-type="float">
            <text:p>15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606.200000000001" calcext:value-type="float">
            <text:p>606.2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8.3" calcext:value-type="float">
            <text:p>9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11:24.700</text:p>
          </table:table-cell>
          <table:table-cell office:value-type="string" calcext:value-type="string">
            <text:p>2025-10-21 12:11:24.700</text:p>
          </table:table-cell>
          <table:table-cell office:value-type="string" calcext:value-type="string">
            <text:p>LONG</text:p>
          </table:table-cell>
          <table:table-cell office:value-type="float" office:value="25323.5" calcext:value-type="float">
            <text:p>25323.5</text:p>
          </table:table-cell>
          <table:table-cell office:value-type="float" office:value="25333.5" calcext:value-type="float">
            <text:p>25333.5</text:p>
          </table:table-cell>
          <table:table-cell office:value-type="float" office:value="25318.5" calcext:value-type="float">
            <text:p>25318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11:25.700</text:p>
          </table:table-cell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6:15:45.5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785.500000000001" calcext:value-type="float">
            <text:p>785.5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7.6" calcext:value-type="float">
            <text:p>111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16:48.500</text:p>
          </table:table-cell>
          <table:table-cell office:value-type="string" calcext:value-type="string">
            <text:p>2025-10-21 12:16:48.500</text:p>
          </table:table-cell>
          <table:table-cell office:value-type="string" calcext:value-type="string">
            <text:p>LONG</text:p>
          </table:table-cell>
          <table:table-cell office:value-type="float" office:value="25330.75" calcext:value-type="float">
            <text:p>25330.75</text:p>
          </table:table-cell>
          <table:table-cell office:value-type="float" office:value="25340.75" calcext:value-type="float">
            <text:p>25340.75</text:p>
          </table:table-cell>
          <table:table-cell office:value-type="float" office:value="25325.75" calcext:value-type="float">
            <text:p>25325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16:49.500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954.8" calcext:value-type="float">
            <text:p>95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6.9" calcext:value-type="float">
            <text:p>128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18:35.800</text:p>
          </table:table-cell>
          <table:table-cell office:value-type="string" calcext:value-type="string">
            <text:p>2025-10-21 12:18:35.800</text:p>
          </table:table-cell>
          <table:table-cell office:value-type="string" calcext:value-type="string">
            <text:p>LONG</text:p>
          </table:table-cell>
          <table:table-cell office:value-type="float" office:value="25325.5" calcext:value-type="float">
            <text:p>25325.5</text:p>
          </table:table-cell>
          <table:table-cell office:value-type="float" office:value="25335.5" calcext:value-type="float">
            <text:p>25335.5</text:p>
          </table:table-cell>
          <table:table-cell office:value-type="float" office:value="25320.5" calcext:value-type="float">
            <text:p>25320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18:36.80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6:20:00.2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834.1" calcext:value-type="float">
            <text:p>834.1</text:p>
          </table:table-cell>
          <table:table-cell office:value-type="float" office:value="1" calcext:value-type="float">
            <text:p>1</text:p>
          </table:table-cell>
          <table:table-cell office:value-type="float" office:value="1166.2" calcext:value-type="float">
            <text:p>1166.2</text:p>
          </table:table-cell>
          <table:table-cell office:value-type="float" office:value="1286.9" calcext:value-type="float">
            <text:p>1286.9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22:03.800</text:p>
          </table:table-cell>
          <table:table-cell office:value-type="string" calcext:value-type="string">
            <text:p>2025-10-21 12:22:03.800</text:p>
          </table:table-cell>
          <table:table-cell office:value-type="string" calcext:value-type="string">
            <text:p>SHORT</text:p>
          </table:table-cell>
          <table:table-cell office:value-type="float" office:value="25318" calcext:value-type="float">
            <text:p>25318</text:p>
          </table:table-cell>
          <table:table-cell office:value-type="float" office:value="25308" calcext:value-type="float">
            <text:p>25308</text:p>
          </table:table-cell>
          <table:table-cell office:value-type="float" office:value="25323" calcext:value-type="float">
            <text:p>2532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6:22:03.900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23.4" calcext:value-type="float">
            <text:p>102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5.5" calcext:value-type="float">
            <text:p>13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24:36.600</text:p>
          </table:table-cell>
          <table:table-cell office:value-type="string" calcext:value-type="string">
            <text:p>2025-10-21 12:24:36.600</text:p>
          </table:table-cell>
          <table:table-cell office:value-type="string" calcext:value-type="string">
            <text:p>LONG</text:p>
          </table:table-cell>
          <table:table-cell office:value-type="float" office:value="25331.75" calcext:value-type="float">
            <text:p>25331.75</text:p>
          </table:table-cell>
          <table:table-cell office:value-type="float" office:value="25341.75" calcext:value-type="float">
            <text:p>25341.75</text:p>
          </table:table-cell>
          <table:table-cell office:value-type="float" office:value="25326.75" calcext:value-type="float">
            <text:p>25326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6:24:39.0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212.7" calcext:value-type="float">
            <text:p>1212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4.8" calcext:value-type="float">
            <text:p>154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25:57.700</text:p>
          </table:table-cell>
          <table:table-cell office:value-type="string" calcext:value-type="string">
            <text:p>2025-10-21 12:25:57.700</text:p>
          </table:table-cell>
          <table:table-cell office:value-type="string" calcext:value-type="string">
            <text:p>LONG</text:p>
          </table:table-cell>
          <table:table-cell office:value-type="float" office:value="25326.75" calcext:value-type="float">
            <text:p>25326.75</text:p>
          </table:table-cell>
          <table:table-cell office:value-type="float" office:value="25336.75" calcext:value-type="float">
            <text:p>25336.75</text:p>
          </table:table-cell>
          <table:table-cell office:value-type="float" office:value="25321.75" calcext:value-type="float">
            <text:p>25321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6:25:57.8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1434.1" calcext:value-type="float">
            <text:p>1434.1</text:p>
          </table:table-cell>
          <table:table-cell office:value-type="float" office:value="1544.8" calcext:value-type="float">
            <text:p>1544.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26:43.800</text:p>
          </table:table-cell>
          <table:table-cell office:value-type="string" calcext:value-type="string">
            <text:p>2025-10-21 12:26:43.800</text:p>
          </table:table-cell>
          <table:table-cell office:value-type="string" calcext:value-type="string">
            <text:p>LONG</text:p>
          </table:table-cell>
          <table:table-cell office:value-type="float" office:value="25327.5" calcext:value-type="float">
            <text:p>25327.5</text:p>
          </table:table-cell>
          <table:table-cell office:value-type="float" office:value="25337.5" calcext:value-type="float">
            <text:p>25337.5</text:p>
          </table:table-cell>
          <table:table-cell office:value-type="float" office:value="25322.5" calcext:value-type="float">
            <text:p>25322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26:44.800</text:p>
          </table:table-cell>
          <table:table-cell office:value-type="float" office:value="123" calcext:value-type="float">
            <text:p>12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981.3" calcext:value-type="float">
            <text:p>981.3</text:p>
          </table:table-cell>
          <table:table-cell office:value-type="float" office:value="2" calcext:value-type="float">
            <text:p>2</text:p>
          </table:table-cell>
          <table:table-cell office:value-type="float" office:value="1313.4" calcext:value-type="float">
            <text:p>1313.4</text:p>
          </table:table-cell>
          <table:table-cell office:value-type="float" office:value="1544.8" calcext:value-type="float">
            <text:p>1544.8</text:p>
          </table:table-cell>
          <table:table-cell office:value-type="float" office:value="-231.4" calcext:value-type="float">
            <text:p>-231.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27:09.100</text:p>
          </table:table-cell>
          <table:table-cell office:value-type="string" calcext:value-type="string">
            <text:p>2025-10-21 12:27:09.100</text:p>
          </table:table-cell>
          <table:table-cell office:value-type="string" calcext:value-type="string">
            <text:p>LONG</text:p>
          </table:table-cell>
          <table:table-cell office:value-type="float" office:value="25329" calcext:value-type="float">
            <text:p>25329</text:p>
          </table:table-cell>
          <table:table-cell office:value-type="float" office:value="25339" calcext:value-type="float">
            <text:p>25339</text:p>
          </table:table-cell>
          <table:table-cell office:value-type="float" office:value="25324" calcext:value-type="float">
            <text:p>25324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6:27:09.700</text:p>
          </table:table-cell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870.6" calcext:value-type="float">
            <text:p>870.6</text:p>
          </table:table-cell>
          <table:table-cell office:value-type="float" office:value="3" calcext:value-type="float">
            <text:p>3</text:p>
          </table:table-cell>
          <table:table-cell office:value-type="float" office:value="1202.7" calcext:value-type="float">
            <text:p>1202.7</text:p>
          </table:table-cell>
          <table:table-cell office:value-type="float" office:value="1544.8" calcext:value-type="float">
            <text:p>1544.8</text:p>
          </table:table-cell>
          <table:table-cell office:value-type="float" office:value="-342.1" calcext:value-type="float">
            <text:p>-342.1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33:02.200</text:p>
          </table:table-cell>
          <table:table-cell office:value-type="string" calcext:value-type="string">
            <text:p>2025-10-21 12:33:02.200</text:p>
          </table:table-cell>
          <table:table-cell office:value-type="string" calcext:value-type="string">
            <text:p>LONG</text:p>
          </table:table-cell>
          <table:table-cell office:value-type="float" office:value="25336.25" calcext:value-type="float">
            <text:p>25336.25</text:p>
          </table:table-cell>
          <table:table-cell office:value-type="float" office:value="25346.25" calcext:value-type="float">
            <text:p>25346.25</text:p>
          </table:table-cell>
          <table:table-cell office:value-type="float" office:value="25331.25" calcext:value-type="float">
            <text:p>25331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33:03.20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49.9" calcext:value-type="float">
            <text:p>1049.9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1544.8" calcext:value-type="float">
            <text:p>1544.8</text:p>
          </table:table-cell>
          <table:table-cell office:value-type="float" office:value="-162.8" calcext:value-type="float">
            <text:p>-162.8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33:32.300</text:p>
          </table:table-cell>
          <table:table-cell office:value-type="string" calcext:value-type="string">
            <text:p>2025-10-21 12:33:32.300</text:p>
          </table:table-cell>
          <table:table-cell office:value-type="string" calcext:value-type="string">
            <text:p>LONG</text:p>
          </table:table-cell>
          <table:table-cell office:value-type="float" office:value="25339.25" calcext:value-type="float">
            <text:p>25339.25</text:p>
          </table:table-cell>
          <table:table-cell office:value-type="float" office:value="25349.25" calcext:value-type="float">
            <text:p>25349.25</text:p>
          </table:table-cell>
          <table:table-cell office:value-type="float" office:value="25334.25" calcext:value-type="float">
            <text:p>25334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33:33.300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229.2" calcext:value-type="float">
            <text:p>1229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1.3" calcext:value-type="float">
            <text:p>156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36:18.500</text:p>
          </table:table-cell>
          <table:table-cell office:value-type="string" calcext:value-type="string">
            <text:p>2025-10-21 12:36:18.500</text:p>
          </table:table-cell>
          <table:table-cell office:value-type="string" calcext:value-type="string">
            <text:p>SHORT</text:p>
          </table:table-cell>
          <table:table-cell office:value-type="float" office:value="25339" calcext:value-type="float">
            <text:p>25339</text:p>
          </table:table-cell>
          <table:table-cell office:value-type="float" office:value="25329" calcext:value-type="float">
            <text:p>25329</text:p>
          </table:table-cell>
          <table:table-cell office:value-type="float" office:value="25344" calcext:value-type="float">
            <text:p>2534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36:19.500</text:p>
          </table:table-cell>
          <table:table-cell office:value-type="float" office:value="102" calcext:value-type="float">
            <text:p>102</text:p>
          </table:table-cell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108.5" calcext:value-type="float">
            <text:p>1108.5</text:p>
          </table:table-cell>
          <table:table-cell office:value-type="float" office:value="1" calcext:value-type="float">
            <text:p>1</text:p>
          </table:table-cell>
          <table:table-cell office:value-type="float" office:value="1440.6" calcext:value-type="float">
            <text:p>1440.6</text:p>
          </table:table-cell>
          <table:table-cell office:value-type="float" office:value="1561.3" calcext:value-type="float">
            <text:p>1561.3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37:18.900</text:p>
          </table:table-cell>
          <table:table-cell office:value-type="string" calcext:value-type="string">
            <text:p>2025-10-21 12:37:18.900</text:p>
          </table:table-cell>
          <table:table-cell office:value-type="string" calcext:value-type="string">
            <text:p>SHORT</text:p>
          </table:table-cell>
          <table:table-cell office:value-type="float" office:value="25338" calcext:value-type="float">
            <text:p>25338</text:p>
          </table:table-cell>
          <table:table-cell office:value-type="float" office:value="25328" calcext:value-type="float">
            <text:p>25328</text:p>
          </table:table-cell>
          <table:table-cell office:value-type="float" office:value="25343" calcext:value-type="float">
            <text:p>2534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37:19.900</text:p>
          </table:table-cell>
          <table:table-cell office:value-type="float" office:value="194" calcext:value-type="float">
            <text:p>19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987.8" calcext:value-type="float">
            <text:p>987.8</text:p>
          </table:table-cell>
          <table:table-cell office:value-type="float" office:value="2" calcext:value-type="float">
            <text:p>2</text:p>
          </table:table-cell>
          <table:table-cell office:value-type="float" office:value="1319.9" calcext:value-type="float">
            <text:p>1319.9</text:p>
          </table:table-cell>
          <table:table-cell office:value-type="float" office:value="1561.3" calcext:value-type="float">
            <text:p>1561.3</text:p>
          </table:table-cell>
          <table:table-cell office:value-type="float" office:value="-241.4" calcext:value-type="float">
            <text:p>-241.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47:54.200</text:p>
          </table:table-cell>
          <table:table-cell office:value-type="string" calcext:value-type="string">
            <text:p>2025-10-21 12:47:54.200</text:p>
          </table:table-cell>
          <table:table-cell office:value-type="string" calcext:value-type="string">
            <text:p>LONG</text:p>
          </table:table-cell>
          <table:table-cell office:value-type="float" office:value="25339.75" calcext:value-type="float">
            <text:p>25339.75</text:p>
          </table:table-cell>
          <table:table-cell office:value-type="float" office:value="25349.75" calcext:value-type="float">
            <text:p>25349.75</text:p>
          </table:table-cell>
          <table:table-cell office:value-type="float" office:value="25334.75" calcext:value-type="float">
            <text:p>25334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47:55.20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172.1" calcext:value-type="float">
            <text:p>1172.1</text:p>
          </table:table-cell>
          <table:table-cell office:value-type="float" office:value="0" calcext:value-type="float">
            <text:p>0</text:p>
          </table:table-cell>
          <table:table-cell office:value-type="float" office:value="1504.2" calcext:value-type="float">
            <text:p>1504.2</text:p>
          </table:table-cell>
          <table:table-cell office:value-type="float" office:value="1561.3" calcext:value-type="float">
            <text:p>1561.3</text:p>
          </table:table-cell>
          <table:table-cell office:value-type="float" office:value="-57.1000000000001" calcext:value-type="float">
            <text:p>-57.1000000000001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52:23.300</text:p>
          </table:table-cell>
          <table:table-cell office:value-type="string" calcext:value-type="string">
            <text:p>2025-10-21 12:52:23.300</text:p>
          </table:table-cell>
          <table:table-cell office:value-type="string" calcext:value-type="string">
            <text:p>SHORT</text:p>
          </table:table-cell>
          <table:table-cell office:value-type="float" office:value="25318.75" calcext:value-type="float">
            <text:p>25318.75</text:p>
          </table:table-cell>
          <table:table-cell office:value-type="float" office:value="25308.75" calcext:value-type="float">
            <text:p>25308.75</text:p>
          </table:table-cell>
          <table:table-cell office:value-type="float" office:value="25323.75" calcext:value-type="float">
            <text:p>2532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6:52:24.300</text:p>
          </table:table-cell>
          <table:table-cell office:value-type="float" office:value="78" calcext:value-type="float">
            <text:p>78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5.7" calcext:value-type="float">
            <text:p>-115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056.4" calcext:value-type="float">
            <text:p>1056.4</text:p>
          </table:table-cell>
          <table:table-cell office:value-type="float" office:value="1" calcext:value-type="float">
            <text:p>1</text:p>
          </table:table-cell>
          <table:table-cell office:value-type="float" office:value="1388.5" calcext:value-type="float">
            <text:p>1388.5</text:p>
          </table:table-cell>
          <table:table-cell office:value-type="float" office:value="1561.3" calcext:value-type="float">
            <text:p>1561.3</text:p>
          </table:table-cell>
          <table:table-cell office:value-type="float" office:value="-172.8" calcext:value-type="float">
            <text:p>-172.8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54:54.400</text:p>
          </table:table-cell>
          <table:table-cell office:value-type="string" calcext:value-type="string">
            <text:p>2025-10-21 12:54:54.400</text:p>
          </table:table-cell>
          <table:table-cell office:value-type="string" calcext:value-type="string">
            <text:p>LONG</text:p>
          </table:table-cell>
          <table:table-cell office:value-type="float" office:value="25295.5" calcext:value-type="float">
            <text:p>25295.5</text:p>
          </table:table-cell>
          <table:table-cell office:value-type="float" office:value="25305.5" calcext:value-type="float">
            <text:p>25305.5</text:p>
          </table:table-cell>
          <table:table-cell office:value-type="float" office:value="25290.5" calcext:value-type="float">
            <text:p>2529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6:54:58.20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245.7" calcext:value-type="float">
            <text:p>1245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7.8" calcext:value-type="float">
            <text:p>157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6:56:35.800</text:p>
          </table:table-cell>
          <table:table-cell office:value-type="string" calcext:value-type="string">
            <text:p>2025-10-21 12:56:35.800</text:p>
          </table:table-cell>
          <table:table-cell office:value-type="string" calcext:value-type="string">
            <text:p>LONG</text:p>
          </table:table-cell>
          <table:table-cell office:value-type="float" office:value="25299.75" calcext:value-type="float">
            <text:p>25299.75</text:p>
          </table:table-cell>
          <table:table-cell office:value-type="float" office:value="25309.75" calcext:value-type="float">
            <text:p>25309.75</text:p>
          </table:table-cell>
          <table:table-cell office:value-type="float" office:value="25294.75" calcext:value-type="float">
            <text:p>2529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6:56:36.80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7.1" calcext:value-type="float">
            <text:p>176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03:51.500</text:p>
          </table:table-cell>
          <table:table-cell office:value-type="string" calcext:value-type="string">
            <text:p>2025-10-21 13:03:51.500</text:p>
          </table:table-cell>
          <table:table-cell office:value-type="string" calcext:value-type="string">
            <text:p>SHORT</text:p>
          </table:table-cell>
          <table:table-cell office:value-type="float" office:value="25255.25" calcext:value-type="float">
            <text:p>25255.25</text:p>
          </table:table-cell>
          <table:table-cell office:value-type="float" office:value="25245.25" calcext:value-type="float">
            <text:p>25245.25</text:p>
          </table:table-cell>
          <table:table-cell office:value-type="float" office:value="25260.25" calcext:value-type="float">
            <text:p>2526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7:03:52.500</text:p>
          </table:table-cell>
          <table:table-cell office:value-type="float" office:value="86" calcext:value-type="float">
            <text:p>86</text:p>
          </table:table-cell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619.3" calcext:value-type="float">
            <text:p>1619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51.4" calcext:value-type="float">
            <text:p>195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14:30.800</text:p>
          </table:table-cell>
          <table:table-cell office:value-type="string" calcext:value-type="string">
            <text:p>2025-10-21 13:14:30.800</text:p>
          </table:table-cell>
          <table:table-cell office:value-type="string" calcext:value-type="string">
            <text:p>SHORT</text:p>
          </table:table-cell>
          <table:table-cell office:value-type="float" office:value="25305.5" calcext:value-type="float">
            <text:p>25305.5</text:p>
          </table:table-cell>
          <table:table-cell office:value-type="float" office:value="25295.5" calcext:value-type="float">
            <text:p>25295.5</text:p>
          </table:table-cell>
          <table:table-cell office:value-type="float" office:value="25310.5" calcext:value-type="float">
            <text:p>25310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7:14:31.100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508.6" calcext:value-type="float">
            <text:p>1508.6</text:p>
          </table:table-cell>
          <table:table-cell office:value-type="float" office:value="1" calcext:value-type="float">
            <text:p>1</text:p>
          </table:table-cell>
          <table:table-cell office:value-type="float" office:value="1840.7" calcext:value-type="float">
            <text:p>1840.7</text:p>
          </table:table-cell>
          <table:table-cell office:value-type="float" office:value="1951.4" calcext:value-type="float">
            <text:p>1951.4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22:07.600</text:p>
          </table:table-cell>
          <table:table-cell office:value-type="string" calcext:value-type="string">
            <text:p>2025-10-21 13:22:07.600</text:p>
          </table:table-cell>
          <table:table-cell office:value-type="string" calcext:value-type="string">
            <text:p>SHORT</text:p>
          </table:table-cell>
          <table:table-cell office:value-type="float" office:value="25271.75" calcext:value-type="float">
            <text:p>25271.75</text:p>
          </table:table-cell>
          <table:table-cell office:value-type="float" office:value="25261.75" calcext:value-type="float">
            <text:p>25261.75</text:p>
          </table:table-cell>
          <table:table-cell office:value-type="float" office:value="25276.75" calcext:value-type="float">
            <text:p>2527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7:22:08.600</text:p>
          </table:table-cell>
          <table:table-cell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7:23:01.4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692.9" calcext:value-type="float">
            <text:p>169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23:25.700</text:p>
          </table:table-cell>
          <table:table-cell office:value-type="string" calcext:value-type="string">
            <text:p>2025-10-21 13:23:25.700</text:p>
          </table:table-cell>
          <table:table-cell office:value-type="string" calcext:value-type="string">
            <text:p>LONG</text:p>
          </table:table-cell>
          <table:table-cell office:value-type="float" office:value="25273.25" calcext:value-type="float">
            <text:p>25273.25</text:p>
          </table:table-cell>
          <table:table-cell office:value-type="float" office:value="25283.25" calcext:value-type="float">
            <text:p>25283.25</text:p>
          </table:table-cell>
          <table:table-cell office:value-type="float" office:value="25268.25" calcext:value-type="float">
            <text:p>2526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7:23:26.30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7:24:32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1882.2" calcext:value-type="float">
            <text:p>188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14.3" calcext:value-type="float">
            <text:p>22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29:34.400</text:p>
          </table:table-cell>
          <table:table-cell office:value-type="string" calcext:value-type="string">
            <text:p>2025-10-21 13:29:34.400</text:p>
          </table:table-cell>
          <table:table-cell office:value-type="string" calcext:value-type="string">
            <text:p>LONG</text:p>
          </table:table-cell>
          <table:table-cell office:value-type="float" office:value="25281" calcext:value-type="float">
            <text:p>25281</text:p>
          </table:table-cell>
          <table:table-cell office:value-type="float" office:value="25291" calcext:value-type="float">
            <text:p>25291</text:p>
          </table:table-cell>
          <table:table-cell office:value-type="float" office:value="25276" calcext:value-type="float">
            <text:p>2527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7:29:34.70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7:30:28.5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INSIDE_OR</text:p>
          </table:table-cell>
          <table:table-cell office:value-type="string" calcext:value-type="string">
            <text:p>NORMAL</text:p>
          </table:table-cell>
          <table:table-cell office:value-type="float" office:value="2071.5" calcext:value-type="float">
            <text:p>207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3.6" calcext:value-type="float">
            <text:p>240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40:27.500</text:p>
          </table:table-cell>
          <table:table-cell office:value-type="string" calcext:value-type="string">
            <text:p>2025-10-21 13:40:27.500</text:p>
          </table:table-cell>
          <table:table-cell office:value-type="string" calcext:value-type="string">
            <text:p>LONG</text:p>
          </table:table-cell>
          <table:table-cell office:value-type="float" office:value="25290" calcext:value-type="float">
            <text:p>25290</text:p>
          </table:table-cell>
          <table:table-cell office:value-type="float" office:value="25300" calcext:value-type="float">
            <text:p>25300</text:p>
          </table:table-cell>
          <table:table-cell office:value-type="float" office:value="25285" calcext:value-type="float">
            <text:p>2528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7:40:28.30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1960.8" calcext:value-type="float">
            <text:p>1960.8</text:p>
          </table:table-cell>
          <table:table-cell office:value-type="float" office:value="1" calcext:value-type="float">
            <text:p>1</text:p>
          </table:table-cell>
          <table:table-cell office:value-type="float" office:value="2292.9" calcext:value-type="float">
            <text:p>2292.9</text:p>
          </table:table-cell>
          <table:table-cell office:value-type="float" office:value="2403.6" calcext:value-type="float">
            <text:p>2403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41:08.500</text:p>
          </table:table-cell>
          <table:table-cell office:value-type="string" calcext:value-type="string">
            <text:p>2025-10-21 13:41:08.500</text:p>
          </table:table-cell>
          <table:table-cell office:value-type="string" calcext:value-type="string">
            <text:p>LONG</text:p>
          </table:table-cell>
          <table:table-cell office:value-type="float" office:value="25296" calcext:value-type="float">
            <text:p>25296</text:p>
          </table:table-cell>
          <table:table-cell office:value-type="float" office:value="25306" calcext:value-type="float">
            <text:p>25306</text:p>
          </table:table-cell>
          <table:table-cell office:value-type="float" office:value="25291" calcext:value-type="float">
            <text:p>2529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7:41:09.3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150.1" calcext:value-type="float">
            <text:p>215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82.2" calcext:value-type="float">
            <text:p>248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7:56:12.400</text:p>
          </table:table-cell>
          <table:table-cell office:value-type="string" calcext:value-type="string">
            <text:p>2025-10-21 13:56:12.400</text:p>
          </table:table-cell>
          <table:table-cell office:value-type="string" calcext:value-type="string">
            <text:p>SHORT</text:p>
          </table:table-cell>
          <table:table-cell office:value-type="float" office:value="25312.25" calcext:value-type="float">
            <text:p>25312.25</text:p>
          </table:table-cell>
          <table:table-cell office:value-type="float" office:value="25302.25" calcext:value-type="float">
            <text:p>25302.25</text:p>
          </table:table-cell>
          <table:table-cell office:value-type="float" office:value="25317.25" calcext:value-type="float">
            <text:p>25317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7:56:13.400</text:p>
          </table:table-cell>
          <table:table-cell office:value-type="float" office:value="62" calcext:value-type="float">
            <text:p>6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334.4" calcext:value-type="float">
            <text:p>233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6.5" calcext:value-type="float">
            <text:p>26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00:01.300</text:p>
          </table:table-cell>
          <table:table-cell office:value-type="string" calcext:value-type="string">
            <text:p>2025-10-21 14:00:01.300</text:p>
          </table:table-cell>
          <table:table-cell office:value-type="string" calcext:value-type="string">
            <text:p>SHORT</text:p>
          </table:table-cell>
          <table:table-cell office:value-type="float" office:value="25313" calcext:value-type="float">
            <text:p>25313</text:p>
          </table:table-cell>
          <table:table-cell office:value-type="float" office:value="25303" calcext:value-type="float">
            <text:p>25303</text:p>
          </table:table-cell>
          <table:table-cell office:value-type="float" office:value="25318" calcext:value-type="float">
            <text:p>2531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00:02.20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523.7" calcext:value-type="float">
            <text:p>252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5.8" calcext:value-type="float">
            <text:p>285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02:35.400</text:p>
          </table:table-cell>
          <table:table-cell office:value-type="string" calcext:value-type="string">
            <text:p>2025-10-21 14:02:35.400</text:p>
          </table:table-cell>
          <table:table-cell office:value-type="string" calcext:value-type="string">
            <text:p>LONG</text:p>
          </table:table-cell>
          <table:table-cell office:value-type="float" office:value="25310.5" calcext:value-type="float">
            <text:p>25310.5</text:p>
          </table:table-cell>
          <table:table-cell office:value-type="float" office:value="25320.5" calcext:value-type="float">
            <text:p>25320.5</text:p>
          </table:table-cell>
          <table:table-cell office:value-type="float" office:value="25305.5" calcext:value-type="float">
            <text:p>25305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8:02:36.4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20.7" calcext:value-type="float">
            <text:p>-12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403" calcext:value-type="float">
            <text:p>2403</text:p>
          </table:table-cell>
          <table:table-cell office:value-type="float" office:value="1" calcext:value-type="float">
            <text:p>1</text:p>
          </table:table-cell>
          <table:table-cell office:value-type="float" office:value="2735.1" calcext:value-type="float">
            <text:p>2735.1</text:p>
          </table:table-cell>
          <table:table-cell office:value-type="float" office:value="2855.8" calcext:value-type="float">
            <text:p>2855.8</text:p>
          </table:table-cell>
          <table:table-cell office:value-type="float" office:value="-120.7" calcext:value-type="float">
            <text:p>-12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04:15.700</text:p>
          </table:table-cell>
          <table:table-cell office:value-type="string" calcext:value-type="string">
            <text:p>2025-10-21 14:04:15.700</text:p>
          </table:table-cell>
          <table:table-cell office:value-type="string" calcext:value-type="string">
            <text:p>LONG</text:p>
          </table:table-cell>
          <table:table-cell office:value-type="float" office:value="25312.5" calcext:value-type="float">
            <text:p>25312.5</text:p>
          </table:table-cell>
          <table:table-cell office:value-type="float" office:value="25322.5" calcext:value-type="float">
            <text:p>25322.5</text:p>
          </table:table-cell>
          <table:table-cell office:value-type="float" office:value="25307.5" calcext:value-type="float">
            <text:p>2530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04:15.90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592.3" calcext:value-type="float">
            <text:p>2592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4.4" calcext:value-type="float">
            <text:p>29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12:00.200</text:p>
          </table:table-cell>
          <table:table-cell office:value-type="string" calcext:value-type="string">
            <text:p>2025-10-21 14:12:00.200</text:p>
          </table:table-cell>
          <table:table-cell office:value-type="string" calcext:value-type="string">
            <text:p>LONG</text:p>
          </table:table-cell>
          <table:table-cell office:value-type="float" office:value="25313.25" calcext:value-type="float">
            <text:p>25313.25</text:p>
          </table:table-cell>
          <table:table-cell office:value-type="float" office:value="25323.25" calcext:value-type="float">
            <text:p>25323.25</text:p>
          </table:table-cell>
          <table:table-cell office:value-type="float" office:value="25308.25" calcext:value-type="float">
            <text:p>2530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8:12:01.20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776.6" calcext:value-type="float">
            <text:p>277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8.7" calcext:value-type="float">
            <text:p>310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17:19.800</text:p>
          </table:table-cell>
          <table:table-cell office:value-type="string" calcext:value-type="string">
            <text:p>2025-10-21 14:17:19.800</text:p>
          </table:table-cell>
          <table:table-cell office:value-type="string" calcext:value-type="string">
            <text:p>SHORT</text:p>
          </table:table-cell>
          <table:table-cell office:value-type="float" office:value="25299.75" calcext:value-type="float">
            <text:p>25299.75</text:p>
          </table:table-cell>
          <table:table-cell office:value-type="float" office:value="25289.75" calcext:value-type="float">
            <text:p>25289.75</text:p>
          </table:table-cell>
          <table:table-cell office:value-type="float" office:value="25304.75" calcext:value-type="float">
            <text:p>2530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17:22.500</text:p>
          </table:table-cell>
          <table:table-cell office:value-type="float" office:value="83" calcext:value-type="float">
            <text:p>83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65.9" calcext:value-type="float">
            <text:p>296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18:37.300</text:p>
          </table:table-cell>
          <table:table-cell office:value-type="string" calcext:value-type="string">
            <text:p>2025-10-21 14:18:37.300</text:p>
          </table:table-cell>
          <table:table-cell office:value-type="string" calcext:value-type="string">
            <text:p>LONG</text:p>
          </table:table-cell>
          <table:table-cell office:value-type="float" office:value="25296.5" calcext:value-type="float">
            <text:p>25296.5</text:p>
          </table:table-cell>
          <table:table-cell office:value-type="float" office:value="25306.5" calcext:value-type="float">
            <text:p>25306.5</text:p>
          </table:table-cell>
          <table:table-cell office:value-type="float" office:value="25291.5" calcext:value-type="float">
            <text:p>25291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18:37.400</text:p>
          </table:table-cell>
          <table:table-cell office:value-type="float" office:value="170" calcext:value-type="float">
            <text:p>170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1 18:19:18.4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855.2" calcext:value-type="float">
            <text:p>2855.2</text:p>
          </table:table-cell>
          <table:table-cell office:value-type="float" office:value="1" calcext:value-type="float">
            <text:p>1</text:p>
          </table:table-cell>
          <table:table-cell office:value-type="float" office:value="3187.3" calcext:value-type="float">
            <text:p>3187.3</text:p>
          </table:table-cell>
          <table:table-cell office:value-type="float" office:value="3298" calcext:value-type="float">
            <text:p>3298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19:40.400</text:p>
          </table:table-cell>
          <table:table-cell office:value-type="string" calcext:value-type="string">
            <text:p>2025-10-21 14:19:40.400</text:p>
          </table:table-cell>
          <table:table-cell office:value-type="string" calcext:value-type="string">
            <text:p>LONG</text:p>
          </table:table-cell>
          <table:table-cell office:value-type="float" office:value="25295" calcext:value-type="float">
            <text:p>25295</text:p>
          </table:table-cell>
          <table:table-cell office:value-type="float" office:value="25305" calcext:value-type="float">
            <text:p>25305</text:p>
          </table:table-cell>
          <table:table-cell office:value-type="float" office:value="25290" calcext:value-type="float">
            <text:p>25290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19:41.100</text:p>
          </table:table-cell>
          <table:table-cell office:value-type="float" office:value="189" calcext:value-type="float">
            <text:p>189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744.5" calcext:value-type="float">
            <text:p>2744.5</text:p>
          </table:table-cell>
          <table:table-cell office:value-type="float" office:value="2" calcext:value-type="float">
            <text:p>2</text:p>
          </table:table-cell>
          <table:table-cell office:value-type="float" office:value="3076.6" calcext:value-type="float">
            <text:p>3076.6</text:p>
          </table:table-cell>
          <table:table-cell office:value-type="float" office:value="3298" calcext:value-type="float">
            <text:p>3298</text:p>
          </table:table-cell>
          <table:table-cell office:value-type="float" office:value="-221.4" calcext:value-type="float">
            <text:p>-221.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23:36.200</text:p>
          </table:table-cell>
          <table:table-cell office:value-type="string" calcext:value-type="string">
            <text:p>2025-10-21 14:23:36.200</text:p>
          </table:table-cell>
          <table:table-cell office:value-type="string" calcext:value-type="string">
            <text:p>LONG</text:p>
          </table:table-cell>
          <table:table-cell office:value-type="float" office:value="25315.25" calcext:value-type="float">
            <text:p>25315.25</text:p>
          </table:table-cell>
          <table:table-cell office:value-type="float" office:value="25325.25" calcext:value-type="float">
            <text:p>2532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23:39.80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2933.8" calcext:value-type="float">
            <text:p>2933.8</text:p>
          </table:table-cell>
          <table:table-cell office:value-type="float" office:value="0" calcext:value-type="float">
            <text:p>0</text:p>
          </table:table-cell>
          <table:table-cell office:value-type="float" office:value="3265.9" calcext:value-type="float">
            <text:p>3265.9</text:p>
          </table:table-cell>
          <table:table-cell office:value-type="float" office:value="3298" calcext:value-type="float">
            <text:p>3298</text:p>
          </table:table-cell>
          <table:table-cell office:value-type="float" office:value="-32.0999999999995" calcext:value-type="float">
            <text:p>-32.0999999999995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23:38.600</text:p>
          </table:table-cell>
          <table:table-cell office:value-type="string" calcext:value-type="string">
            <text:p>2025-10-21 14:23:38.600</text:p>
          </table:table-cell>
          <table:table-cell office:value-type="string" calcext:value-type="string">
            <text:p>LONG</text:p>
          </table:table-cell>
          <table:table-cell office:value-type="float" office:value="25314.75" calcext:value-type="float">
            <text:p>25314.75</text:p>
          </table:table-cell>
          <table:table-cell office:value-type="float" office:value="25324.75" calcext:value-type="float">
            <text:p>25324.75</text:p>
          </table:table-cell>
          <table:table-cell office:value-type="float" office:value="25309.75" calcext:value-type="float">
            <text:p>25309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23:40.100</text:p>
          </table:table-cell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123.1" calcext:value-type="float">
            <text:p>3123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5.2" calcext:value-type="float">
            <text:p>345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27:11.000</text:p>
          </table:table-cell>
          <table:table-cell office:value-type="string" calcext:value-type="string">
            <text:p>2025-10-21 14:27:11.000</text:p>
          </table:table-cell>
          <table:table-cell office:value-type="string" calcext:value-type="string">
            <text:p>LONG</text:p>
          </table:table-cell>
          <table:table-cell office:value-type="float" office:value="25319.25" calcext:value-type="float">
            <text:p>25319.25</text:p>
          </table:table-cell>
          <table:table-cell office:value-type="float" office:value="25329.25" calcext:value-type="float">
            <text:p>25329.25</text:p>
          </table:table-cell>
          <table:table-cell office:value-type="float" office:value="25314.25" calcext:value-type="float">
            <text:p>25314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27:13.100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312.4" calcext:value-type="float">
            <text:p>3312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44.5" calcext:value-type="float">
            <text:p>364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27:22.300</text:p>
          </table:table-cell>
          <table:table-cell office:value-type="string" calcext:value-type="string">
            <text:p>2025-10-21 14:27:22.300</text:p>
          </table:table-cell>
          <table:table-cell office:value-type="string" calcext:value-type="string">
            <text:p>LONG</text:p>
          </table:table-cell>
          <table:table-cell office:value-type="float" office:value="25318" calcext:value-type="float">
            <text:p>25318</text:p>
          </table:table-cell>
          <table:table-cell office:value-type="float" office:value="25328" calcext:value-type="float">
            <text:p>25328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27:26.100</text:p>
          </table:table-cell>
          <table:table-cell office:value-type="float" office:value="588" calcext:value-type="float">
            <text:p>588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501.7" calcext:value-type="float">
            <text:p>3501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33.8" calcext:value-type="float">
            <text:p>38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36:42.200</text:p>
          </table:table-cell>
          <table:table-cell office:value-type="string" calcext:value-type="string">
            <text:p>2025-10-21 14:36:42.200</text:p>
          </table:table-cell>
          <table:table-cell office:value-type="string" calcext:value-type="string">
            <text:p>LONG</text:p>
          </table:table-cell>
          <table:table-cell office:value-type="float" office:value="25315.25" calcext:value-type="float">
            <text:p>25315.25</text:p>
          </table:table-cell>
          <table:table-cell office:value-type="float" office:value="25325.25" calcext:value-type="float">
            <text:p>2532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36:44.100</text:p>
          </table:table-cell>
          <table:table-cell office:value-type="float" office:value="1036" calcext:value-type="float">
            <text:p>103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3.1" calcext:value-type="float">
            <text:p>402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36:43.900</text:p>
          </table:table-cell>
          <table:table-cell office:value-type="string" calcext:value-type="string">
            <text:p>2025-10-21 14:36:43.900</text:p>
          </table:table-cell>
          <table:table-cell office:value-type="string" calcext:value-type="string">
            <text:p>LONG</text:p>
          </table:table-cell>
          <table:table-cell office:value-type="float" office:value="25315.25" calcext:value-type="float">
            <text:p>25315.25</text:p>
          </table:table-cell>
          <table:table-cell office:value-type="float" office:value="25325.25" calcext:value-type="float">
            <text:p>2532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36:44.1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3880.3" calcext:value-type="float">
            <text:p>388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12.4" calcext:value-type="float">
            <text:p>42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51:20.600</text:p>
          </table:table-cell>
          <table:table-cell office:value-type="string" calcext:value-type="string">
            <text:p>2025-10-21 14:51:20.600</text:p>
          </table:table-cell>
          <table:table-cell office:value-type="string" calcext:value-type="string">
            <text:p>LONG</text:p>
          </table:table-cell>
          <table:table-cell office:value-type="float" office:value="25315.25" calcext:value-type="float">
            <text:p>25315.25</text:p>
          </table:table-cell>
          <table:table-cell office:value-type="float" office:value="25325.25" calcext:value-type="float">
            <text:p>2532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51:20.900</text:p>
          </table:table-cell>
          <table:table-cell office:value-type="float" office:value="174" calcext:value-type="float">
            <text:p>17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069.6" calcext:value-type="float">
            <text:p>4069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01.7" calcext:value-type="float">
            <text:p>440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51:20.800</text:p>
          </table:table-cell>
          <table:table-cell office:value-type="string" calcext:value-type="string">
            <text:p>2025-10-21 14:51:20.800</text:p>
          </table:table-cell>
          <table:table-cell office:value-type="string" calcext:value-type="string">
            <text:p>LONG</text:p>
          </table:table-cell>
          <table:table-cell office:value-type="float" office:value="25315.25" calcext:value-type="float">
            <text:p>25315.25</text:p>
          </table:table-cell>
          <table:table-cell office:value-type="float" office:value="25325.25" calcext:value-type="float">
            <text:p>2532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51:20.90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258.9" calcext:value-type="float">
            <text:p>4258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91" calcext:value-type="float">
            <text:p>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8:51:21.500</text:p>
          </table:table-cell>
          <table:table-cell office:value-type="string" calcext:value-type="string">
            <text:p>2025-10-21 14:51:21.500</text:p>
          </table:table-cell>
          <table:table-cell office:value-type="string" calcext:value-type="string">
            <text:p>LONG</text:p>
          </table:table-cell>
          <table:table-cell office:value-type="float" office:value="25315.25" calcext:value-type="float">
            <text:p>25315.25</text:p>
          </table:table-cell>
          <table:table-cell office:value-type="float" office:value="25325.25" calcext:value-type="float">
            <text:p>2532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8:51:21.60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448.2" calcext:value-type="float">
            <text:p>444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80.3" calcext:value-type="float">
            <text:p>478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9:02:51.000</text:p>
          </table:table-cell>
          <table:table-cell office:value-type="string" calcext:value-type="string">
            <text:p>2025-10-21 15:02:51.000</text:p>
          </table:table-cell>
          <table:table-cell office:value-type="string" calcext:value-type="string">
            <text:p>LONG</text:p>
          </table:table-cell>
          <table:table-cell office:value-type="float" office:value="25306" calcext:value-type="float">
            <text:p>25306</text:p>
          </table:table-cell>
          <table:table-cell office:value-type="float" office:value="25316" calcext:value-type="float">
            <text:p>25316</text:p>
          </table:table-cell>
          <table:table-cell office:value-type="float" office:value="25301" calcext:value-type="float">
            <text:p>2530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1 19:02:52.70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337.5" calcext:value-type="float">
            <text:p>4337.5</text:p>
          </table:table-cell>
          <table:table-cell office:value-type="float" office:value="1" calcext:value-type="float">
            <text:p>1</text:p>
          </table:table-cell>
          <table:table-cell office:value-type="float" office:value="4669.6" calcext:value-type="float">
            <text:p>4669.6</text:p>
          </table:table-cell>
          <table:table-cell office:value-type="float" office:value="4780.3" calcext:value-type="float">
            <text:p>4780.3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9:05:01.100</text:p>
          </table:table-cell>
          <table:table-cell office:value-type="string" calcext:value-type="string">
            <text:p>2025-10-21 15:05:01.100</text:p>
          </table:table-cell>
          <table:table-cell office:value-type="string" calcext:value-type="string">
            <text:p>SHORT</text:p>
          </table:table-cell>
          <table:table-cell office:value-type="float" office:value="25305.25" calcext:value-type="float">
            <text:p>25305.25</text:p>
          </table:table-cell>
          <table:table-cell office:value-type="float" office:value="25295.25" calcext:value-type="float">
            <text:p>25295.25</text:p>
          </table:table-cell>
          <table:table-cell office:value-type="float" office:value="25310.25" calcext:value-type="float">
            <text:p>2531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9:05:02.100</text:p>
          </table:table-cell>
          <table:table-cell office:value-type="float" office:value="74" calcext:value-type="float">
            <text:p>7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521.8" calcext:value-type="float">
            <text:p>452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53.9" calcext:value-type="float">
            <text:p>485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9:27:30.400</text:p>
          </table:table-cell>
          <table:table-cell office:value-type="string" calcext:value-type="string">
            <text:p>2025-10-21 15:27:30.400</text:p>
          </table:table-cell>
          <table:table-cell office:value-type="string" calcext:value-type="string">
            <text:p>LONG</text:p>
          </table:table-cell>
          <table:table-cell office:value-type="float" office:value="25311.5" calcext:value-type="float">
            <text:p>25311.5</text:p>
          </table:table-cell>
          <table:table-cell office:value-type="float" office:value="25321.5" calcext:value-type="float">
            <text:p>25321.5</text:p>
          </table:table-cell>
          <table:table-cell office:value-type="float" office:value="25306.5" calcext:value-type="float">
            <text:p>25306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9:27:31.400</text:p>
          </table:table-cell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NORMAL</text:p>
          </table:table-cell>
          <table:table-cell office:value-type="float" office:value="4701.1" calcext:value-type="float">
            <text:p>470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33.2" calcext:value-type="float">
            <text:p>503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9:37:20.100</text:p>
          </table:table-cell>
          <table:table-cell office:value-type="string" calcext:value-type="string">
            <text:p>2025-10-21 15:37:20.100</text:p>
          </table:table-cell>
          <table:table-cell office:value-type="string" calcext:value-type="string">
            <text:p>LONG</text:p>
          </table:table-cell>
          <table:table-cell office:value-type="float" office:value="25307" calcext:value-type="float">
            <text:p>25307</text:p>
          </table:table-cell>
          <table:table-cell office:value-type="float" office:value="25317" calcext:value-type="float">
            <text:p>25317</text:p>
          </table:table-cell>
          <table:table-cell office:value-type="float" office:value="25302" calcext:value-type="float">
            <text:p>2530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9:37:21.10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4885.4" calcext:value-type="float">
            <text:p>4885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17.5" calcext:value-type="float">
            <text:p>52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2025-10-21 19:50:34.600</text:p>
          </table:table-cell>
          <table:table-cell office:value-type="string" calcext:value-type="string">
            <text:p>2025-10-21 15:50:34.600</text:p>
          </table:table-cell>
          <table:table-cell office:value-type="string" calcext:value-type="string">
            <text:p>LONG</text:p>
          </table:table-cell>
          <table:table-cell office:value-type="float" office:value="25322" calcext:value-type="float">
            <text:p>25322</text:p>
          </table:table-cell>
          <table:table-cell office:value-type="float" office:value="25332" calcext:value-type="float">
            <text:p>25332</text:p>
          </table:table-cell>
          <table:table-cell office:value-type="float" office:value="25317" calcext:value-type="float">
            <text:p>25317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1 19:50:35.600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1 19:52:53.800</text:p>
          </table:table-cell>
          <table:table-cell office:value-type="float" office:value="184.3" calcext:value-type="float">
            <text:p>184.3</text:p>
          </table:table-cell>
          <table:table-cell office:value-type="float" office:value="25281.75" calcext:value-type="float">
            <text:p>25281.75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CLOSE_30</text:p>
          </table:table-cell>
          <table:table-cell office:value-type="float" office:value="5069.7" calcext:value-type="float">
            <text:p>5069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01.8" calcext:value-type="float">
            <text:p>540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4:03:27.400</text:p>
          </table:table-cell>
          <table:table-cell office:value-type="string" calcext:value-type="string">
            <text:p>2025-10-22 10:03:27.400</text:p>
          </table:table-cell>
          <table:table-cell office:value-type="string" calcext:value-type="string">
            <text:p>SHORT</text:p>
          </table:table-cell>
          <table:table-cell office:value-type="float" office:value="25258.75" calcext:value-type="float">
            <text:p>25258.75</text:p>
          </table:table-cell>
          <table:table-cell office:value-type="float" office:value="25248.75" calcext:value-type="float">
            <text:p>25248.75</text:p>
          </table:table-cell>
          <table:table-cell office:value-type="float" office:value="25263.75" calcext:value-type="float">
            <text:p>25263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4:03:28.400</text:p>
          </table:table-cell>
          <table:table-cell office:value-type="float" office:value="82" calcext:value-type="float">
            <text:p>82</text:p>
          </table:table-cell>
          <table:table-cell office:value-type="float" office:value="-43" calcext:value-type="float">
            <text:p>-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2 14:05:02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4.3" calcext:value-type="float">
            <text:p>18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4:23:03.900</text:p>
          </table:table-cell>
          <table:table-cell office:value-type="string" calcext:value-type="string">
            <text:p>2025-10-22 10:23:03.900</text:p>
          </table:table-cell>
          <table:table-cell office:value-type="string" calcext:value-type="string">
            <text:p>LONG</text:p>
          </table:table-cell>
          <table:table-cell office:value-type="float" office:value="25215.75" calcext:value-type="float">
            <text:p>25215.75</text:p>
          </table:table-cell>
          <table:table-cell office:value-type="float" office:value="25225.75" calcext:value-type="float">
            <text:p>25225.75</text:p>
          </table:table-cell>
          <table:table-cell office:value-type="float" office:value="25210.75" calcext:value-type="float">
            <text:p>25210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4:23:04.90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ABOVE_OR</text:p>
          </table:table-cell>
          <table:table-cell office:value-type="string" calcext:value-type="string">
            <text:p>POST_OPEN</text:p>
          </table:table-cell>
          <table:table-cell office:value-type="float" office:value="252.9" calcext:value-type="float">
            <text:p>25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3.6" calcext:value-type="float">
            <text:p>36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4:34:12.700</text:p>
          </table:table-cell>
          <table:table-cell office:value-type="string" calcext:value-type="string">
            <text:p>2025-10-22 10:34:12.700</text:p>
          </table:table-cell>
          <table:table-cell office:value-type="string" calcext:value-type="string">
            <text:p>LONG</text:p>
          </table:table-cell>
          <table:table-cell office:value-type="float" office:value="25118" calcext:value-type="float">
            <text:p>25118</text:p>
          </table:table-cell>
          <table:table-cell office:value-type="float" office:value="25128" calcext:value-type="float">
            <text:p>25128</text:p>
          </table:table-cell>
          <table:table-cell office:value-type="float" office:value="25113" calcext:value-type="float">
            <text:p>2511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4:34:13.70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2 14:34:44.2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137.2" calcext:value-type="float">
            <text:p>137.2</text:p>
          </table:table-cell>
          <table:table-cell office:value-type="float" office:value="1" calcext:value-type="float">
            <text:p>1</text:p>
          </table:table-cell>
          <table:table-cell office:value-type="float" office:value="247.9" calcext:value-type="float">
            <text:p>247.9</text:p>
          </table:table-cell>
          <table:table-cell office:value-type="float" office:value="363.6" calcext:value-type="float">
            <text:p>363.6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4:53:01.600</text:p>
          </table:table-cell>
          <table:table-cell office:value-type="string" calcext:value-type="string">
            <text:p>2025-10-22 10:53:01.600</text:p>
          </table:table-cell>
          <table:table-cell office:value-type="string" calcext:value-type="string">
            <text:p>LONG</text:p>
          </table:table-cell>
          <table:table-cell office:value-type="float" office:value="25131" calcext:value-type="float">
            <text:p>25131</text:p>
          </table:table-cell>
          <table:table-cell office:value-type="float" office:value="25141" calcext:value-type="float">
            <text:p>25141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4:53:03.600</text:p>
          </table:table-cell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2 14:53:28.7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office:value-type="float" office:value="137.2" calcext:value-type="float">
            <text:p>137.2</text:p>
          </table:table-cell>
          <table:table-cell office:value-type="float" office:value="363.6" calcext:value-type="float">
            <text:p>363.6</text:p>
          </table:table-cell>
          <table:table-cell office:value-type="float" office:value="-226.4" calcext:value-type="float">
            <text:p>-226.4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5:06:56.900</text:p>
          </table:table-cell>
          <table:table-cell office:value-type="string" calcext:value-type="string">
            <text:p>2025-10-22 11:06:56.900</text:p>
          </table:table-cell>
          <table:table-cell office:value-type="string" calcext:value-type="string">
            <text:p>LONG</text:p>
          </table:table-cell>
          <table:table-cell office:value-type="float" office:value="25182.5" calcext:value-type="float">
            <text:p>25182.5</text:p>
          </table:table-cell>
          <table:table-cell office:value-type="float" office:value="25192.5" calcext:value-type="float">
            <text:p>25192.5</text:p>
          </table:table-cell>
          <table:table-cell office:value-type="float" office:value="25177.5" calcext:value-type="float">
            <text:p>25177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5:06:57.900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205.8" calcext:value-type="float">
            <text:p>205.8</text:p>
          </table:table-cell>
          <table:table-cell office:value-type="float" office:value="0" calcext:value-type="float">
            <text:p>0</text:p>
          </table:table-cell>
          <table:table-cell office:value-type="float" office:value="316.5" calcext:value-type="float">
            <text:p>316.5</text:p>
          </table:table-cell>
          <table:table-cell office:value-type="float" office:value="363.6" calcext:value-type="float">
            <text:p>363.6</text:p>
          </table:table-cell>
          <table:table-cell office:value-type="float" office:value="-47.1" calcext:value-type="float">
            <text:p>-47.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5:13:06.200</text:p>
          </table:table-cell>
          <table:table-cell office:value-type="string" calcext:value-type="string">
            <text:p>2025-10-22 11:13:06.200</text:p>
          </table:table-cell>
          <table:table-cell office:value-type="string" calcext:value-type="string">
            <text:p>SHORT</text:p>
          </table:table-cell>
          <table:table-cell office:value-type="float" office:value="25128.5" calcext:value-type="float">
            <text:p>25128.5</text:p>
          </table:table-cell>
          <table:table-cell office:value-type="float" office:value="25118.5" calcext:value-type="float">
            <text:p>25118.5</text:p>
          </table:table-cell>
          <table:table-cell office:value-type="float" office:value="25133.5" calcext:value-type="float">
            <text:p>25133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5:13:07.800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2 15:13:29.3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95.1000000000001" calcext:value-type="float">
            <text:p>95.1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205.8" calcext:value-type="float">
            <text:p>205.8</text:p>
          </table:table-cell>
          <table:table-cell office:value-type="float" office:value="363.6" calcext:value-type="float">
            <text:p>363.6</text:p>
          </table:table-cell>
          <table:table-cell office:value-type="float" office:value="-157.8" calcext:value-type="float">
            <text:p>-157.8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5:24:10.200</text:p>
          </table:table-cell>
          <table:table-cell office:value-type="string" calcext:value-type="string">
            <text:p>2025-10-22 11:24:10.200</text:p>
          </table:table-cell>
          <table:table-cell office:value-type="string" calcext:value-type="string">
            <text:p>SHORT</text:p>
          </table:table-cell>
          <table:table-cell office:value-type="float" office:value="25033" calcext:value-type="float">
            <text:p>25033</text:p>
          </table:table-cell>
          <table:table-cell office:value-type="float" office:value="25023" calcext:value-type="float">
            <text:p>25023</text:p>
          </table:table-cell>
          <table:table-cell office:value-type="float" office:value="25038" calcext:value-type="float">
            <text:p>2503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5:24:11.200</text:p>
          </table:table-cell>
          <table:table-cell office:value-type="float" office:value="82" calcext:value-type="float">
            <text:p>82</text:p>
          </table:table-cell>
          <table:table-cell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2 15:24:31.2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-20.5999999999999" calcext:value-type="float">
            <text:p>-20.5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90.1000000000001" calcext:value-type="float">
            <text:p>90.1000000000001</text:p>
          </table:table-cell>
          <table:table-cell office:value-type="float" office:value="363.6" calcext:value-type="float">
            <text:p>363.6</text:p>
          </table:table-cell>
          <table:table-cell office:value-type="float" office:value="-273.5" calcext:value-type="float">
            <text:p>-273.5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6:27:15.600</text:p>
          </table:table-cell>
          <table:table-cell office:value-type="string" calcext:value-type="string">
            <text:p>2025-10-22 12:27:15.600</text:p>
          </table:table-cell>
          <table:table-cell office:value-type="string" calcext:value-type="string">
            <text:p>SHORT</text:p>
          </table:table-cell>
          <table:table-cell office:value-type="float" office:value="25042.75" calcext:value-type="float">
            <text:p>25042.75</text:p>
          </table:table-cell>
          <table:table-cell office:value-type="float" office:value="25032.75" calcext:value-type="float">
            <text:p>25032.75</text:p>
          </table:table-cell>
          <table:table-cell office:value-type="float" office:value="25047.75" calcext:value-type="float">
            <text:p>25047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6:27:20.000</text:p>
          </table:table-cell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2 16:27:27.6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58.0000000000001" calcext:value-type="float">
            <text:p>58.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279.4" calcext:value-type="float">
            <text:p>279.4</text:p>
          </table:table-cell>
          <table:table-cell office:value-type="float" office:value="363.6" calcext:value-type="float">
            <text:p>363.6</text:p>
          </table:table-cell>
          <table:table-cell office:value-type="float" office:value="-84.1999999999999" calcext:value-type="float">
            <text:p>-84.1999999999999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03:16.400</text:p>
          </table:table-cell>
          <table:table-cell office:value-type="string" calcext:value-type="string">
            <text:p>2025-10-22 15:03:16.400</text:p>
          </table:table-cell>
          <table:table-cell office:value-type="string" calcext:value-type="string">
            <text:p>SHORT</text:p>
          </table:table-cell>
          <table:table-cell office:value-type="float" office:value="24945.25" calcext:value-type="float">
            <text:p>24945.25</text:p>
          </table:table-cell>
          <table:table-cell office:value-type="float" office:value="24935.25" calcext:value-type="float">
            <text:p>24935.25</text:p>
          </table:table-cell>
          <table:table-cell office:value-type="float" office:value="24950.25" calcext:value-type="float">
            <text:p>24950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03:17.40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NORMAL</text:p>
          </table:table-cell>
          <table:table-cell office:value-type="float" office:value="-51.8" calcext:value-type="float">
            <text:p>-5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3.7" calcext:value-type="float">
            <text:p>46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33:29.100</text:p>
          </table:table-cell>
          <table:table-cell office:value-type="string" calcext:value-type="string">
            <text:p>2025-10-22 15:33:29.100</text:p>
          </table:table-cell>
          <table:table-cell office:value-type="string" calcext:value-type="string">
            <text:p>SHORT</text:p>
          </table:table-cell>
          <table:table-cell office:value-type="float" office:value="25027.75" calcext:value-type="float">
            <text:p>25027.75</text:p>
          </table:table-cell>
          <table:table-cell office:value-type="float" office:value="25017.75" calcext:value-type="float">
            <text:p>25017.75</text:p>
          </table:table-cell>
          <table:table-cell office:value-type="float" office:value="25032.75" calcext:value-type="float">
            <text:p>25032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33:30.100</text:p>
          </table:table-cell>
          <table:table-cell office:value-type="float" office:value="177" calcext:value-type="float">
            <text:p>177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2 19:35:16.2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-30.3" calcext:value-type="float">
            <text:p>-3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39:43.600</text:p>
          </table:table-cell>
          <table:table-cell office:value-type="string" calcext:value-type="string">
            <text:p>2025-10-22 15:39:43.600</text:p>
          </table:table-cell>
          <table:table-cell office:value-type="string" calcext:value-type="string">
            <text:p>LONG</text:p>
          </table:table-cell>
          <table:table-cell office:value-type="float" office:value="25048" calcext:value-type="float">
            <text:p>25048</text:p>
          </table:table-cell>
          <table:table-cell office:value-type="float" office:value="25058" calcext:value-type="float">
            <text:p>25058</text:p>
          </table:table-cell>
          <table:table-cell office:value-type="float" office:value="25043" calcext:value-type="float">
            <text:p>25043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39:45.50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43.3000000000001" calcext:value-type="float">
            <text:p>43.300000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2.3" calcext:value-type="float">
            <text:p>83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41:58.900</text:p>
          </table:table-cell>
          <table:table-cell office:value-type="string" calcext:value-type="string">
            <text:p>2025-10-22 15:41:58.900</text:p>
          </table:table-cell>
          <table:table-cell office:value-type="string" calcext:value-type="string">
            <text:p>LONG</text:p>
          </table:table-cell>
          <table:table-cell office:value-type="float" office:value="25040.25" calcext:value-type="float">
            <text:p>25040.25</text:p>
          </table:table-cell>
          <table:table-cell office:value-type="float" office:value="25050.25" calcext:value-type="float">
            <text:p>25050.25</text:p>
          </table:table-cell>
          <table:table-cell office:value-type="float" office:value="25035.25" calcext:value-type="float">
            <text:p>25035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42:03.800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21.9" calcext:value-type="float">
            <text:p>121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1.6" calcext:value-type="float">
            <text:p>10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47:38.000</text:p>
          </table:table-cell>
          <table:table-cell office:value-type="string" calcext:value-type="string">
            <text:p>2025-10-22 15:47:38.000</text:p>
          </table:table-cell>
          <table:table-cell office:value-type="string" calcext:value-type="string">
            <text:p>SHORT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25016.5" calcext:value-type="float">
            <text:p>25016.5</text:p>
          </table:table-cell>
          <table:table-cell office:value-type="float" office:value="25031.5" calcext:value-type="float">
            <text:p>25031.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47:39.000</text:p>
          </table:table-cell>
          <table:table-cell office:value-type="float" office:value="159" calcext:value-type="float">
            <text:p>159</text:p>
          </table:table-cell>
          <table:table-cell office:value-type="float" office:value="-43" calcext:value-type="float">
            <text:p>-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2 19:48:13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01.2" calcext:value-type="float">
            <text:p>30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.9" calcext:value-type="float">
            <text:p>120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49:43.600</text:p>
          </table:table-cell>
          <table:table-cell office:value-type="string" calcext:value-type="string">
            <text:p>2025-10-22 15:49:43.600</text:p>
          </table:table-cell>
          <table:table-cell office:value-type="string" calcext:value-type="string">
            <text:p>SHORT</text:p>
          </table:table-cell>
          <table:table-cell office:value-type="float" office:value="25029" calcext:value-type="float">
            <text:p>25029</text:p>
          </table:table-cell>
          <table:table-cell office:value-type="float" office:value="25019" calcext:value-type="float">
            <text:p>25019</text:p>
          </table:table-cell>
          <table:table-cell office:value-type="float" office:value="25034" calcext:value-type="float">
            <text:p>25034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49:44.600</text:p>
          </table:table-cell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2025-10-22 19:50:01.400</text:p>
          </table:table-cell>
          <table:table-cell office:value-type="float" office:value="-115.7" calcext:value-type="float">
            <text:p>-115.7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85.5" calcext:value-type="float">
            <text:p>185.5</text:p>
          </table:table-cell>
          <table:table-cell office:value-type="float" office:value="1" calcext:value-type="float">
            <text:p>1</text:p>
          </table:table-cell>
          <table:table-cell office:value-type="float" office:value="1085.2" calcext:value-type="float">
            <text:p>1085.2</text:p>
          </table:table-cell>
          <table:table-cell office:value-type="float" office:value="1200.9" calcext:value-type="float">
            <text:p>1200.9</text:p>
          </table:table-cell>
          <table:table-cell office:value-type="float" office:value="-115.7" calcext:value-type="float">
            <text:p>-115.7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09.200</text:p>
          </table:table-cell>
          <table:table-cell office:value-type="string" calcext:value-type="string">
            <text:p>2025-10-22 15:50:09.200</text:p>
          </table:table-cell>
          <table:table-cell office:value-type="string" calcext:value-type="string">
            <text:p>SHORT</text:p>
          </table:table-cell>
          <table:table-cell office:value-type="float" office:value="25036.75" calcext:value-type="float">
            <text:p>25036.75</text:p>
          </table:table-cell>
          <table:table-cell office:value-type="float" office:value="25026.75" calcext:value-type="float">
            <text:p>25026.75</text:p>
          </table:table-cell>
          <table:table-cell office:value-type="float" office:value="25041.75" calcext:value-type="float">
            <text:p>25041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50:10.200</text:p>
          </table:table-cell>
          <table:table-cell office:value-type="float" office:value="143" calcext:value-type="float">
            <text:p>14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2025-10-22 19:50:34.7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64.8" calcext:value-type="float">
            <text:p>36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4.5" calcext:value-type="float">
            <text:p>12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38.300</text:p>
          </table:table-cell>
          <table:table-cell office:value-type="string" calcext:value-type="string">
            <text:p>2025-10-22 15:50:38.300</text:p>
          </table:table-cell>
          <table:table-cell office:value-type="string" calcext:value-type="string">
            <text:p>SHORT</text:p>
          </table:table-cell>
          <table:table-cell office:value-type="float" office:value="25024.5" calcext:value-type="float">
            <text:p>25024.5</text:p>
          </table:table-cell>
          <table:table-cell office:value-type="float" office:value="25014.5" calcext:value-type="float">
            <text:p>25014.5</text:p>
          </table:table-cell>
          <table:table-cell office:value-type="float" office:value="25029.5" calcext:value-type="float">
            <text:p>25029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40.300</text:p>
          </table:table-cell>
          <table:table-cell office:value-type="float" office:value="173" calcext:value-type="float">
            <text:p>173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554.1" calcext:value-type="float">
            <text:p>55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3.8" calcext:value-type="float">
            <text:p>145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39.800</text:p>
          </table:table-cell>
          <table:table-cell office:value-type="string" calcext:value-type="string">
            <text:p>2025-10-22 15:50:39.800</text:p>
          </table:table-cell>
          <table:table-cell office:value-type="string" calcext:value-type="string">
            <text:p>SHORT</text:p>
          </table:table-cell>
          <table:table-cell office:value-type="float" office:value="25027" calcext:value-type="float">
            <text:p>25027</text:p>
          </table:table-cell>
          <table:table-cell office:value-type="float" office:value="25017" calcext:value-type="float">
            <text:p>25017</text:p>
          </table:table-cell>
          <table:table-cell office:value-type="float" office:value="25032" calcext:value-type="float">
            <text:p>2503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50:40.800</text:p>
          </table:table-cell>
          <table:table-cell office:value-type="float" office:value="109" calcext:value-type="float">
            <text:p>109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733.4" calcext:value-type="float">
            <text:p>73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3.1" calcext:value-type="float">
            <text:p>163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41.300</text:p>
          </table:table-cell>
          <table:table-cell office:value-type="string" calcext:value-type="string">
            <text:p>2025-10-22 15:50:41.300</text:p>
          </table:table-cell>
          <table:table-cell office:value-type="string" calcext:value-type="string">
            <text:p>SHORT</text:p>
          </table:table-cell>
          <table:table-cell office:value-type="float" office:value="25026" calcext:value-type="float">
            <text:p>25026</text:p>
          </table:table-cell>
          <table:table-cell office:value-type="float" office:value="25016" calcext:value-type="float">
            <text:p>25016</text:p>
          </table:table-cell>
          <table:table-cell office:value-type="float" office:value="25031" calcext:value-type="float">
            <text:p>2503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50:42.300</text:p>
          </table:table-cell>
          <table:table-cell office:value-type="float" office:value="239" calcext:value-type="float">
            <text:p>239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902.7" calcext:value-type="float">
            <text:p>902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2.4" calcext:value-type="float">
            <text:p>180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43.300</text:p>
          </table:table-cell>
          <table:table-cell office:value-type="string" calcext:value-type="string">
            <text:p>2025-10-22 15:50:43.300</text:p>
          </table:table-cell>
          <table:table-cell office:value-type="string" calcext:value-type="string">
            <text:p>SHORT</text:p>
          </table:table-cell>
          <table:table-cell office:value-type="float" office:value="25022.5" calcext:value-type="float">
            <text:p>25022.5</text:p>
          </table:table-cell>
          <table:table-cell office:value-type="float" office:value="25012.5" calcext:value-type="float">
            <text:p>25012.5</text:p>
          </table:table-cell>
          <table:table-cell office:value-type="float" office:value="25027.5" calcext:value-type="float">
            <text:p>25027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44.400</text:p>
          </table:table-cell>
          <table:table-cell office:value-type="float" office:value="304" calcext:value-type="float">
            <text:p>304</text:p>
          </table:table-cell>
          <table:table-cell office:value-type="float" office:value="-35" calcext:value-type="float">
            <text:p>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1.7" calcext:value-type="float">
            <text:p>199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45.200</text:p>
          </table:table-cell>
          <table:table-cell office:value-type="string" calcext:value-type="string">
            <text:p>2025-10-22 15:50:45.200</text:p>
          </table:table-cell>
          <table:table-cell office:value-type="string" calcext:value-type="string">
            <text:p>SHORT</text:p>
          </table:table-cell>
          <table:table-cell office:value-type="float" office:value="25023.25" calcext:value-type="float">
            <text:p>25023.25</text:p>
          </table:table-cell>
          <table:table-cell office:value-type="float" office:value="25013.25" calcext:value-type="float">
            <text:p>25013.25</text:p>
          </table:table-cell>
          <table:table-cell office:value-type="float" office:value="25028.25" calcext:value-type="float">
            <text:p>25028.2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50:46.200</text:p>
          </table:table-cell>
          <table:table-cell office:value-type="float" office:value="244" calcext:value-type="float">
            <text:p>24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261.3" calcext:value-type="float">
            <text:p>126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47.400</text:p>
          </table:table-cell>
          <table:table-cell office:value-type="string" calcext:value-type="string">
            <text:p>2025-10-22 15:50:47.400</text:p>
          </table:table-cell>
          <table:table-cell office:value-type="string" calcext:value-type="string">
            <text:p>SHORT</text:p>
          </table:table-cell>
          <table:table-cell office:value-type="float" office:value="25019.75" calcext:value-type="float">
            <text:p>25019.75</text:p>
          </table:table-cell>
          <table:table-cell office:value-type="float" office:value="25009.75" calcext:value-type="float">
            <text:p>25009.75</text:p>
          </table:table-cell>
          <table:table-cell office:value-type="float" office:value="25024.75" calcext:value-type="float">
            <text:p>25024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48.200</text:p>
          </table:table-cell>
          <table:table-cell office:value-type="float" office:value="147" calcext:value-type="float">
            <text:p>147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450.6" calcext:value-type="float">
            <text:p>145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50.3" calcext:value-type="float">
            <text:p>235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0.100</text:p>
          </table:table-cell>
          <table:table-cell office:value-type="string" calcext:value-type="string">
            <text:p>2025-10-22 15:50:50.100</text:p>
          </table:table-cell>
          <table:table-cell office:value-type="string" calcext:value-type="string">
            <text:p>SHORT</text:p>
          </table:table-cell>
          <table:table-cell office:value-type="float" office:value="25020" calcext:value-type="float">
            <text:p>25020</text:p>
          </table:table-cell>
          <table:table-cell office:value-type="float" office:value="25010" calcext:value-type="float">
            <text:p>25010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51.000</text:p>
          </table:table-cell>
          <table:table-cell office:value-type="float" office:value="143" calcext:value-type="float">
            <text:p>143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639.9" calcext:value-type="float">
            <text:p>1639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9.6" calcext:value-type="float">
            <text:p>25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2.800</text:p>
          </table:table-cell>
          <table:table-cell office:value-type="string" calcext:value-type="string">
            <text:p>2025-10-22 15:50:52.800</text:p>
          </table:table-cell>
          <table:table-cell office:value-type="string" calcext:value-type="string">
            <text:p>SHORT</text:p>
          </table:table-cell>
          <table:table-cell office:value-type="float" office:value="25023.75" calcext:value-type="float">
            <text:p>25023.75</text:p>
          </table:table-cell>
          <table:table-cell office:value-type="float" office:value="25013.75" calcext:value-type="float">
            <text:p>25013.75</text:p>
          </table:table-cell>
          <table:table-cell office:value-type="float" office:value="25028.75" calcext:value-type="float">
            <text:p>25028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56.600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1829.2" calcext:value-type="float">
            <text:p>1829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8.9" calcext:value-type="float">
            <text:p>272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5.100</text:p>
          </table:table-cell>
          <table:table-cell office:value-type="string" calcext:value-type="string">
            <text:p>2025-10-22 15:50:55.100</text:p>
          </table:table-cell>
          <table:table-cell office:value-type="string" calcext:value-type="string">
            <text:p>SHORT</text:p>
          </table:table-cell>
          <table:table-cell office:value-type="float" office:value="25024.25" calcext:value-type="float">
            <text:p>25024.25</text:p>
          </table:table-cell>
          <table:table-cell office:value-type="float" office:value="25014.25" calcext:value-type="float">
            <text:p>25014.25</text:p>
          </table:table-cell>
          <table:table-cell office:value-type="float" office:value="25029.25" calcext:value-type="float">
            <text:p>2502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57.800</text:p>
          </table:table-cell>
          <table:table-cell office:value-type="float" office:value="169" calcext:value-type="float">
            <text:p>169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018.5" calcext:value-type="float">
            <text:p>201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8.2" calcext:value-type="float">
            <text:p>29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5.700</text:p>
          </table:table-cell>
          <table:table-cell office:value-type="string" calcext:value-type="string">
            <text:p>2025-10-22 15:50:55.700</text:p>
          </table:table-cell>
          <table:table-cell office:value-type="string" calcext:value-type="string">
            <text:p>SHORT</text:p>
          </table:table-cell>
          <table:table-cell office:value-type="float" office:value="25024.25" calcext:value-type="float">
            <text:p>25024.25</text:p>
          </table:table-cell>
          <table:table-cell office:value-type="float" office:value="25014.25" calcext:value-type="float">
            <text:p>25014.25</text:p>
          </table:table-cell>
          <table:table-cell office:value-type="float" office:value="25029.25" calcext:value-type="float">
            <text:p>25029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0:57.8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207.8" calcext:value-type="float">
            <text:p>2207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7.5" calcext:value-type="float">
            <text:p>310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7.400</text:p>
          </table:table-cell>
          <table:table-cell office:value-type="string" calcext:value-type="string">
            <text:p>2025-10-22 15:50:57.400</text:p>
          </table:table-cell>
          <table:table-cell office:value-type="string" calcext:value-type="string">
            <text:p>SHORT</text:p>
          </table:table-cell>
          <table:table-cell office:value-type="float" office:value="25023" calcext:value-type="float">
            <text:p>25023</text:p>
          </table:table-cell>
          <table:table-cell office:value-type="float" office:value="25013" calcext:value-type="float">
            <text:p>25013</text:p>
          </table:table-cell>
          <table:table-cell office:value-type="float" office:value="25028" calcext:value-type="float">
            <text:p>25028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1:02.3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397.1" calcext:value-type="float">
            <text:p>2397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6.8" calcext:value-type="float">
            <text:p>329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9.100</text:p>
          </table:table-cell>
          <table:table-cell office:value-type="string" calcext:value-type="string">
            <text:p>2025-10-22 15:50:59.100</text:p>
          </table:table-cell>
          <table:table-cell office:value-type="string" calcext:value-type="string">
            <text:p>SHORT</text:p>
          </table:table-cell>
          <table:table-cell office:value-type="float" office:value="25021.5" calcext:value-type="float">
            <text:p>25021.5</text:p>
          </table:table-cell>
          <table:table-cell office:value-type="float" office:value="25011.5" calcext:value-type="float">
            <text:p>25011.5</text:p>
          </table:table-cell>
          <table:table-cell office:value-type="float" office:value="25026.5" calcext:value-type="float">
            <text:p>25026.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1:00.000</text:p>
          </table:table-cell>
          <table:table-cell office:value-type="float" office:value="195" calcext:value-type="float">
            <text:p>195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586.4" calcext:value-type="float">
            <text:p>2586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86.1" calcext:value-type="float">
            <text:p>34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9.400</text:p>
          </table:table-cell>
          <table:table-cell office:value-type="string" calcext:value-type="string">
            <text:p>2025-10-22 15:50:59.400</text:p>
          </table:table-cell>
          <table:table-cell office:value-type="string" calcext:value-type="string">
            <text:p>SHORT</text:p>
          </table:table-cell>
          <table:table-cell office:value-type="float" office:value="25021.25" calcext:value-type="float">
            <text:p>25021.25</text:p>
          </table:table-cell>
          <table:table-cell office:value-type="float" office:value="25011.25" calcext:value-type="float">
            <text:p>25011.25</text:p>
          </table:table-cell>
          <table:table-cell office:value-type="float" office:value="25026.25" calcext:value-type="float">
            <text:p>2502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1:00.000</text:p>
          </table:table-cell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775.7" calcext:value-type="float">
            <text:p>2775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5.4" calcext:value-type="float">
            <text:p>367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0:59.600</text:p>
          </table:table-cell>
          <table:table-cell office:value-type="string" calcext:value-type="string">
            <text:p>2025-10-22 15:50:59.600</text:p>
          </table:table-cell>
          <table:table-cell office:value-type="string" calcext:value-type="string">
            <text:p>SHORT</text:p>
          </table:table-cell>
          <table:table-cell office:value-type="float" office:value="25021.25" calcext:value-type="float">
            <text:p>25021.25</text:p>
          </table:table-cell>
          <table:table-cell office:value-type="float" office:value="25011.25" calcext:value-type="float">
            <text:p>25011.25</text:p>
          </table:table-cell>
          <table:table-cell office:value-type="float" office:value="25026.25" calcext:value-type="float">
            <text:p>25026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1:00.000</text:p>
          </table:table-cell>
          <table:table-cell office:value-type="float" office:value="138" calcext:value-type="float">
            <text:p>1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4.7" calcext:value-type="float">
            <text:p>386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1:00.400</text:p>
          </table:table-cell>
          <table:table-cell office:value-type="string" calcext:value-type="string">
            <text:p>2025-10-22 15:51:00.400</text:p>
          </table:table-cell>
          <table:table-cell office:value-type="string" calcext:value-type="string">
            <text:p>SHORT</text:p>
          </table:table-cell>
          <table:table-cell office:value-type="float" office:value="25021.75" calcext:value-type="float">
            <text:p>25021.75</text:p>
          </table:table-cell>
          <table:table-cell office:value-type="float" office:value="25011.75" calcext:value-type="float">
            <text:p>25011.75</text:p>
          </table:table-cell>
          <table:table-cell office:value-type="float" office:value="25026.75" calcext:value-type="float">
            <text:p>25026.7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51:01.400</text:p>
          </table:table-cell>
          <table:table-cell office:value-type="float" office:value="127" calcext:value-type="float">
            <text:p>127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144.3" calcext:value-type="float">
            <text:p>3144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1:04.100</text:p>
          </table:table-cell>
          <table:table-cell office:value-type="string" calcext:value-type="string">
            <text:p>2025-10-22 15:51:04.100</text:p>
          </table:table-cell>
          <table:table-cell office:value-type="string" calcext:value-type="string">
            <text:p>SHORT</text:p>
          </table:table-cell>
          <table:table-cell office:value-type="float" office:value="25025.25" calcext:value-type="float">
            <text:p>25025.25</text:p>
          </table:table-cell>
          <table:table-cell office:value-type="float" office:value="25015.25" calcext:value-type="float">
            <text:p>25015.25</text:p>
          </table:table-cell>
          <table:table-cell office:value-type="float" office:value="25030.25" calcext:value-type="float">
            <text:p>25030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1:04.800</text:p>
          </table:table-cell>
          <table:table-cell office:value-type="float" office:value="84" calcext:value-type="float">
            <text:p>8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333.6" calcext:value-type="float">
            <text:p>333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33.3" calcext:value-type="float">
            <text:p>423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1:04.500</text:p>
          </table:table-cell>
          <table:table-cell office:value-type="string" calcext:value-type="string">
            <text:p>2025-10-22 15:51:04.500</text:p>
          </table:table-cell>
          <table:table-cell office:value-type="string" calcext:value-type="string">
            <text:p>SHORT</text:p>
          </table:table-cell>
          <table:table-cell office:value-type="float" office:value="25025.75" calcext:value-type="float">
            <text:p>25025.75</text:p>
          </table:table-cell>
          <table:table-cell office:value-type="float" office:value="25015.75" calcext:value-type="float">
            <text:p>25015.75</text:p>
          </table:table-cell>
          <table:table-cell office:value-type="float" office:value="25030.75" calcext:value-type="float">
            <text:p>2503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1:06.200</text:p>
          </table:table-cell>
          <table:table-cell office:value-type="float" office:value="192" calcext:value-type="float">
            <text:p>192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9.3" calcext:value-type="float">
            <text:p>189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522.9" calcext:value-type="float">
            <text:p>352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22.6" calcext:value-type="float">
            <text:p>442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3:02.000</text:p>
          </table:table-cell>
          <table:table-cell office:value-type="string" calcext:value-type="string">
            <text:p>2025-10-22 15:53:02.000</text:p>
          </table:table-cell>
          <table:table-cell office:value-type="string" calcext:value-type="string">
            <text:p>LONG</text:p>
          </table:table-cell>
          <table:table-cell office:value-type="float" office:value="25023.25" calcext:value-type="float">
            <text:p>25023.25</text:p>
          </table:table-cell>
          <table:table-cell office:value-type="float" office:value="25033.25" calcext:value-type="float">
            <text:p>25033.25</text:p>
          </table:table-cell>
          <table:table-cell office:value-type="float" office:value="25018.25" calcext:value-type="float">
            <text:p>25018.2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2025-10-22 19:53:05.50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1970-01-01 00:00:00.000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412.2" calcext:value-type="float">
            <text:p>3412.2</text:p>
          </table:table-cell>
          <table:table-cell office:value-type="float" office:value="1" calcext:value-type="float">
            <text:p>1</text:p>
          </table:table-cell>
          <table:table-cell office:value-type="float" office:value="4311.9" calcext:value-type="float">
            <text:p>4311.9</text:p>
          </table:table-cell>
          <table:table-cell office:value-type="float" office:value="4422.6" calcext:value-type="float">
            <text:p>4422.6</text:p>
          </table:table-cell>
          <table:table-cell office:value-type="float" office:value="-110.7" calcext:value-type="float">
            <text:p>-110.7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2025-10-22 19:59:52.400</text:p>
          </table:table-cell>
          <table:table-cell office:value-type="string" calcext:value-type="string">
            <text:p>2025-10-22 15:59:52.400</text:p>
          </table:table-cell>
          <table:table-cell office:value-type="string" calcext:value-type="string">
            <text:p>SHORT</text:p>
          </table:table-cell>
          <table:table-cell office:value-type="float" office:value="25037" calcext:value-type="float">
            <text:p>25037</text:p>
          </table:table-cell>
          <table:table-cell office:value-type="float" office:value="25027" calcext:value-type="float">
            <text:p>25027</text:p>
          </table:table-cell>
          <table:table-cell office:value-type="float" office:value="25042" calcext:value-type="float">
            <text:p>2504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2025-10-22 19:59:53.400</text:p>
          </table:table-cell>
          <table:table-cell office:value-type="float" office:value="97" calcext:value-type="float">
            <text:p>97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70-01-01 00:00:00.000</text:p>
          </table:table-cell>
          <table:table-cell office:value-type="float" office:value="184.3" calcext:value-type="float">
            <text:p>184.3</text:p>
          </table:table-cell>
          <table:table-cell table:number-columns-repeated="2" office:value-type="float" office:value="25209.5" calcext:value-type="float">
            <text:p>25209.5</text:p>
          </table:table-cell>
          <table:table-cell office:value-type="string" calcext:value-type="string">
            <text:p>BELOW_OR</text:p>
          </table:table-cell>
          <table:table-cell office:value-type="string" calcext:value-type="string">
            <text:p>CLOSE_30</text:p>
          </table:table-cell>
          <table:table-cell office:value-type="float" office:value="3596.5" calcext:value-type="float">
            <text:p>359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96.2" calcext:value-type="float">
            <text:p>4496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2T20:13:48.005159924</dc:date>
    <meta:editing-duration>PT13M45S</meta:editing-duration>
    <meta:editing-cycles>1</meta:editing-cycles>
    <meta:document-statistic meta:table-count="1" meta:cell-count="21816" meta:object-count="0"/>
    <meta:generator>LibreOffice/24.2.7.2$Linux_X86_64 LibreOffice_project/420$Build-2</meta:generator>
  </office:meta>
</office:document-meta>
</file>